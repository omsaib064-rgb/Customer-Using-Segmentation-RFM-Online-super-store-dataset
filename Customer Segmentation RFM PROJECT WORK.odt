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1.337cm" table:align="left"/>
    </style:style>
    <style:style style:name="Table1.A" style:family="table-column">
      <style:table-column-properties style:column-width="2cm"/>
    </style:style>
    <style:style style:name="Table1.B" style:family="table-column">
      <style:table-column-properties style:column-width="1.69cm"/>
    </style:style>
    <style:style style:name="Table1.C" style:family="table-column">
      <style:table-column-properties style:column-width="2.106cm"/>
    </style:style>
    <style:style style:name="Table1.D" style:family="table-column">
      <style:table-column-properties style:column-width="1.972cm"/>
    </style:style>
    <style:style style:name="Table1.E" style:family="table-column">
      <style:table-column-properties style:column-width="3.568cm"/>
    </style:style>
    <style:style style:name="Table1.A1" style:family="table-cell">
      <style:table-cell-properties style:vertical-align="middle" fo:padding="0.049cm" fo:border="none"/>
    </style:style>
    <style:style style:name="Table2" style:family="table">
      <style:table-properties style:width="9.081cm" table:align="left"/>
    </style:style>
    <style:style style:name="Table2.A" style:family="table-column">
      <style:table-column-properties style:column-width="3.233cm"/>
    </style:style>
    <style:style style:name="Table2.B" style:family="table-column">
      <style:table-column-properties style:column-width="5.847cm"/>
    </style:style>
    <style:style style:name="Table2.A1" style:family="table-cell">
      <style:table-cell-properties style:vertical-align="middle" fo:padding="0.049cm" fo:border="none"/>
    </style:style>
    <style:style style:name="P1" style:family="paragraph" style:parent-style-name="Text_20_body">
      <style:paragraph-properties fo:text-align="left" style:justify-single-word="false" style:writing-mode="lr-tb" style:writing-mode-automatic="false">
        <style:tab-stops>
          <style:tab-stop style:position="8.5cm" style:type="center"/>
          <style:tab-stop style:position="17cm" style:type="right"/>
        </style:tab-stops>
      </style:paragraph-properties>
      <style:text-properties officeooo:paragraph-rsid="000372ca"/>
    </style:style>
    <style:style style:name="P2" style:family="paragraph" style:parent-style-name="Text_20_body">
      <style:paragraph-properties fo:text-align="left" style:justify-single-word="false" style:writing-mode="lr-tb" style:writing-mode-automatic="false">
        <style:tab-stops>
          <style:tab-stop style:position="8.5cm" style:type="center"/>
          <style:tab-stop style:position="17cm" style:type="right"/>
        </style:tab-stops>
      </style:paragraph-properties>
      <style:text-properties style:font-name="Times New Roman" fo:font-size="12pt" style:text-underline-style="none" fo:font-weight="bold" officeooo:paragraph-rsid="000372ca" style:font-size-asian="12pt" style:font-weight-asian="bold" style:font-size-complex="12pt" style:font-weight-complex="bold"/>
    </style:style>
    <style:style style:name="P3" style:family="paragraph" style:parent-style-name="Text_20_body">
      <style:paragraph-properties fo:text-align="left" style:justify-single-word="false" style:writing-mode="lr-tb" style:writing-mode-automatic="false">
        <style:tab-stops>
          <style:tab-stop style:position="8.5cm" style:type="center"/>
          <style:tab-stop style:position="17cm" style:type="right"/>
        </style:tab-stops>
      </style:paragraph-properties>
      <style:text-properties style:font-name="Times New Roman" fo:font-size="12pt" style:text-underline-style="none" fo:font-weight="normal" officeooo:paragraph-rsid="000372ca" style:font-size-asian="12pt" style:font-weight-asian="normal" style:font-size-complex="12pt" style:font-weight-complex="normal"/>
    </style:style>
    <style:style style:name="P4" style:family="paragraph" style:parent-style-name="Text_20_body">
      <style:paragraph-properties fo:text-align="left" style:justify-single-word="false" style:writing-mode="lr-tb" style:writing-mode-automatic="false">
        <style:tab-stops>
          <style:tab-stop style:position="8.5cm" style:type="center"/>
          <style:tab-stop style:position="17cm" style:type="right"/>
        </style:tab-stops>
      </style:paragraph-properties>
      <style:text-properties officeooo:paragraph-rsid="0003ec05"/>
    </style:style>
    <style:style style:name="P5" style:family="paragraph" style:parent-style-name="Text_20_body">
      <style:paragraph-properties fo:text-align="left" style:justify-single-word="false" style:writing-mode="lr-tb" style:writing-mode-automatic="false">
        <style:tab-stops>
          <style:tab-stop style:position="8.5cm" style:type="center"/>
          <style:tab-stop style:position="17cm" style:type="right"/>
        </style:tab-stops>
      </style:paragraph-properties>
      <style:text-properties style:font-name="Times New Roman" fo:font-size="12pt" style:text-underline-style="none" fo:font-weight="normal" officeooo:paragraph-rsid="0003ec05" style:font-size-asian="12pt" style:font-weight-asian="normal" style:font-size-complex="12pt" style:font-weight-complex="normal"/>
    </style:style>
    <style:style style:name="P6" style:family="paragraph" style:parent-style-name="Header_20_and_20_Footer">
      <style:paragraph-properties fo:text-align="left" style:justify-single-word="false" style:writing-mode="lr-tb" style:writing-mode-automatic="false"/>
      <style:text-properties style:font-name="Times New Roman" fo:font-size="12pt" style:text-underline-style="none" fo:font-weight="normal" officeooo:paragraph-rsid="0003ec05" style:font-size-asian="12pt" style:font-weight-asian="normal" style:font-size-complex="12pt" style:font-weight-complex="normal"/>
    </style:style>
    <style:style style:name="P7" style:family="paragraph" style:parent-style-name="Header_20_and_20_Footer">
      <style:paragraph-properties fo:text-align="left" style:justify-single-word="false" style:writing-mode="lr-tb" style:writing-mode-automatic="false"/>
      <style:text-properties style:font-name="Times New Roman" fo:font-size="12pt" style:text-underline-style="none" fo:font-weight="bold" officeooo:paragraph-rsid="0003ec05" style:font-size-asian="12pt" style:font-weight-asian="bold" style:font-size-complex="12pt" style:font-weight-complex="bold"/>
    </style:style>
    <style:style style:name="P8" style:family="paragraph" style:parent-style-name="Header_20_and_20_Footer">
      <style:paragraph-properties fo:text-align="left" style:justify-single-word="false" style:writing-mode="lr-tb" style:writing-mode-automatic="false"/>
      <style:text-properties style:font-name="Times New Roman" fo:font-size="12pt" style:text-underline-style="none" fo:font-weight="bold" officeooo:paragraph-rsid="000372ca" style:font-size-asian="12pt" style:font-weight-asian="bold" style:font-size-complex="12pt" style:font-weight-complex="bold"/>
    </style:style>
    <style:style style:name="P9" style:family="paragraph" style:parent-style-name="Heading_20_1">
      <style:paragraph-properties fo:text-align="left" style:justify-single-word="false" style:writing-mode="lr-tb" style:writing-mode-automatic="false">
        <style:tab-stops>
          <style:tab-stop style:position="8.5cm" style:type="center"/>
          <style:tab-stop style:position="17cm" style:type="right"/>
        </style:tab-stops>
      </style:paragraph-properties>
      <style:text-properties officeooo:paragraph-rsid="000372ca"/>
    </style:style>
    <style:style style:name="P10" style:family="paragraph" style:parent-style-name="Heading_20_2">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6pt" officeooo:rsid="000372ca" style:font-size-asian="16pt" style:font-size-complex="16pt"/>
    </style:style>
    <style:style style:name="P11" style:family="paragraph" style:parent-style-name="Text_20_body">
      <style:paragraph-properties>
        <style:tab-stops>
          <style:tab-stop style:position="8.5cm" style:type="center"/>
          <style:tab-stop style:position="17cm" style:type="right"/>
        </style:tab-stops>
      </style:paragraph-properties>
      <style:text-properties style:font-name="Times New Roman" fo:font-size="12pt" fo:font-weight="normal" officeooo:rsid="000372ca" style:font-size-asian="12pt" style:font-weight-asian="normal" style:font-size-complex="12pt" style:font-weight-complex="normal"/>
    </style:style>
    <style:style style:name="P12" style:family="paragraph" style:parent-style-name="Text_20_body">
      <style:paragraph-properties>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13" style:family="paragraph" style:parent-style-name="Heading_20_2">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8pt" officeooo:rsid="000372ca" style:font-size-asian="18pt" style:font-size-complex="18pt"/>
    </style:style>
    <style:style style:name="P14" style:family="paragraph" style:parent-style-name="Heading_20_1">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4pt" fo:font-weight="normal" officeooo:rsid="000372ca" style:font-size-asian="14pt" style:font-weight-asian="normal" style:font-size-complex="14pt" style:font-weight-complex="normal"/>
    </style:style>
    <style:style style:name="P15" style:family="paragraph" style:parent-style-name="Heading_20_2">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4pt" fo:font-weight="normal" officeooo:rsid="000372ca" style:font-size-asian="14pt" style:font-weight-asian="normal" style:font-size-complex="14pt" style:font-weight-complex="normal"/>
    </style:style>
    <style:style style:name="P16" style:family="paragraph" style:parent-style-name="Horizontal_20_Line">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2pt" fo:font-weight="normal" officeooo:rsid="000372ca" style:font-size-asian="12pt" style:font-weight-asian="normal" style:font-size-complex="12pt" style:font-weight-complex="normal"/>
    </style:style>
    <style:style style:name="P17" style:family="paragraph" style:parent-style-name="Text_20_body" style:list-style-name="L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18" style:family="paragraph" style:parent-style-name="Text_20_body" style:list-style-name="L1">
      <style:paragraph-properties>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19" style:family="paragraph" style:parent-style-name="Text_20_body" style:list-style-name="L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20" style:family="paragraph" style:parent-style-name="Text_20_body" style:list-style-name="L2">
      <style:paragraph-properties>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21" style:family="paragraph" style:parent-style-name="Text_20_body" style:list-style-name="L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22" style:family="paragraph" style:parent-style-name="Text_20_body" style:list-style-name="L3">
      <style:paragraph-properties>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23" style:family="paragraph" style:parent-style-name="Heading_20_3">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2pt" fo:font-weight="normal" officeooo:rsid="000372ca" style:font-size-asian="12pt" style:font-weight-asian="normal" style:font-size-complex="12pt" style:font-weight-complex="normal"/>
    </style:style>
    <style:style style:name="P24" style:family="paragraph" style:parent-style-name="Text_20_body" style:list-style-name="L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25" style:family="paragraph" style:parent-style-name="Text_20_body" style:list-style-name="L4">
      <style:paragraph-properties>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26" style:family="paragraph" style:parent-style-name="Text_20_body" style:list-style-name="L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27" style:family="paragraph" style:parent-style-name="Text_20_body" style:list-style-name="L5">
      <style:paragraph-properties>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28" style:family="paragraph" style:parent-style-name="Text_20_body" style:list-style-name="L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29" style:family="paragraph" style:parent-style-name="Text_20_body" style:list-style-name="L6">
      <style:paragraph-properties>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30" style:family="paragraph" style:parent-style-name="Text_20_body" style:list-style-name="L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31" style:family="paragraph" style:parent-style-name="Text_20_body" style:list-style-name="L7">
      <style:paragraph-properties>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32" style:family="paragraph" style:parent-style-name="Text_20_body" style:list-style-name="L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33" style:family="paragraph" style:parent-style-name="Text_20_body" style:list-style-name="L8">
      <style:paragraph-properties>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34" style:family="paragraph" style:parent-style-name="Heading_20_3">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4pt" fo:font-weight="normal" officeooo:rsid="000372ca" style:font-size-asian="14pt" style:font-weight-asian="normal" style:font-size-complex="14pt" style:font-weight-complex="normal"/>
    </style:style>
    <style:style style:name="P35" style:family="paragraph" style:parent-style-name="Text_20_body" style:list-style-name="L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36" style:family="paragraph" style:parent-style-name="Text_20_body" style:list-style-name="L9">
      <style:paragraph-properties>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37" style:family="paragraph" style:parent-style-name="Text_20_body" style:list-style-name="L1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38" style:family="paragraph" style:parent-style-name="Text_20_body" style:list-style-name="L10">
      <style:paragraph-properties>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39" style:family="paragraph" style:parent-style-name="Text_20_body" style:list-style-name="L1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40" style:family="paragraph" style:parent-style-name="Text_20_body" style:list-style-name="L11">
      <style:paragraph-properties>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41" style:family="paragraph" style:parent-style-name="Text_20_body" style:list-style-name="L1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42" style:family="paragraph" style:parent-style-name="Text_20_body" style:list-style-name="L12">
      <style:paragraph-properties>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43" style:family="paragraph" style:parent-style-name="Text_20_body" style:list-style-name="L1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44" style:family="paragraph" style:parent-style-name="Text_20_body" style:list-style-name="L13">
      <style:paragraph-properties>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45" style:family="paragraph" style:parent-style-name="Text_20_body" style:list-style-name="L1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46" style:family="paragraph" style:parent-style-name="Text_20_body" style:list-style-name="L14">
      <style:paragraph-properties>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47" style:family="paragraph" style:parent-style-name="Text_20_body" style:list-style-name="L1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48" style:family="paragraph" style:parent-style-name="Text_20_body" style:list-style-name="L15">
      <style:paragraph-properties>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49" style:family="paragraph" style:parent-style-name="Text_20_body" style:list-style-name="L1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50" style:family="paragraph" style:parent-style-name="Text_20_body" style:list-style-name="L16">
      <style:paragraph-properties>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51" style:family="paragraph" style:parent-style-name="Text_20_body" style:list-style-name="L1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52" style:family="paragraph" style:parent-style-name="Text_20_body" style:list-style-name="L17">
      <style:paragraph-properties>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53" style:family="paragraph" style:parent-style-name="Text_20_body" style:list-style-name="L1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54" style:family="paragraph" style:parent-style-name="Text_20_body" style:list-style-name="L18">
      <style:paragraph-properties>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55" style:family="paragraph" style:parent-style-name="Text_20_body" style:list-style-name="L1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56" style:family="paragraph" style:parent-style-name="Text_20_body" style:list-style-name="L19">
      <style:paragraph-properties>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57" style:family="paragraph" style:parent-style-name="Text_20_body" style:list-style-name="L2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58" style:family="paragraph" style:parent-style-name="Text_20_body" style:list-style-name="L20">
      <style:paragraph-properties>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59" style:family="paragraph" style:parent-style-name="Heading_20_1">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6pt" fo:font-weight="bold" officeooo:rsid="000372ca" style:font-size-asian="16pt" style:font-weight-asian="bold" style:font-size-complex="16pt" style:font-weight-complex="bold"/>
    </style:style>
    <style:style style:name="P60" style:family="paragraph" style:parent-style-name="Heading_20_1">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4pt" fo:font-weight="bold" officeooo:rsid="000372ca" style:font-size-asian="14pt" style:font-weight-asian="bold" style:font-size-complex="14pt" style:font-weight-complex="bold"/>
    </style:style>
    <style:style style:name="P61" style:family="paragraph" style:parent-style-name="Heading_20_2">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4pt" fo:font-weight="bold" officeooo:rsid="000372ca" style:font-size-asian="14pt" style:font-weight-asian="bold" style:font-size-complex="14pt" style:font-weight-complex="bold"/>
    </style:style>
    <style:style style:name="P62" style:family="paragraph" style:parent-style-name="Heading_20_2">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5pt" fo:font-weight="bold" officeooo:rsid="000372ca" style:font-size-asian="15pt" style:font-weight-asian="bold" style:font-size-complex="15pt" style:font-weight-complex="bold"/>
    </style:style>
    <style:style style:name="P63" style:family="paragraph" style:parent-style-name="Text_20_body" style:list-style-name="L2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fo:font-weight="normal" officeooo:rsid="000372ca" style:font-size-asian="12pt" style:font-weight-asian="normal" style:font-size-complex="12pt" style:font-weight-complex="normal"/>
    </style:style>
    <style:style style:name="P64" style:family="paragraph" style:parent-style-name="Text_20_body" style:list-style-name="L21">
      <style:paragraph-properties>
        <style:tab-stops>
          <style:tab-stop style:position="8.5cm" style:type="center"/>
          <style:tab-stop style:position="17cm" style:type="right"/>
        </style:tab-stops>
      </style:paragraph-properties>
      <style:text-properties style:font-name="Times New Roman" fo:font-size="12pt" fo:font-weight="normal" officeooo:rsid="000372ca" style:font-size-asian="12pt" style:font-weight-asian="normal" style:font-size-complex="12pt" style:font-weight-complex="normal"/>
    </style:style>
    <style:style style:name="P65" style:family="paragraph" style:parent-style-name="Heading_20_3">
      <style:paragraph-properties fo:text-align="left" style:justify-single-word="false" style:writing-mode="lr-tb" style:writing-mode-automatic="false">
        <style:tab-stops>
          <style:tab-stop style:position="8.5cm" style:type="center"/>
          <style:tab-stop style:position="17cm" style:type="right"/>
        </style:tab-stops>
      </style:paragraph-properties>
      <style:text-properties officeooo:paragraph-rsid="000372ca"/>
    </style:style>
    <style:style style:name="P66" style:family="paragraph" style:parent-style-name="Text_20_body">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7" style:family="paragraph" style:parent-style-name="Text_20_body" style:list-style-name="L2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8" style:family="paragraph" style:parent-style-name="Text_20_body" style:list-style-name="L2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9" style:family="paragraph" style:parent-style-name="Heading_20_3">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4pt" fo:font-weight="bold" officeooo:rsid="000372ca" style:font-size-asian="14pt" style:font-weight-asian="bold" style:font-size-complex="14pt" style:font-weight-complex="bold"/>
    </style:style>
    <style:style style:name="P70" style:family="paragraph" style:parent-style-name="Text_20_body" style:list-style-name="L2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1" style:family="paragraph" style:parent-style-name="Text_20_body" style:list-style-name="L2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2" style:family="paragraph" style:parent-style-name="Text_20_body" style:list-style-name="L2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73" style:family="paragraph" style:parent-style-name="Text_20_body" style:list-style-name="L2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4" style:family="paragraph" style:parent-style-name="Text_20_body">
      <style:paragraph-properties>
        <style:tab-stops>
          <style:tab-stop style:position="8.5cm" style:type="center"/>
          <style:tab-stop style:position="17cm" style:type="right"/>
        </style:tab-stops>
      </style:paragraph-properties>
      <style:text-properties style:font-name="Times New Roman" fo:font-size="14pt" fo:font-weight="bold" officeooo:rsid="000372ca" style:font-size-asian="14pt" style:font-weight-asian="bold" style:font-size-complex="14pt" style:font-weight-complex="bold"/>
    </style:style>
    <style:style style:name="P75" style:family="paragraph" style:parent-style-name="Text_20_body" style:list-style-name="L2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6" style:family="paragraph" style:parent-style-name="Text_20_body" style:list-style-name="L2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7" style:family="paragraph" style:parent-style-name="Text_20_body" style:list-style-name="L2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78" style:family="paragraph" style:parent-style-name="Text_20_body" style:list-style-name="L26">
      <style:paragraph-properties>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79" style:family="paragraph" style:parent-style-name="Text_20_body" style:list-style-name="L2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0" style:family="paragraph" style:parent-style-name="Text_20_body" style:list-style-name="L2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1" style:family="paragraph" style:parent-style-name="Text_20_body" style:list-style-name="L2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2" style:family="paragraph" style:parent-style-name="Text_20_body" style:list-style-name="L2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3" style:family="paragraph" style:parent-style-name="Text_20_body" style:list-style-name="L2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4" style:family="paragraph" style:parent-style-name="Text_20_body" style:list-style-name="L2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5" style:family="paragraph" style:parent-style-name="Text_20_body" style:list-style-name="L3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6" style:family="paragraph" style:parent-style-name="Text_20_body" style:list-style-name="L3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7" style:family="paragraph" style:parent-style-name="Text_20_body" style:list-style-name="L3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8" style:family="paragraph" style:parent-style-name="Text_20_body" style:list-style-name="L3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9" style:family="paragraph" style:parent-style-name="Text_20_body" style:list-style-name="L3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0" style:family="paragraph" style:parent-style-name="Text_20_body" style:list-style-name="L3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1" style:family="paragraph" style:parent-style-name="Text_20_body" style:list-style-name="L3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2" style:family="paragraph" style:parent-style-name="Text_20_body" style:list-style-name="L3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3" style:family="paragraph" style:parent-style-name="Text_20_body" style:list-style-name="L3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4" style:family="paragraph" style:parent-style-name="Text_20_body" style:list-style-name="L3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5" style:family="paragraph" style:parent-style-name="Text_20_body" style:list-style-name="L3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6" style:family="paragraph" style:parent-style-name="Text_20_body" style:list-style-name="L3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7" style:family="paragraph" style:parent-style-name="Text_20_body" style:list-style-name="L3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8" style:family="paragraph" style:parent-style-name="Text_20_body" style:list-style-name="L3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9" style:family="paragraph" style:parent-style-name="Text_20_body" style:list-style-name="L3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00" style:family="paragraph" style:parent-style-name="Text_20_body" style:list-style-name="L3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01" style:family="paragraph" style:parent-style-name="Text_20_body" style:list-style-name="L3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02" style:family="paragraph" style:parent-style-name="Text_20_body" style:list-style-name="L3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03" style:family="paragraph" style:parent-style-name="Text_20_body" style:list-style-name="L3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04" style:family="paragraph" style:parent-style-name="Text_20_body" style:list-style-name="L3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05" style:family="paragraph" style:parent-style-name="Text_20_body" style:list-style-name="L4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06" style:family="paragraph" style:parent-style-name="Text_20_body" style:list-style-name="L4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07" style:family="paragraph" style:parent-style-name="Text_20_body" style:list-style-name="L4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08" style:family="paragraph" style:parent-style-name="Text_20_body" style:list-style-name="L4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09" style:family="paragraph" style:parent-style-name="Text_20_body" style:list-style-name="L4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10" style:family="paragraph" style:parent-style-name="Text_20_body" style:list-style-name="L4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11" style:family="paragraph" style:parent-style-name="Text_20_body" style:list-style-name="L4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12" style:family="paragraph" style:parent-style-name="Text_20_body" style:list-style-name="L4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13" style:family="paragraph" style:parent-style-name="Heading_20_1">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2pt" fo:font-weight="bold" officeooo:rsid="000372ca" style:font-size-asian="12pt" style:font-weight-asian="bold" style:font-size-complex="12pt" style:font-weight-complex="bold"/>
    </style:style>
    <style:style style:name="P114" style:family="paragraph" style:parent-style-name="Text_20_body">
      <style:paragraph-properties>
        <style:tab-stops>
          <style:tab-stop style:position="8.5cm" style:type="center"/>
          <style:tab-stop style:position="17cm" style:type="right"/>
        </style:tab-stops>
      </style:paragraph-properties>
    </style:style>
    <style:style style:name="P115" style:family="paragraph" style:parent-style-name="Text_20_body" style:list-style-name="L4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16" style:family="paragraph" style:parent-style-name="Text_20_body" style:list-style-name="L4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17" style:family="paragraph" style:parent-style-name="Text_20_body" style:list-style-name="L4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18" style:family="paragraph" style:parent-style-name="Text_20_body" style:list-style-name="L4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19" style:family="paragraph" style:parent-style-name="Heading_20_1">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5pt" fo:font-weight="bold" officeooo:rsid="000372ca" style:font-size-asian="15pt" style:font-weight-asian="bold" style:font-size-complex="15pt" style:font-weight-complex="bold"/>
    </style:style>
    <style:style style:name="P120" style:family="paragraph" style:parent-style-name="Text_20_body">
      <style:paragraph-properties>
        <style:tab-stops>
          <style:tab-stop style:position="8.5cm" style:type="center"/>
          <style:tab-stop style:position="17cm" style:type="right"/>
        </style:tab-stops>
      </style:paragraph-properties>
      <style:text-properties style:font-name="Times New Roman" fo:font-weight="bold" officeooo:rsid="000372ca" style:font-size-asian="12pt" style:font-weight-asian="bold" style:font-weight-complex="bold"/>
    </style:style>
    <style:style style:name="P121" style:family="paragraph" style:parent-style-name="Text_20_body" style:list-style-name="L4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22" style:family="paragraph" style:parent-style-name="Text_20_body" style:list-style-name="L4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23" style:family="paragraph" style:parent-style-name="Text_20_body" style:list-style-name="L4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24" style:family="paragraph" style:parent-style-name="Text_20_body" style:list-style-name="L4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25" style:family="paragraph" style:parent-style-name="Text_20_body" style:list-style-name="L4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26" style:family="paragraph" style:parent-style-name="Text_20_body" style:list-style-name="L4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27" style:family="paragraph" style:parent-style-name="Text_20_body" style:list-style-name="L4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28" style:family="paragraph" style:parent-style-name="Text_20_body" style:list-style-name="L4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29" style:family="paragraph" style:parent-style-name="Text_20_body" style:list-style-name="L5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30" style:family="paragraph" style:parent-style-name="Text_20_body" style:list-style-name="L5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31" style:family="paragraph" style:parent-style-name="Text_20_body" style:list-style-name="L5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32" style:family="paragraph" style:parent-style-name="Text_20_body" style:list-style-name="L5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33" style:family="paragraph" style:parent-style-name="Text_20_body" style:list-style-name="L5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34" style:family="paragraph" style:parent-style-name="Text_20_body" style:list-style-name="L5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35" style:family="paragraph" style:parent-style-name="Text_20_body" style:list-style-name="L5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36" style:family="paragraph" style:parent-style-name="Text_20_body" style:list-style-name="L5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37" style:family="paragraph" style:parent-style-name="Text_20_body" style:list-style-name="L5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38" style:family="paragraph" style:parent-style-name="Text_20_body" style:list-style-name="L5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39" style:family="paragraph" style:parent-style-name="Text_20_body" style:list-style-name="L5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40" style:family="paragraph" style:parent-style-name="Text_20_body" style:list-style-name="L5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41" style:family="paragraph" style:parent-style-name="Heading_20_2">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2pt" fo:font-weight="normal" officeooo:rsid="000372ca" style:font-size-asian="12pt" style:font-weight-asian="normal" style:font-size-complex="12pt" style:font-weight-complex="normal"/>
    </style:style>
    <style:style style:name="P142" style:family="paragraph" style:parent-style-name="Text_20_body" style:list-style-name="L5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43" style:family="paragraph" style:parent-style-name="Text_20_body" style:list-style-name="L5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44" style:family="paragraph" style:parent-style-name="Text_20_body" style:list-style-name="L5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45" style:family="paragraph" style:parent-style-name="Text_20_body" style:list-style-name="L5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46" style:family="paragraph" style:parent-style-name="Text_20_body" style:list-style-name="L5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47" style:family="paragraph" style:parent-style-name="Text_20_body" style:list-style-name="L5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48" style:family="paragraph" style:parent-style-name="Text_20_body" style:list-style-name="L5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49" style:family="paragraph" style:parent-style-name="Text_20_body" style:list-style-name="L5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50" style:family="paragraph" style:parent-style-name="Text_20_body" style:list-style-name="L6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51" style:family="paragraph" style:parent-style-name="Text_20_body" style:list-style-name="L6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52" style:family="paragraph" style:parent-style-name="Text_20_body" style:list-style-name="L6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53" style:family="paragraph" style:parent-style-name="Text_20_body" style:list-style-name="L6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54" style:family="paragraph" style:parent-style-name="Text_20_body" style:list-style-name="L6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55" style:family="paragraph" style:parent-style-name="Text_20_body" style:list-style-name="L6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56" style:family="paragraph" style:parent-style-name="Text_20_body" style:list-style-name="L6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57" style:family="paragraph" style:parent-style-name="Text_20_body" style:list-style-name="L6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58" style:family="paragraph" style:parent-style-name="Heading_20_3">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2pt" fo:font-weight="bold" officeooo:rsid="000372ca" style:font-size-asian="12pt" style:font-weight-asian="bold" style:font-size-complex="12pt" style:font-weight-complex="bold"/>
    </style:style>
    <style:style style:name="P159" style:family="paragraph" style:parent-style-name="Text_20_body" style:list-style-name="L6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60" style:family="paragraph" style:parent-style-name="Text_20_body" style:list-style-name="L6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61" style:family="paragraph" style:parent-style-name="Text_20_body" style:list-style-name="L6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62" style:family="paragraph" style:parent-style-name="Text_20_body" style:list-style-name="L6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63" style:family="paragraph" style:parent-style-name="Text_20_body" style:list-style-name="L6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64" style:family="paragraph" style:parent-style-name="Text_20_body" style:list-style-name="L6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65" style:family="paragraph" style:parent-style-name="Heading_20_1">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2pt" fo:font-weight="normal" officeooo:rsid="000372ca" style:font-size-asian="12pt" style:font-weight-asian="normal" style:font-size-complex="12pt" style:font-weight-complex="normal"/>
    </style:style>
    <style:style style:name="P166" style:family="paragraph" style:parent-style-name="Text_20_body" style:list-style-name="L6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67" style:family="paragraph" style:parent-style-name="Text_20_body" style:list-style-name="L6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68" style:family="paragraph" style:parent-style-name="Text_20_body" style:list-style-name="L6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69" style:family="paragraph" style:parent-style-name="Text_20_body" style:list-style-name="L6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70" style:family="paragraph" style:parent-style-name="Text_20_body" style:list-style-name="L6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71" style:family="paragraph" style:parent-style-name="Text_20_body" style:list-style-name="L6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72" style:family="paragraph" style:parent-style-name="Text_20_body" style:list-style-name="L7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73" style:family="paragraph" style:parent-style-name="Text_20_body" style:list-style-name="L7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74" style:family="paragraph" style:parent-style-name="Text_20_body" style:list-style-name="L7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75" style:family="paragraph" style:parent-style-name="Text_20_body" style:list-style-name="L7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76" style:family="paragraph" style:parent-style-name="Text_20_body" style:list-style-name="L7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77" style:family="paragraph" style:parent-style-name="Text_20_body" style:list-style-name="L7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78" style:family="paragraph" style:parent-style-name="Text_20_body" style:list-style-name="L7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79" style:family="paragraph" style:parent-style-name="Text_20_body" style:list-style-name="L7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180" style:family="paragraph" style:parent-style-name="Text_20_body" style:list-style-name="L7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81" style:family="paragraph" style:parent-style-name="Text_20_body" style:list-style-name="L7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82" style:family="paragraph" style:parent-style-name="Text_20_body" style:list-style-name="L7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83" style:family="paragraph" style:parent-style-name="Text_20_body" style:list-style-name="L7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84" style:family="paragraph" style:parent-style-name="Text_20_body" style:list-style-name="L7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85" style:family="paragraph" style:parent-style-name="Text_20_body" style:list-style-name="L7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86" style:family="paragraph" style:parent-style-name="Text_20_body" style:list-style-name="L7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87" style:family="paragraph" style:parent-style-name="Text_20_body" style:list-style-name="L7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88" style:family="paragraph" style:parent-style-name="Text_20_body" style:list-style-name="L7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89" style:family="paragraph" style:parent-style-name="Text_20_body" style:list-style-name="L7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90" style:family="paragraph" style:parent-style-name="Text_20_body" style:list-style-name="L7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91" style:family="paragraph" style:parent-style-name="Text_20_body" style:list-style-name="L7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92" style:family="paragraph" style:parent-style-name="Text_20_body" style:list-style-name="L7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93" style:family="paragraph" style:parent-style-name="Text_20_body" style:list-style-name="L8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94" style:family="paragraph" style:parent-style-name="Text_20_body" style:list-style-name="L8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95" style:family="paragraph" style:parent-style-name="Text_20_body" style:list-style-name="L8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96" style:family="paragraph" style:parent-style-name="Text_20_body" style:list-style-name="L8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97" style:family="paragraph" style:parent-style-name="Text_20_body" style:list-style-name="L8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198" style:family="paragraph" style:parent-style-name="Text_20_body" style:list-style-name="L8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199" style:family="paragraph" style:parent-style-name="Text_20_body" style:list-style-name="L8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00" style:family="paragraph" style:parent-style-name="Text_20_body" style:list-style-name="L8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01" style:family="paragraph" style:parent-style-name="Text_20_body" style:list-style-name="L8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02" style:family="paragraph" style:parent-style-name="Text_20_body" style:list-style-name="L8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03" style:family="paragraph" style:parent-style-name="Text_20_body" style:list-style-name="L8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04" style:family="paragraph" style:parent-style-name="Text_20_body" style:list-style-name="L8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05" style:family="paragraph" style:parent-style-name="Text_20_body" style:list-style-name="L8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06" style:family="paragraph" style:parent-style-name="Text_20_body" style:list-style-name="L86">
      <style:paragraph-properties>
        <style:tab-stops>
          <style:tab-stop style:position="8.5cm" style:type="center"/>
          <style:tab-stop style:position="17cm" style:type="right"/>
        </style:tab-stops>
      </style:paragraph-properties>
      <style:text-properties style:font-name="Times New Roman" fo:font-weight="bold" officeooo:rsid="000372ca" style:font-size-asian="12pt" style:font-weight-asian="bold" style:font-weight-complex="bold"/>
    </style:style>
    <style:style style:name="P207" style:family="paragraph" style:parent-style-name="Text_20_body" style:list-style-name="L8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08" style:family="paragraph" style:parent-style-name="Text_20_body" style:list-style-name="L8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09" style:family="paragraph" style:parent-style-name="Text_20_body" style:list-style-name="L8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10" style:family="paragraph" style:parent-style-name="Text_20_body" style:list-style-name="L8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11" style:family="paragraph" style:parent-style-name="Text_20_body" style:list-style-name="L8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12" style:family="paragraph" style:parent-style-name="Text_20_body" style:list-style-name="L8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13" style:family="paragraph" style:parent-style-name="Text_20_body" style:list-style-name="L9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14" style:family="paragraph" style:parent-style-name="Text_20_body" style:list-style-name="L9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15" style:family="paragraph" style:parent-style-name="Text_20_body" style:list-style-name="L9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16" style:family="paragraph" style:parent-style-name="Text_20_body" style:list-style-name="L9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17" style:family="paragraph" style:parent-style-name="Horizontal_20_Line">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218" style:family="paragraph" style:parent-style-name="Text_20_body" style:list-style-name="L9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19" style:family="paragraph" style:parent-style-name="Text_20_body" style:list-style-name="L9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20" style:family="paragraph" style:parent-style-name="Text_20_body" style:list-style-name="L9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21" style:family="paragraph" style:parent-style-name="Text_20_body" style:list-style-name="L9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22" style:family="paragraph" style:parent-style-name="Text_20_body" style:list-style-name="L9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23" style:family="paragraph" style:parent-style-name="Text_20_body" style:list-style-name="L9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24" style:family="paragraph" style:parent-style-name="Text_20_body" style:list-style-name="L9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25" style:family="paragraph" style:parent-style-name="Text_20_body" style:list-style-name="L9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26" style:family="paragraph" style:parent-style-name="Text_20_body" style:list-style-name="L9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27" style:family="paragraph" style:parent-style-name="Text_20_body" style:list-style-name="L9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28" style:family="paragraph" style:parent-style-name="Text_20_body" style:list-style-name="L9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29" style:family="paragraph" style:parent-style-name="Text_20_body" style:list-style-name="L9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30" style:family="paragraph" style:parent-style-name="Text_20_body" style:list-style-name="L9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31" style:family="paragraph" style:parent-style-name="Text_20_body" style:list-style-name="L9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32" style:family="paragraph" style:parent-style-name="Text_20_body" style:list-style-name="L9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33" style:family="paragraph" style:parent-style-name="Text_20_body" style:list-style-name="L9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34" style:family="paragraph" style:parent-style-name="Text_20_body" style:list-style-name="L10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35" style:family="paragraph" style:parent-style-name="Text_20_body" style:list-style-name="L10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36" style:family="paragraph" style:parent-style-name="Text_20_body" style:list-style-name="L10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37" style:family="paragraph" style:parent-style-name="Text_20_body" style:list-style-name="L10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38" style:family="paragraph" style:parent-style-name="Text_20_body" style:list-style-name="L10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39" style:family="paragraph" style:parent-style-name="Text_20_body" style:list-style-name="L10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40" style:family="paragraph" style:parent-style-name="Text_20_body" style:list-style-name="L10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41" style:family="paragraph" style:parent-style-name="Text_20_body" style:list-style-name="L10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42" style:family="paragraph" style:parent-style-name="Text_20_body" style:list-style-name="L10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43" style:family="paragraph" style:parent-style-name="Text_20_body" style:list-style-name="L10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44" style:family="paragraph" style:parent-style-name="Text_20_body" style:list-style-name="L10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45" style:family="paragraph" style:parent-style-name="Text_20_body" style:list-style-name="L10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46" style:family="paragraph" style:parent-style-name="Text_20_body" style:list-style-name="L10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47" style:family="paragraph" style:parent-style-name="Text_20_body" style:list-style-name="L10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48" style:family="paragraph" style:parent-style-name="Text_20_body" style:list-style-name="L10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49" style:family="paragraph" style:parent-style-name="Text_20_body" style:list-style-name="L10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50" style:family="paragraph" style:parent-style-name="Text_20_body" style:list-style-name="L10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51" style:family="paragraph" style:parent-style-name="Text_20_body" style:list-style-name="L10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52" style:family="paragraph" style:parent-style-name="Text_20_body" style:list-style-name="L10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53" style:family="paragraph" style:parent-style-name="Text_20_body" style:list-style-name="L10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54" style:family="paragraph" style:parent-style-name="Text_20_body" style:list-style-name="L11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55" style:family="paragraph" style:parent-style-name="Text_20_body" style:list-style-name="L11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56" style:family="paragraph" style:parent-style-name="Text_20_body" style:list-style-name="L11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57" style:family="paragraph" style:parent-style-name="Text_20_body" style:list-style-name="L11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58" style:family="paragraph" style:parent-style-name="Text_20_body" style:list-style-name="L11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59" style:family="paragraph" style:parent-style-name="Text_20_body" style:list-style-name="L11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60" style:family="paragraph" style:parent-style-name="Text_20_body" style:list-style-name="L11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61" style:family="paragraph" style:parent-style-name="Text_20_body" style:list-style-name="L11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62" style:family="paragraph" style:parent-style-name="Text_20_body" style:list-style-name="L11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63" style:family="paragraph" style:parent-style-name="Text_20_body" style:list-style-name="L11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64" style:family="paragraph" style:parent-style-name="Text_20_body" style:list-style-name="L11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65" style:family="paragraph" style:parent-style-name="Text_20_body" style:list-style-name="L11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66" style:family="paragraph" style:parent-style-name="Text_20_body" style:list-style-name="L11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67" style:family="paragraph" style:parent-style-name="Text_20_body" style:list-style-name="L11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68" style:family="paragraph" style:parent-style-name="Text_20_body" style:list-style-name="L11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69" style:family="paragraph" style:parent-style-name="Text_20_body" style:list-style-name="L11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70" style:family="paragraph" style:parent-style-name="Text_20_body" style:list-style-name="L11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71" style:family="paragraph" style:parent-style-name="Text_20_body" style:list-style-name="L11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72" style:family="paragraph" style:parent-style-name="Text_20_body" style:list-style-name="L11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73" style:family="paragraph" style:parent-style-name="Text_20_body" style:list-style-name="L11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74" style:family="paragraph" style:parent-style-name="Text_20_body" style:list-style-name="L12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75" style:family="paragraph" style:parent-style-name="Text_20_body" style:list-style-name="L12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76" style:family="paragraph" style:parent-style-name="Text_20_body" style:list-style-name="L12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77" style:family="paragraph" style:parent-style-name="Text_20_body" style:list-style-name="L12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78" style:family="paragraph" style:parent-style-name="Text_20_body" style:list-style-name="L12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279" style:family="paragraph" style:parent-style-name="Text_20_body" style:list-style-name="L12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280" style:family="paragraph" style:parent-style-name="Text_20_body">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281" style:family="paragraph" style:parent-style-name="Text_20_body" style:list-style-name="L12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282" style:family="paragraph" style:parent-style-name="Text_20_body" style:list-style-name="L123">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283" style:family="paragraph" style:parent-style-name="Text_20_body" style:list-style-name="L12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284" style:family="paragraph" style:parent-style-name="Text_20_body" style:list-style-name="L124">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285" style:family="paragraph" style:parent-style-name="Text_20_body" style:list-style-name="L12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286" style:family="paragraph" style:parent-style-name="Text_20_body" style:list-style-name="L125">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287" style:family="paragraph" style:parent-style-name="Text_20_body" style:list-style-name="L12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288" style:family="paragraph" style:parent-style-name="Text_20_body" style:list-style-name="L126">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289" style:family="paragraph" style:parent-style-name="Text_20_body" style:list-style-name="L12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290" style:family="paragraph" style:parent-style-name="Text_20_body" style:list-style-name="L127">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291" style:family="paragraph" style:parent-style-name="Text_20_body" style:list-style-name="L12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292" style:family="paragraph" style:parent-style-name="Text_20_body" style:list-style-name="L128">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293" style:family="paragraph" style:parent-style-name="Text_20_body" style:list-style-name="L12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294" style:family="paragraph" style:parent-style-name="Text_20_body" style:list-style-name="L129">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295" style:family="paragraph" style:parent-style-name="Text_20_body" style:list-style-name="L13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296" style:family="paragraph" style:parent-style-name="Text_20_body" style:list-style-name="L130">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297" style:family="paragraph" style:parent-style-name="Text_20_body" style:list-style-name="L13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298" style:family="paragraph" style:parent-style-name="Text_20_body" style:list-style-name="L131">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299" style:family="paragraph" style:parent-style-name="Heading_20_2">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4pt" fo:font-weight="normal" officeooo:rsid="000372ca" officeooo:paragraph-rsid="000c60a6" style:font-size-asian="14pt" style:font-weight-asian="normal" style:font-size-complex="14pt" style:font-weight-complex="normal"/>
    </style:style>
    <style:style style:name="P300" style:family="paragraph" style:parent-style-name="Heading_20_2">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2pt" fo:font-weight="normal" officeooo:rsid="000372ca" officeooo:paragraph-rsid="000c60a6" style:font-size-asian="12pt" style:font-weight-asian="normal" style:font-size-complex="12pt" style:font-weight-complex="normal"/>
    </style:style>
    <style:style style:name="P301" style:family="paragraph" style:parent-style-name="Text_20_body">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2pt" fo:font-weight="normal" officeooo:rsid="000372ca" style:font-size-asian="12pt" style:font-weight-asian="normal" style:font-size-complex="12pt" style:font-weight-complex="normal"/>
    </style:style>
    <style:style style:name="P302" style:family="paragraph" style:parent-style-name="Text_20_body" style:list-style-name="L13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03" style:family="paragraph" style:parent-style-name="Text_20_body" style:list-style-name="L132">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04" style:family="paragraph" style:parent-style-name="Text_20_body">
      <style:paragraph-properties>
        <style:tab-stops>
          <style:tab-stop style:position="8.5cm" style:type="center"/>
          <style:tab-stop style:position="17cm" style:type="right"/>
        </style:tab-stops>
      </style:paragraph-properties>
      <style:text-properties style:font-name="Times New Roman" fo:font-size="12pt" fo:font-weight="bold" officeooo:rsid="000372ca" style:font-size-asian="12pt" style:font-weight-asian="bold" style:font-size-complex="12pt" style:font-weight-complex="bold"/>
    </style:style>
    <style:style style:name="P305" style:family="paragraph" style:parent-style-name="Text_20_body" style:list-style-name="L13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06" style:family="paragraph" style:parent-style-name="Text_20_body" style:list-style-name="L133">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07" style:family="paragraph" style:parent-style-name="Text_20_body">
      <style:paragraph-properties>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308" style:family="paragraph" style:parent-style-name="Text_20_body" style:list-style-name="L13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09" style:family="paragraph" style:parent-style-name="Text_20_body" style:list-style-name="L134">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10" style:family="paragraph" style:parent-style-name="Text_20_body" style:list-style-name="L13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11" style:family="paragraph" style:parent-style-name="Text_20_body" style:list-style-name="L135">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12" style:family="paragraph" style:parent-style-name="Text_20_body" style:list-style-name="L13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13" style:family="paragraph" style:parent-style-name="Text_20_body" style:list-style-name="L136">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14" style:family="paragraph" style:parent-style-name="Text_20_body" style:list-style-name="L13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15" style:family="paragraph" style:parent-style-name="Text_20_body" style:list-style-name="L137">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16" style:family="paragraph" style:parent-style-name="Text_20_body" style:list-style-name="L13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17" style:family="paragraph" style:parent-style-name="Text_20_body" style:list-style-name="L138">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18" style:family="paragraph" style:parent-style-name="Text_20_body" style:list-style-name="L13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19" style:family="paragraph" style:parent-style-name="Text_20_body" style:list-style-name="L139">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20" style:family="paragraph" style:parent-style-name="Text_20_body" style:list-style-name="L14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fo:font-weight="normal" officeooo:rsid="000372ca" style:font-size-asian="12pt" style:font-weight-asian="normal" style:font-size-complex="12pt" style:font-weight-complex="normal"/>
    </style:style>
    <style:style style:name="P321" style:family="paragraph" style:parent-style-name="Text_20_body" style:list-style-name="L140">
      <style:paragraph-properties>
        <style:tab-stops>
          <style:tab-stop style:position="8.5cm" style:type="center"/>
          <style:tab-stop style:position="17cm" style:type="right"/>
        </style:tab-stops>
      </style:paragraph-properties>
      <style:text-properties style:font-name="Times New Roman" fo:font-size="12pt" fo:font-weight="normal" officeooo:rsid="000372ca" style:font-size-asian="12pt" style:font-weight-asian="normal" style:font-size-complex="12pt" style:font-weight-complex="normal"/>
    </style:style>
    <style:style style:name="P322" style:family="paragraph" style:parent-style-name="Text_20_body" style:list-style-name="L14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fo:font-weight="normal" officeooo:rsid="000372ca" style:font-size-asian="12pt" style:font-weight-asian="normal" style:font-size-complex="12pt" style:font-weight-complex="normal"/>
    </style:style>
    <style:style style:name="P323" style:family="paragraph" style:parent-style-name="Text_20_body" style:list-style-name="L141">
      <style:paragraph-properties>
        <style:tab-stops>
          <style:tab-stop style:position="8.5cm" style:type="center"/>
          <style:tab-stop style:position="17cm" style:type="right"/>
        </style:tab-stops>
      </style:paragraph-properties>
      <style:text-properties style:font-name="Times New Roman" fo:font-size="12pt" fo:font-weight="normal" officeooo:rsid="000372ca" style:font-size-asian="12pt" style:font-weight-asian="normal" style:font-size-complex="12pt" style:font-weight-complex="normal"/>
    </style:style>
    <style:style style:name="P324" style:family="paragraph" style:parent-style-name="Text_20_body">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325" style:family="paragraph" style:parent-style-name="Text_20_body" style:list-style-name="L14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fo:font-weight="normal" officeooo:rsid="000372ca" style:font-size-asian="12pt" style:font-weight-asian="normal" style:font-size-complex="12pt" style:font-weight-complex="normal"/>
    </style:style>
    <style:style style:name="P326" style:family="paragraph" style:parent-style-name="Text_20_body" style:list-style-name="L142">
      <style:paragraph-properties>
        <style:tab-stops>
          <style:tab-stop style:position="8.5cm" style:type="center"/>
          <style:tab-stop style:position="17cm" style:type="right"/>
        </style:tab-stops>
      </style:paragraph-properties>
      <style:text-properties style:font-name="Times New Roman" fo:font-size="12pt" fo:font-weight="normal" officeooo:rsid="000372ca" style:font-size-asian="12pt" style:font-weight-asian="normal" style:font-size-complex="12pt" style:font-weight-complex="normal"/>
    </style:style>
    <style:style style:name="P327" style:family="paragraph" style:parent-style-name="Text_20_body" style:list-style-name="L14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fo:font-weight="normal" officeooo:rsid="000372ca" style:font-size-asian="12pt" style:font-weight-asian="normal" style:font-size-complex="12pt" style:font-weight-complex="normal"/>
    </style:style>
    <style:style style:name="P328" style:family="paragraph" style:parent-style-name="Text_20_body" style:list-style-name="L143">
      <style:paragraph-properties>
        <style:tab-stops>
          <style:tab-stop style:position="8.5cm" style:type="center"/>
          <style:tab-stop style:position="17cm" style:type="right"/>
        </style:tab-stops>
      </style:paragraph-properties>
      <style:text-properties style:font-name="Times New Roman" fo:font-size="12pt" fo:font-weight="normal" officeooo:rsid="000372ca" style:font-size-asian="12pt" style:font-weight-asian="normal" style:font-size-complex="12pt" style:font-weight-complex="normal"/>
    </style:style>
    <style:style style:name="P329" style:family="paragraph" style:parent-style-name="Text_20_body" style:list-style-name="L14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330" style:family="paragraph" style:parent-style-name="Text_20_body" style:list-style-name="L144">
      <style:paragraph-properties>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331" style:family="paragraph" style:parent-style-name="Text_20_body" style:list-style-name="L14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32" style:family="paragraph" style:parent-style-name="Text_20_body" style:list-style-name="L145">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33" style:family="paragraph" style:parent-style-name="Text_20_body" style:list-style-name="L14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334" style:family="paragraph" style:parent-style-name="Text_20_body" style:list-style-name="L146">
      <style:paragraph-properties>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335" style:family="paragraph" style:parent-style-name="Text_20_body" style:list-style-name="L14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336" style:family="paragraph" style:parent-style-name="Text_20_body" style:list-style-name="L147">
      <style:paragraph-properties>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337" style:family="paragraph" style:parent-style-name="Text_20_body" style:list-style-name="L14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338" style:family="paragraph" style:parent-style-name="Text_20_body" style:list-style-name="L148">
      <style:paragraph-properties>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339" style:family="paragraph" style:parent-style-name="Text_20_body" style:list-style-name="L14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40" style:family="paragraph" style:parent-style-name="Text_20_body" style:list-style-name="L149">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41" style:family="paragraph" style:parent-style-name="Text_20_body" style:list-style-name="L15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fo:font-weight="normal" officeooo:rsid="000372ca" style:font-size-asian="12pt" style:font-weight-asian="normal" style:font-size-complex="12pt" style:font-weight-complex="normal"/>
    </style:style>
    <style:style style:name="P342" style:family="paragraph" style:parent-style-name="Text_20_body" style:list-style-name="L150">
      <style:paragraph-properties>
        <style:tab-stops>
          <style:tab-stop style:position="8.5cm" style:type="center"/>
          <style:tab-stop style:position="17cm" style:type="right"/>
        </style:tab-stops>
      </style:paragraph-properties>
      <style:text-properties style:font-name="Times New Roman" fo:font-size="12pt" fo:font-weight="normal" officeooo:rsid="000372ca" style:font-size-asian="12pt" style:font-weight-asian="normal" style:font-size-complex="12pt" style:font-weight-complex="normal"/>
    </style:style>
    <style:style style:name="P343" style:family="paragraph" style:parent-style-name="Text_20_body" style:list-style-name="L15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344" style:family="paragraph" style:parent-style-name="Text_20_body" style:list-style-name="L151">
      <style:paragraph-properties>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345" style:family="paragraph" style:parent-style-name="Text_20_body" style:list-style-name="L15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4pt" fo:font-weight="normal" officeooo:rsid="000372ca" style:font-size-asian="14pt" style:font-weight-asian="normal" style:font-size-complex="14pt" style:font-weight-complex="normal"/>
    </style:style>
    <style:style style:name="P346" style:family="paragraph" style:parent-style-name="Text_20_body" style:list-style-name="L152">
      <style:paragraph-properties>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347" style:family="paragraph" style:parent-style-name="Text_20_body" style:list-style-name="L15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48" style:family="paragraph" style:parent-style-name="Text_20_body" style:list-style-name="L153">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49" style:family="paragraph" style:parent-style-name="Text_20_body" style:list-style-name="L15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50" style:family="paragraph" style:parent-style-name="Text_20_body" style:list-style-name="L154">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51" style:family="paragraph" style:parent-style-name="Text_20_body" style:list-style-name="L15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52" style:family="paragraph" style:parent-style-name="Text_20_body" style:list-style-name="L155">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53" style:family="paragraph" style:parent-style-name="Text_20_body" style:list-style-name="L15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54" style:family="paragraph" style:parent-style-name="Text_20_body" style:list-style-name="L156">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55" style:family="paragraph" style:parent-style-name="Text_20_body" style:list-style-name="L15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56" style:family="paragraph" style:parent-style-name="Text_20_body" style:list-style-name="L157">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57" style:family="paragraph" style:parent-style-name="Text_20_body" style:list-style-name="L15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58" style:family="paragraph" style:parent-style-name="Text_20_body" style:list-style-name="L158">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59" style:family="paragraph" style:parent-style-name="Text_20_body" style:list-style-name="L15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60" style:family="paragraph" style:parent-style-name="Text_20_body" style:list-style-name="L159">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61" style:family="paragraph" style:parent-style-name="Text_20_body" style:list-style-name="L16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62" style:family="paragraph" style:parent-style-name="Text_20_body" style:list-style-name="L160">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63" style:family="paragraph" style:parent-style-name="Text_20_body" style:list-style-name="L16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fo:font-weight="normal" officeooo:rsid="000372ca" style:font-size-asian="12pt" style:font-weight-asian="normal" style:font-size-complex="12pt" style:font-weight-complex="normal"/>
    </style:style>
    <style:style style:name="P364" style:family="paragraph" style:parent-style-name="Text_20_body" style:list-style-name="L161">
      <style:paragraph-properties>
        <style:tab-stops>
          <style:tab-stop style:position="8.5cm" style:type="center"/>
          <style:tab-stop style:position="17cm" style:type="right"/>
        </style:tab-stops>
      </style:paragraph-properties>
      <style:text-properties style:font-name="Times New Roman" fo:font-size="12pt" fo:font-weight="normal" officeooo:rsid="000372ca" style:font-size-asian="12pt" style:font-weight-asian="normal" style:font-size-complex="12pt" style:font-weight-complex="normal"/>
    </style:style>
    <style:style style:name="P365" style:family="paragraph" style:parent-style-name="Text_20_body" style:list-style-name="L16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66" style:family="paragraph" style:parent-style-name="Text_20_body" style:list-style-name="L162">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67" style:family="paragraph" style:parent-style-name="Text_20_body">
      <style:paragraph-properties fo:break-before="page">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368" style:family="paragraph" style:parent-style-name="Text_20_body" style:list-style-name="L16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69" style:family="paragraph" style:parent-style-name="Text_20_body" style:list-style-name="L163">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70" style:family="paragraph" style:parent-style-name="Text_20_body" style:list-style-name="L16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71" style:family="paragraph" style:parent-style-name="Text_20_body" style:list-style-name="L164">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72" style:family="paragraph" style:parent-style-name="Text_20_body" style:list-style-name="L16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73" style:family="paragraph" style:parent-style-name="Text_20_body" style:list-style-name="L165">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74" style:family="paragraph" style:parent-style-name="Text_20_body" style:list-style-name="L16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75" style:family="paragraph" style:parent-style-name="Text_20_body" style:list-style-name="L166">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76" style:family="paragraph" style:parent-style-name="Text_20_body" style:list-style-name="L16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77" style:family="paragraph" style:parent-style-name="Text_20_body" style:list-style-name="L167">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78" style:family="paragraph" style:parent-style-name="Text_20_body" style:list-style-name="L16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379" style:family="paragraph" style:parent-style-name="Text_20_body" style:list-style-name="L168">
      <style:paragraph-properties>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380" style:family="paragraph" style:parent-style-name="Text_20_body" style:list-style-name="L16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81" style:family="paragraph" style:parent-style-name="Text_20_body" style:list-style-name="L169">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82" style:family="paragraph" style:parent-style-name="Text_20_body" style:list-style-name="L17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83" style:family="paragraph" style:parent-style-name="Text_20_body" style:list-style-name="L170">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84" style:family="paragraph" style:parent-style-name="Text_20_body" style:list-style-name="L17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85" style:family="paragraph" style:parent-style-name="Text_20_body" style:list-style-name="L171">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86" style:family="paragraph" style:parent-style-name="Text_20_body" style:list-style-name="L17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87" style:family="paragraph" style:parent-style-name="Text_20_body" style:list-style-name="L172">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88" style:family="paragraph" style:parent-style-name="Text_20_body" style:list-style-name="L17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89" style:family="paragraph" style:parent-style-name="Text_20_body" style:list-style-name="L173">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90" style:family="paragraph" style:parent-style-name="Text_20_body" style:list-style-name="L17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91" style:family="paragraph" style:parent-style-name="Text_20_body" style:list-style-name="L174">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92" style:family="paragraph" style:parent-style-name="Text_20_body" style:list-style-name="L17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393" style:family="paragraph" style:parent-style-name="Text_20_body" style:list-style-name="L175">
      <style:paragraph-properties>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394" style:family="paragraph" style:parent-style-name="Text_20_body" style:list-style-name="L17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395" style:family="paragraph" style:parent-style-name="Text_20_body" style:list-style-name="L176">
      <style:paragraph-properties>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396" style:family="paragraph" style:parent-style-name="Text_20_body" style:list-style-name="L17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97" style:family="paragraph" style:parent-style-name="Text_20_body" style:list-style-name="L177">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98" style:family="paragraph" style:parent-style-name="Text_20_body" style:list-style-name="L17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399" style:family="paragraph" style:parent-style-name="Text_20_body" style:list-style-name="L178">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00" style:family="paragraph" style:parent-style-name="Text_20_body" style:list-style-name="L17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01" style:family="paragraph" style:parent-style-name="Text_20_body" style:list-style-name="L179">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02" style:family="paragraph" style:parent-style-name="Text_20_body" style:list-style-name="L18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03" style:family="paragraph" style:parent-style-name="Text_20_body" style:list-style-name="L180">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04" style:family="paragraph" style:parent-style-name="Text_20_body" style:list-style-name="L18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05" style:family="paragraph" style:parent-style-name="Text_20_body" style:list-style-name="L181">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06" style:family="paragraph" style:parent-style-name="Text_20_body" style:list-style-name="L18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07" style:family="paragraph" style:parent-style-name="Text_20_body" style:list-style-name="L182">
      <style:paragraph-properties>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408" style:family="paragraph" style:parent-style-name="Text_20_body" style:list-style-name="L18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09" style:family="paragraph" style:parent-style-name="Text_20_body" style:list-style-name="L18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410" style:family="paragraph" style:parent-style-name="Text_20_body" style:list-style-name="L183">
      <style:paragraph-properties>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411" style:family="paragraph" style:parent-style-name="Text_20_body" style:list-style-name="L18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12" style:family="paragraph" style:parent-style-name="Text_20_body" style:list-style-name="L184">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13" style:family="paragraph" style:parent-style-name="Text_20_body" style:list-style-name="L18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14" style:family="paragraph" style:parent-style-name="Text_20_body" style:list-style-name="L185">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15" style:family="paragraph" style:parent-style-name="Text_20_body" style:list-style-name="L18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16" style:family="paragraph" style:parent-style-name="Text_20_body" style:list-style-name="L18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417" style:family="paragraph" style:parent-style-name="Text_20_body" style:list-style-name="L186">
      <style:paragraph-properties>
        <style:tab-stops>
          <style:tab-stop style:position="8.5cm" style:type="center"/>
          <style:tab-stop style:position="17cm" style:type="right"/>
        </style:tab-stops>
      </style:paragraph-properties>
      <style:text-properties style:font-name="Times New Roman" fo:font-size="14pt" officeooo:rsid="000372ca" style:font-size-asian="14pt" style:font-size-complex="14pt"/>
    </style:style>
    <style:style style:name="P418" style:family="paragraph" style:parent-style-name="Text_20_body" style:list-style-name="L18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19" style:family="paragraph" style:parent-style-name="Text_20_body" style:list-style-name="L187">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20" style:family="paragraph" style:parent-style-name="Text_20_body" style:list-style-name="L18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21" style:family="paragraph" style:parent-style-name="Text_20_body" style:list-style-name="L188">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22" style:family="paragraph" style:parent-style-name="Text_20_body" style:list-style-name="L18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23" style:family="paragraph" style:parent-style-name="Text_20_body" style:list-style-name="L189">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24" style:family="paragraph" style:parent-style-name="Text_20_body" style:list-style-name="L19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25" style:family="paragraph" style:parent-style-name="Text_20_body" style:list-style-name="L190">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26" style:family="paragraph" style:parent-style-name="Text_20_body" style:list-style-name="L19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27" style:family="paragraph" style:parent-style-name="Text_20_body" style:list-style-name="L191">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28" style:family="paragraph" style:parent-style-name="Text_20_body" style:list-style-name="L19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29" style:family="paragraph" style:parent-style-name="Text_20_body" style:list-style-name="L192">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30" style:family="paragraph" style:parent-style-name="Text_20_body" style:list-style-name="L19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31" style:family="paragraph" style:parent-style-name="Text_20_body" style:list-style-name="L193">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32" style:family="paragraph" style:parent-style-name="Text_20_body" style:list-style-name="L19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33" style:family="paragraph" style:parent-style-name="Text_20_body" style:list-style-name="L194">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34" style:family="paragraph" style:parent-style-name="Text_20_body" style:list-style-name="L19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35" style:family="paragraph" style:parent-style-name="Text_20_body" style:list-style-name="L195">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36" style:family="paragraph" style:parent-style-name="Text_20_body" style:list-style-name="L19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37" style:family="paragraph" style:parent-style-name="Text_20_body" style:list-style-name="L196">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38" style:family="paragraph" style:parent-style-name="Text_20_body" style:list-style-name="L19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39" style:family="paragraph" style:parent-style-name="Text_20_body" style:list-style-name="L197">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40" style:family="paragraph" style:parent-style-name="Text_20_body" style:list-style-name="L19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41" style:family="paragraph" style:parent-style-name="Text_20_body" style:list-style-name="L198">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42" style:family="paragraph" style:parent-style-name="Text_20_body" style:list-style-name="L19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43" style:family="paragraph" style:parent-style-name="Text_20_body" style:list-style-name="L199">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44" style:family="paragraph" style:parent-style-name="Text_20_body" style:list-style-name="L20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45" style:family="paragraph" style:parent-style-name="Text_20_body" style:list-style-name="L200">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46" style:family="paragraph" style:parent-style-name="Text_20_body" style:list-style-name="L20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47" style:family="paragraph" style:parent-style-name="Text_20_body" style:list-style-name="L201">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48" style:family="paragraph" style:parent-style-name="Text_20_body" style:list-style-name="L20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49" style:family="paragraph" style:parent-style-name="Text_20_body" style:list-style-name="L202">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50" style:family="paragraph" style:parent-style-name="Text_20_body" style:list-style-name="L20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51" style:family="paragraph" style:parent-style-name="Text_20_body" style:list-style-name="L203">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52" style:family="paragraph" style:parent-style-name="Text_20_body" style:list-style-name="L20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53" style:family="paragraph" style:parent-style-name="Text_20_body" style:list-style-name="L204">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54" style:family="paragraph" style:parent-style-name="Text_20_body" style:list-style-name="L20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55" style:family="paragraph" style:parent-style-name="Text_20_body" style:list-style-name="L205">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56" style:family="paragraph" style:parent-style-name="Text_20_body" style:list-style-name="L20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57" style:family="paragraph" style:parent-style-name="Text_20_body" style:list-style-name="L206">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58" style:family="paragraph" style:parent-style-name="Text_20_body" style:list-style-name="L20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59" style:family="paragraph" style:parent-style-name="Text_20_body" style:list-style-name="L207">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60" style:family="paragraph" style:parent-style-name="Text_20_body" style:list-style-name="L20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61" style:family="paragraph" style:parent-style-name="Text_20_body" style:list-style-name="L208">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62" style:family="paragraph" style:parent-style-name="Text_20_body" style:list-style-name="L20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63" style:family="paragraph" style:parent-style-name="Text_20_body" style:list-style-name="L209">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64" style:family="paragraph" style:parent-style-name="Text_20_body" style:list-style-name="L21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65" style:family="paragraph" style:parent-style-name="Text_20_body" style:list-style-name="L210">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66" style:family="paragraph" style:parent-style-name="Text_20_body" style:list-style-name="L21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67" style:family="paragraph" style:parent-style-name="Text_20_body" style:list-style-name="L211">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68" style:family="paragraph" style:parent-style-name="Text_20_body" style:list-style-name="L21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69" style:family="paragraph" style:parent-style-name="Text_20_body" style:list-style-name="L212">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70" style:family="paragraph" style:parent-style-name="Text_20_body" style:list-style-name="L21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71" style:family="paragraph" style:parent-style-name="Text_20_body" style:list-style-name="L213">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72" style:family="paragraph" style:parent-style-name="Text_20_body" style:list-style-name="L21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73" style:family="paragraph" style:parent-style-name="Text_20_body" style:list-style-name="L214">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74" style:family="paragraph" style:parent-style-name="Text_20_body" style:list-style-name="L21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75" style:family="paragraph" style:parent-style-name="Text_20_body" style:list-style-name="L215">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76" style:family="paragraph" style:parent-style-name="Table_20_Heading">
      <style:text-properties fo:font-weight="bold" style:font-weight-asian="bold" style:font-weight-complex="bold"/>
    </style:style>
    <style:style style:name="P477" style:family="paragraph" style:parent-style-name="Table_20_Contents">
      <style:text-properties fo:font-weight="bold" style:font-weight-asian="bold" style:font-weight-complex="bold"/>
    </style:style>
    <style:style style:name="P478" style:family="paragraph" style:parent-style-name="Text_20_body" style:list-style-name="L21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79" style:family="paragraph" style:parent-style-name="Text_20_body" style:list-style-name="L216">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80" style:family="paragraph" style:parent-style-name="Text_20_body" style:list-style-name="L21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81" style:family="paragraph" style:parent-style-name="Text_20_body" style:list-style-name="L217">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82" style:family="paragraph" style:parent-style-name="Heading_20_1">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4pt" fo:font-style="italic" fo:font-weight="bold" officeooo:rsid="000372ca" style:font-size-asian="14pt" style:font-style-asian="italic" style:font-weight-asian="bold" style:font-size-complex="14pt" style:font-style-complex="italic" style:font-weight-complex="bold"/>
    </style:style>
    <style:style style:name="P483" style:family="paragraph" style:parent-style-name="Text_20_body" style:list-style-name="L21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84" style:family="paragraph" style:parent-style-name="Text_20_body" style:list-style-name="L218">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85" style:family="paragraph" style:parent-style-name="Text_20_body" style:list-style-name="L21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86" style:family="paragraph" style:parent-style-name="Text_20_body" style:list-style-name="L219">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87" style:family="paragraph" style:parent-style-name="Text_20_body" style:list-style-name="L22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88" style:family="paragraph" style:parent-style-name="Text_20_body" style:list-style-name="L220">
      <style:paragraph-properties>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489" style:family="paragraph" style:parent-style-name="Heading_20_1">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6pt" fo:font-weight="normal" officeooo:rsid="000372ca" style:font-size-asian="16pt" style:font-weight-asian="normal" style:font-size-complex="16pt" style:font-weight-complex="normal"/>
    </style:style>
    <style:style style:name="P490" style:family="paragraph" style:parent-style-name="Heading_20_2">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6pt" fo:font-weight="normal" officeooo:rsid="000372ca" style:font-size-asian="16pt" style:font-weight-asian="normal" style:font-size-complex="16pt" style:font-weight-complex="normal"/>
    </style:style>
    <style:style style:name="P491" style:family="paragraph" style:parent-style-name="Text_20_body" style:list-style-name="L22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492" style:family="paragraph" style:parent-style-name="Text_20_body" style:list-style-name="L22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493" style:family="paragraph" style:parent-style-name="Text_20_body" style:list-style-name="L22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494" style:family="paragraph" style:parent-style-name="Text_20_body" style:list-style-name="L22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495" style:family="paragraph" style:parent-style-name="Text_20_body" style:list-style-name="L22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496" style:family="paragraph" style:parent-style-name="Text_20_body" style:list-style-name="L22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497" style:family="paragraph" style:parent-style-name="Text_20_body" style:list-style-name="L22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498" style:family="paragraph" style:parent-style-name="Text_20_body" style:list-style-name="L22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499" style:family="paragraph" style:parent-style-name="Text_20_body" style:list-style-name="L22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00" style:family="paragraph" style:parent-style-name="Text_20_body" style:list-style-name="L22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01" style:family="paragraph" style:parent-style-name="Text_20_body" style:list-style-name="L22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02" style:family="paragraph" style:parent-style-name="Text_20_body" style:list-style-name="L22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03" style:family="paragraph" style:parent-style-name="Text_20_body" style:list-style-name="L22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04" style:family="paragraph" style:parent-style-name="Text_20_body" style:list-style-name="L22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05" style:family="paragraph" style:parent-style-name="Text_20_body" style:list-style-name="L22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size="12pt" fo:font-weight="bold" officeooo:rsid="000372ca" style:font-size-asian="12pt" style:font-weight-asian="bold" style:font-size-complex="12pt" style:font-weight-complex="bold"/>
    </style:style>
    <style:style style:name="P506" style:family="paragraph" style:parent-style-name="Text_20_body" style:list-style-name="L228">
      <style:paragraph-properties>
        <style:tab-stops>
          <style:tab-stop style:position="8.5cm" style:type="center"/>
          <style:tab-stop style:position="17cm" style:type="right"/>
        </style:tab-stops>
      </style:paragraph-properties>
      <style:text-properties style:font-name="Times New Roman" fo:font-size="12pt" fo:font-weight="bold" officeooo:rsid="000372ca" style:font-size-asian="12pt" style:font-weight-asian="bold" style:font-size-complex="12pt" style:font-weight-complex="bold"/>
    </style:style>
    <style:style style:name="P507" style:family="paragraph" style:parent-style-name="Heading_20_2">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2pt" officeooo:rsid="000372ca" style:font-size-asian="12pt" style:font-size-complex="12pt"/>
    </style:style>
    <style:style style:name="P508" style:family="paragraph" style:parent-style-name="Text_20_body" style:list-style-name="L22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09" style:family="paragraph" style:parent-style-name="Text_20_body" style:list-style-name="L22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10" style:family="paragraph" style:parent-style-name="Text_20_body" style:list-style-name="L23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11" style:family="paragraph" style:parent-style-name="Text_20_body" style:list-style-name="L23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12" style:family="paragraph" style:parent-style-name="Text_20_body" style:list-style-name="L23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bold" officeooo:rsid="000372ca" style:font-size-asian="12pt" style:font-weight-asian="bold" style:font-weight-complex="bold"/>
    </style:style>
    <style:style style:name="P513" style:family="paragraph" style:parent-style-name="Text_20_body" style:list-style-name="L23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14" style:family="paragraph" style:parent-style-name="Text_20_body" style:list-style-name="L23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15" style:family="paragraph" style:parent-style-name="Heading_20_2">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6pt" fo:font-weight="bold" officeooo:rsid="000372ca" style:font-size-asian="16pt" style:font-weight-asian="bold" style:font-size-complex="16pt" style:font-weight-complex="bold"/>
    </style:style>
    <style:style style:name="P516" style:family="paragraph" style:parent-style-name="Text_20_body" style:list-style-name="L23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517" style:family="paragraph" style:parent-style-name="Text_20_body" style:list-style-name="L232">
      <style:paragraph-properties>
        <style:tab-stops>
          <style:tab-stop style:position="8.5cm" style:type="center"/>
          <style:tab-stop style:position="17cm" style:type="right"/>
        </style:tab-stops>
      </style:paragraph-properties>
      <style:text-properties style:font-name="Times New Roman" fo:font-weight="normal" officeooo:rsid="000372ca" style:font-size-asian="12pt" style:font-weight-asian="normal" style:font-weight-complex="normal"/>
    </style:style>
    <style:style style:name="P518" style:family="paragraph" style:parent-style-name="Text_20_body" style:list-style-name="L23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19" style:family="paragraph" style:parent-style-name="Text_20_body" style:list-style-name="L23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20" style:family="paragraph" style:parent-style-name="Text_20_body" style:list-style-name="L23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21" style:family="paragraph" style:parent-style-name="Text_20_body" style:list-style-name="L23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22" style:family="paragraph" style:parent-style-name="Text_20_body" style:list-style-name="L23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23" style:family="paragraph" style:parent-style-name="Text_20_body" style:list-style-name="L23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24" style:family="paragraph" style:parent-style-name="Text_20_body" style:list-style-name="L23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25" style:family="paragraph" style:parent-style-name="Text_20_body" style:list-style-name="L23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26" style:family="paragraph" style:parent-style-name="Text_20_body">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27" style:family="paragraph" style:parent-style-name="Text_20_body" style:list-style-name="L23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28" style:family="paragraph" style:parent-style-name="Text_20_body" style:list-style-name="L23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29" style:family="paragraph" style:parent-style-name="Text_20_body" style:list-style-name="L23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30" style:family="paragraph" style:parent-style-name="Text_20_body" style:list-style-name="L23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31" style:family="paragraph" style:parent-style-name="Text_20_body" style:list-style-name="L23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32" style:family="paragraph" style:parent-style-name="Text_20_body" style:list-style-name="L23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33" style:family="paragraph" style:parent-style-name="Text_20_body" style:list-style-name="L24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34" style:family="paragraph" style:parent-style-name="Text_20_body" style:list-style-name="L24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35" style:family="paragraph" style:parent-style-name="Text_20_body" style:list-style-name="L24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36" style:family="paragraph" style:parent-style-name="Text_20_body" style:list-style-name="L24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37" style:family="paragraph" style:parent-style-name="Text_20_body" style:list-style-name="L24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38" style:family="paragraph" style:parent-style-name="Text_20_body" style:list-style-name="L24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39" style:family="paragraph" style:parent-style-name="Text_20_body" style:list-style-name="L24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40" style:family="paragraph" style:parent-style-name="Text_20_body" style:list-style-name="L24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41" style:family="paragraph" style:parent-style-name="Text_20_body" style:list-style-name="L24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42" style:family="paragraph" style:parent-style-name="Text_20_body" style:list-style-name="L24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43" style:family="paragraph" style:parent-style-name="Text_20_body" style:list-style-name="L24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44" style:family="paragraph" style:parent-style-name="Text_20_body" style:list-style-name="L24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45" style:family="paragraph" style:parent-style-name="Text_20_body" style:list-style-name="L24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46" style:family="paragraph" style:parent-style-name="Text_20_body" style:list-style-name="L24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47" style:family="paragraph" style:parent-style-name="Text_20_body" style:list-style-name="L24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48" style:family="paragraph" style:parent-style-name="Text_20_body" style:list-style-name="L24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49" style:family="paragraph" style:parent-style-name="Text_20_body" style:list-style-name="L24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50" style:family="paragraph" style:parent-style-name="Text_20_body" style:list-style-name="L24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51" style:family="paragraph" style:parent-style-name="Text_20_body" style:list-style-name="L24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52" style:family="paragraph" style:parent-style-name="Text_20_body" style:list-style-name="L24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53" style:family="paragraph" style:parent-style-name="Text_20_body" style:list-style-name="L25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54" style:family="paragraph" style:parent-style-name="Text_20_body" style:list-style-name="L25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55" style:family="paragraph" style:parent-style-name="Text_20_body" style:list-style-name="L25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56" style:family="paragraph" style:parent-style-name="Text_20_body" style:list-style-name="L25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57" style:family="paragraph" style:parent-style-name="Text_20_body" style:list-style-name="L25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58" style:family="paragraph" style:parent-style-name="Text_20_body" style:list-style-name="L25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59" style:family="paragraph" style:parent-style-name="Text_20_body" style:list-style-name="L25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60" style:family="paragraph" style:parent-style-name="Text_20_body" style:list-style-name="L25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61" style:family="paragraph" style:parent-style-name="Text_20_body" style:list-style-name="L25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62" style:family="paragraph" style:parent-style-name="Text_20_body" style:list-style-name="L25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63" style:family="paragraph" style:parent-style-name="Text_20_body" style:list-style-name="L25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64" style:family="paragraph" style:parent-style-name="Text_20_body" style:list-style-name="L25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65" style:family="paragraph" style:parent-style-name="Text_20_body" style:list-style-name="L25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66" style:family="paragraph" style:parent-style-name="Text_20_body" style:list-style-name="L25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67" style:family="paragraph" style:parent-style-name="Text_20_body" style:list-style-name="L25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68" style:family="paragraph" style:parent-style-name="Text_20_body" style:list-style-name="L25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69" style:family="paragraph" style:parent-style-name="Text_20_body" style:list-style-name="L25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70" style:family="paragraph" style:parent-style-name="Text_20_body" style:list-style-name="L25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71" style:family="paragraph" style:parent-style-name="Heading_20_2">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2pt" fo:font-weight="bold" officeooo:rsid="000372ca" style:font-size-asian="12pt" style:font-weight-asian="bold" style:font-size-complex="12pt" style:font-weight-complex="bold"/>
    </style:style>
    <style:style style:name="P572" style:family="paragraph" style:parent-style-name="Text_20_body" style:list-style-name="L25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73" style:family="paragraph" style:parent-style-name="Text_20_body" style:list-style-name="L25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74" style:family="paragraph" style:parent-style-name="Text_20_body" style:list-style-name="L26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75" style:family="paragraph" style:parent-style-name="Text_20_body" style:list-style-name="L26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76" style:family="paragraph" style:parent-style-name="Text_20_body" style:list-style-name="L26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77" style:family="paragraph" style:parent-style-name="Text_20_body" style:list-style-name="L26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78" style:family="paragraph" style:parent-style-name="Text_20_body" style:list-style-name="L26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79" style:family="paragraph" style:parent-style-name="Text_20_body" style:list-style-name="L26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80" style:family="paragraph" style:parent-style-name="Text_20_body" style:list-style-name="L26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81" style:family="paragraph" style:parent-style-name="Text_20_body" style:list-style-name="L26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82" style:family="paragraph" style:parent-style-name="Text_20_body" style:list-style-name="L26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83" style:family="paragraph" style:parent-style-name="Text_20_body" style:list-style-name="L26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84" style:family="paragraph" style:parent-style-name="Text_20_body">
      <style:paragraph-properties fo:break-before="page">
        <style:tab-stops>
          <style:tab-stop style:position="8.5cm" style:type="center"/>
          <style:tab-stop style:position="17cm" style:type="right"/>
        </style:tab-stops>
      </style:paragraph-properties>
      <style:text-properties style:font-name="Times New Roman" officeooo:rsid="000372ca" style:font-size-asian="12pt"/>
    </style:style>
    <style:style style:name="P585" style:family="paragraph" style:parent-style-name="Text_20_body" style:list-style-name="L26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86" style:family="paragraph" style:parent-style-name="Text_20_body" style:list-style-name="L26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87" style:family="paragraph" style:parent-style-name="Text_20_body" style:list-style-name="L26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88" style:family="paragraph" style:parent-style-name="Text_20_body" style:list-style-name="L26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89" style:family="paragraph" style:parent-style-name="Text_20_body" style:list-style-name="L26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90" style:family="paragraph" style:parent-style-name="Text_20_body" style:list-style-name="L26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91" style:family="paragraph" style:parent-style-name="Text_20_body" style:list-style-name="L26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92" style:family="paragraph" style:parent-style-name="Text_20_body" style:list-style-name="L26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93" style:family="paragraph" style:parent-style-name="Text_20_body" style:list-style-name="L27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94" style:family="paragraph" style:parent-style-name="Text_20_body" style:list-style-name="L27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95" style:family="paragraph" style:parent-style-name="Text_20_body" style:list-style-name="L27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96" style:family="paragraph" style:parent-style-name="Text_20_body" style:list-style-name="L27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97" style:family="paragraph" style:parent-style-name="Text_20_body" style:list-style-name="L27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598" style:family="paragraph" style:parent-style-name="Text_20_body" style:list-style-name="L27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599" style:family="paragraph" style:parent-style-name="Text_20_body" style:list-style-name="L27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00" style:family="paragraph" style:parent-style-name="Text_20_body" style:list-style-name="L27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01" style:family="paragraph" style:parent-style-name="Text_20_body" style:list-style-name="L27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02" style:family="paragraph" style:parent-style-name="Text_20_body" style:list-style-name="L27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03" style:family="paragraph" style:parent-style-name="Text_20_body" style:list-style-name="L27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04" style:family="paragraph" style:parent-style-name="Text_20_body" style:list-style-name="L27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05" style:family="paragraph" style:parent-style-name="Text_20_body" style:list-style-name="L27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06" style:family="paragraph" style:parent-style-name="Text_20_body" style:list-style-name="L27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07" style:family="paragraph" style:parent-style-name="Text_20_body" style:list-style-name="L27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08" style:family="paragraph" style:parent-style-name="Text_20_body" style:list-style-name="L27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09" style:family="paragraph" style:parent-style-name="Text_20_body" style:list-style-name="L27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10" style:family="paragraph" style:parent-style-name="Text_20_body" style:list-style-name="L27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11" style:family="paragraph" style:parent-style-name="Text_20_body" style:list-style-name="L27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12" style:family="paragraph" style:parent-style-name="Text_20_body" style:list-style-name="L27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13" style:family="paragraph" style:parent-style-name="Text_20_body" style:list-style-name="L28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14" style:family="paragraph" style:parent-style-name="Text_20_body" style:list-style-name="L28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15" style:family="paragraph" style:parent-style-name="Text_20_body" style:list-style-name="L28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16" style:family="paragraph" style:parent-style-name="Text_20_body" style:list-style-name="L28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17" style:family="paragraph" style:parent-style-name="Text_20_body" style:list-style-name="L28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18" style:family="paragraph" style:parent-style-name="Text_20_body" style:list-style-name="L28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19" style:family="paragraph" style:parent-style-name="Text_20_body" style:list-style-name="L28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20" style:family="paragraph" style:parent-style-name="Text_20_body" style:list-style-name="L28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21" style:family="paragraph" style:parent-style-name="Text_20_body" style:list-style-name="L28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22" style:family="paragraph" style:parent-style-name="Text_20_body" style:list-style-name="L28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23" style:family="paragraph" style:parent-style-name="Text_20_body" style:list-style-name="L28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24" style:family="paragraph" style:parent-style-name="Text_20_body" style:list-style-name="L28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25" style:family="paragraph" style:parent-style-name="Text_20_body" style:list-style-name="L28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26" style:family="paragraph" style:parent-style-name="Text_20_body" style:list-style-name="L28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27" style:family="paragraph" style:parent-style-name="Text_20_body" style:list-style-name="L28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28" style:family="paragraph" style:parent-style-name="Text_20_body" style:list-style-name="L28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29" style:family="paragraph" style:parent-style-name="Text_20_body" style:list-style-name="L28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30" style:family="paragraph" style:parent-style-name="Text_20_body" style:list-style-name="L28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31" style:family="paragraph" style:parent-style-name="Text_20_body" style:list-style-name="L28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32" style:family="paragraph" style:parent-style-name="Text_20_body" style:list-style-name="L28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33" style:family="paragraph" style:parent-style-name="Text_20_body" style:list-style-name="L29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34" style:family="paragraph" style:parent-style-name="Text_20_body" style:list-style-name="L29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35" style:family="paragraph" style:parent-style-name="Text_20_body" style:list-style-name="L29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36" style:family="paragraph" style:parent-style-name="Text_20_body" style:list-style-name="L29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37" style:family="paragraph" style:parent-style-name="Text_20_body" style:list-style-name="L29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38" style:family="paragraph" style:parent-style-name="Text_20_body" style:list-style-name="L29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39" style:family="paragraph" style:parent-style-name="Text_20_body" style:list-style-name="L29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40" style:family="paragraph" style:parent-style-name="Text_20_body" style:list-style-name="L29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41" style:family="paragraph" style:parent-style-name="Text_20_body" style:list-style-name="L29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42" style:family="paragraph" style:parent-style-name="Text_20_body" style:list-style-name="L29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43" style:family="paragraph" style:parent-style-name="Text_20_body" style:list-style-name="L29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44" style:family="paragraph" style:parent-style-name="Text_20_body" style:list-style-name="L29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45" style:family="paragraph" style:parent-style-name="Text_20_body" style:list-style-name="L29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46" style:family="paragraph" style:parent-style-name="Text_20_body" style:list-style-name="L29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47" style:family="paragraph" style:parent-style-name="Text_20_body" style:list-style-name="L29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48" style:family="paragraph" style:parent-style-name="Text_20_body" style:list-style-name="L29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49" style:family="paragraph" style:parent-style-name="Text_20_body" style:list-style-name="L29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50" style:family="paragraph" style:parent-style-name="Text_20_body" style:list-style-name="L29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51" style:family="paragraph" style:parent-style-name="Text_20_body" style:list-style-name="L29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52" style:family="paragraph" style:parent-style-name="Text_20_body" style:list-style-name="L29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53" style:family="paragraph" style:parent-style-name="Text_20_body" style:list-style-name="L30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54" style:family="paragraph" style:parent-style-name="Text_20_body" style:list-style-name="L30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55" style:family="paragraph" style:parent-style-name="Text_20_body" style:list-style-name="L30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56" style:family="paragraph" style:parent-style-name="Text_20_body" style:list-style-name="L30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57" style:family="paragraph" style:parent-style-name="Text_20_body" style:list-style-name="L30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58" style:family="paragraph" style:parent-style-name="Text_20_body" style:list-style-name="L30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59" style:family="paragraph" style:parent-style-name="Text_20_body" style:list-style-name="L30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60" style:family="paragraph" style:parent-style-name="Text_20_body" style:list-style-name="L30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61" style:family="paragraph" style:parent-style-name="Text_20_body" style:list-style-name="L30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62" style:family="paragraph" style:parent-style-name="Text_20_body" style:list-style-name="L30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63" style:family="paragraph" style:parent-style-name="Text_20_body" style:list-style-name="L30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64" style:family="paragraph" style:parent-style-name="Text_20_body" style:list-style-name="L30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65" style:family="paragraph" style:parent-style-name="Text_20_body" style:list-style-name="L30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66" style:family="paragraph" style:parent-style-name="Text_20_body" style:list-style-name="L30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67" style:family="paragraph" style:parent-style-name="Text_20_body" style:list-style-name="L30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68" style:family="paragraph" style:parent-style-name="Text_20_body" style:list-style-name="L30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69" style:family="paragraph" style:parent-style-name="Text_20_body" style:list-style-name="L30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70" style:family="paragraph" style:parent-style-name="Text_20_body" style:list-style-name="L30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71" style:family="paragraph" style:parent-style-name="Text_20_body" style:list-style-name="L30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72" style:family="paragraph" style:parent-style-name="Text_20_body" style:list-style-name="L30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73" style:family="paragraph" style:parent-style-name="Text_20_body" style:list-style-name="L31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74" style:family="paragraph" style:parent-style-name="Text_20_body" style:list-style-name="L31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75" style:family="paragraph" style:parent-style-name="Text_20_body" style:list-style-name="L31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76" style:family="paragraph" style:parent-style-name="Text_20_body" style:list-style-name="L31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77" style:family="paragraph" style:parent-style-name="Text_20_body" style:list-style-name="L31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78" style:family="paragraph" style:parent-style-name="Text_20_body" style:list-style-name="L31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79" style:family="paragraph" style:parent-style-name="Text_20_body" style:list-style-name="L31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80" style:family="paragraph" style:parent-style-name="Text_20_body" style:list-style-name="L31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81" style:family="paragraph" style:parent-style-name="Text_20_body" style:list-style-name="L31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82" style:family="paragraph" style:parent-style-name="Text_20_body" style:list-style-name="L31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83" style:family="paragraph" style:parent-style-name="Text_20_body" style:list-style-name="L31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84" style:family="paragraph" style:parent-style-name="Text_20_body" style:list-style-name="L31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85" style:family="paragraph" style:parent-style-name="Text_20_body" style:list-style-name="L31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86" style:family="paragraph" style:parent-style-name="Text_20_body" style:list-style-name="L31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87" style:family="paragraph" style:parent-style-name="Text_20_body" style:list-style-name="L31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88" style:family="paragraph" style:parent-style-name="Text_20_body" style:list-style-name="L31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89" style:family="paragraph" style:parent-style-name="Text_20_body" style:list-style-name="L31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90" style:family="paragraph" style:parent-style-name="Text_20_body" style:list-style-name="L31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91" style:family="paragraph" style:parent-style-name="Text_20_body" style:list-style-name="L31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92" style:family="paragraph" style:parent-style-name="Text_20_body" style:list-style-name="L31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93" style:family="paragraph" style:parent-style-name="Text_20_body" style:list-style-name="L32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94" style:family="paragraph" style:parent-style-name="Text_20_body" style:list-style-name="L32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95" style:family="paragraph" style:parent-style-name="Text_20_body" style:list-style-name="L32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96" style:family="paragraph" style:parent-style-name="Text_20_body" style:list-style-name="L32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97" style:family="paragraph" style:parent-style-name="Text_20_body" style:list-style-name="L32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698" style:family="paragraph" style:parent-style-name="Text_20_body" style:list-style-name="L32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699" style:family="paragraph" style:parent-style-name="Text_20_body" style:list-style-name="L32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00" style:family="paragraph" style:parent-style-name="Text_20_body" style:list-style-name="L32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01" style:family="paragraph" style:parent-style-name="Text_20_body" style:list-style-name="L32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02" style:family="paragraph" style:parent-style-name="Text_20_body" style:list-style-name="L32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03" style:family="paragraph" style:parent-style-name="Text_20_body" style:list-style-name="L32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04" style:family="paragraph" style:parent-style-name="Text_20_body" style:list-style-name="L32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05" style:family="paragraph" style:parent-style-name="Text_20_body" style:list-style-name="L32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06" style:family="paragraph" style:parent-style-name="Text_20_body" style:list-style-name="L32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07" style:family="paragraph" style:parent-style-name="Text_20_body" style:list-style-name="L32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08" style:family="paragraph" style:parent-style-name="Text_20_body" style:list-style-name="L32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09" style:family="paragraph" style:parent-style-name="Text_20_body" style:list-style-name="L32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10" style:family="paragraph" style:parent-style-name="Text_20_body" style:list-style-name="L32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11" style:family="paragraph" style:parent-style-name="Text_20_body" style:list-style-name="L32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12" style:family="paragraph" style:parent-style-name="Text_20_body" style:list-style-name="L32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13" style:family="paragraph" style:parent-style-name="Text_20_body" style:list-style-name="L33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14" style:family="paragraph" style:parent-style-name="Text_20_body" style:list-style-name="L33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15" style:family="paragraph" style:parent-style-name="Text_20_body" style:list-style-name="L33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16" style:family="paragraph" style:parent-style-name="Text_20_body" style:list-style-name="L33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17" style:family="paragraph" style:parent-style-name="Text_20_body" style:list-style-name="L33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18" style:family="paragraph" style:parent-style-name="Text_20_body" style:list-style-name="L33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19" style:family="paragraph" style:parent-style-name="Text_20_body" style:list-style-name="L33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20" style:family="paragraph" style:parent-style-name="Text_20_body" style:list-style-name="L33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21" style:family="paragraph" style:parent-style-name="Text_20_body" style:list-style-name="L33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22" style:family="paragraph" style:parent-style-name="Text_20_body" style:list-style-name="L33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23" style:family="paragraph" style:parent-style-name="Text_20_body" style:list-style-name="L33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24" style:family="paragraph" style:parent-style-name="Text_20_body" style:list-style-name="L33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25" style:family="paragraph" style:parent-style-name="Text_20_body" style:list-style-name="L33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26" style:family="paragraph" style:parent-style-name="Text_20_body" style:list-style-name="L33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27" style:family="paragraph" style:parent-style-name="Text_20_body" style:list-style-name="L33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28" style:family="paragraph" style:parent-style-name="Text_20_body" style:list-style-name="L33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29" style:family="paragraph" style:parent-style-name="Text_20_body" style:list-style-name="L33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30" style:family="paragraph" style:parent-style-name="Text_20_body" style:list-style-name="L33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31" style:family="paragraph" style:parent-style-name="Text_20_body" style:list-style-name="L33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32" style:family="paragraph" style:parent-style-name="Text_20_body" style:list-style-name="L33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33" style:family="paragraph" style:parent-style-name="Text_20_body" style:list-style-name="L34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34" style:family="paragraph" style:parent-style-name="Text_20_body" style:list-style-name="L34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35" style:family="paragraph" style:parent-style-name="Text_20_body" style:list-style-name="L34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36" style:family="paragraph" style:parent-style-name="Text_20_body" style:list-style-name="L34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37" style:family="paragraph" style:parent-style-name="Text_20_body" style:list-style-name="L34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38" style:family="paragraph" style:parent-style-name="Text_20_body" style:list-style-name="L34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39" style:family="paragraph" style:parent-style-name="Text_20_body" style:list-style-name="L34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40" style:family="paragraph" style:parent-style-name="Text_20_body" style:list-style-name="L34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41" style:family="paragraph" style:parent-style-name="Text_20_body" style:list-style-name="L34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42" style:family="paragraph" style:parent-style-name="Text_20_body" style:list-style-name="L34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43" style:family="paragraph" style:parent-style-name="Text_20_body" style:list-style-name="L34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44" style:family="paragraph" style:parent-style-name="Text_20_body" style:list-style-name="L34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45" style:family="paragraph" style:parent-style-name="Text_20_body" style:list-style-name="L34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46" style:family="paragraph" style:parent-style-name="Text_20_body" style:list-style-name="L34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47" style:family="paragraph" style:parent-style-name="Text_20_body" style:list-style-name="L34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48" style:family="paragraph" style:parent-style-name="Text_20_body" style:list-style-name="L34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49" style:family="paragraph" style:parent-style-name="Text_20_body" style:list-style-name="L34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50" style:family="paragraph" style:parent-style-name="Text_20_body" style:list-style-name="L34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51" style:family="paragraph" style:parent-style-name="Text_20_body" style:list-style-name="L34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52" style:family="paragraph" style:parent-style-name="Text_20_body" style:list-style-name="L34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53" style:family="paragraph" style:parent-style-name="Text_20_body" style:list-style-name="L35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54" style:family="paragraph" style:parent-style-name="Text_20_body" style:list-style-name="L35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55" style:family="paragraph" style:parent-style-name="Text_20_body" style:list-style-name="L35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56" style:family="paragraph" style:parent-style-name="Text_20_body" style:list-style-name="L35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57" style:family="paragraph" style:parent-style-name="Text_20_body" style:list-style-name="L35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58" style:family="paragraph" style:parent-style-name="Text_20_body" style:list-style-name="L35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59" style:family="paragraph" style:parent-style-name="Text_20_body" style:list-style-name="L35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60" style:family="paragraph" style:parent-style-name="Text_20_body" style:list-style-name="L35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61" style:family="paragraph" style:parent-style-name="Text_20_body" style:list-style-name="L35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62" style:family="paragraph" style:parent-style-name="Text_20_body" style:list-style-name="L35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63" style:family="paragraph" style:parent-style-name="Text_20_body" style:list-style-name="L35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64" style:family="paragraph" style:parent-style-name="Text_20_body" style:list-style-name="L35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65" style:family="paragraph" style:parent-style-name="Text_20_body" style:list-style-name="L35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66" style:family="paragraph" style:parent-style-name="Text_20_body" style:list-style-name="L35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67" style:family="paragraph" style:parent-style-name="Text_20_body" style:list-style-name="L35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68" style:family="paragraph" style:parent-style-name="Text_20_body" style:list-style-name="L35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69" style:family="paragraph" style:parent-style-name="Text_20_body" style:list-style-name="L35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70" style:family="paragraph" style:parent-style-name="Text_20_body" style:list-style-name="L35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71" style:family="paragraph" style:parent-style-name="Text_20_body" style:list-style-name="L35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72" style:family="paragraph" style:parent-style-name="Text_20_body" style:list-style-name="L35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73" style:family="paragraph" style:parent-style-name="Text_20_body" style:list-style-name="L36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74" style:family="paragraph" style:parent-style-name="Text_20_body" style:list-style-name="L36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75" style:family="paragraph" style:parent-style-name="Text_20_body" style:list-style-name="L36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76" style:family="paragraph" style:parent-style-name="Text_20_body" style:list-style-name="L36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77" style:family="paragraph" style:parent-style-name="Text_20_body" style:list-style-name="L36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78" style:family="paragraph" style:parent-style-name="Text_20_body" style:list-style-name="L36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79" style:family="paragraph" style:parent-style-name="Text_20_body" style:list-style-name="L36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80" style:family="paragraph" style:parent-style-name="Text_20_body" style:list-style-name="L36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81" style:family="paragraph" style:parent-style-name="Text_20_body" style:list-style-name="L36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82" style:family="paragraph" style:parent-style-name="Text_20_body" style:list-style-name="L36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83" style:family="paragraph" style:parent-style-name="Text_20_body" style:list-style-name="L36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84" style:family="paragraph" style:parent-style-name="Text_20_body" style:list-style-name="L36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85" style:family="paragraph" style:parent-style-name="Text_20_body" style:list-style-name="L36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86" style:family="paragraph" style:parent-style-name="Text_20_body" style:list-style-name="L36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87" style:family="paragraph" style:parent-style-name="Text_20_body" style:list-style-name="L36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88" style:family="paragraph" style:parent-style-name="Text_20_body" style:list-style-name="L36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89" style:family="paragraph" style:parent-style-name="Text_20_body" style:list-style-name="L36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90" style:family="paragraph" style:parent-style-name="Text_20_body" style:list-style-name="L36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91" style:family="paragraph" style:parent-style-name="Text_20_body" style:list-style-name="L36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92" style:family="paragraph" style:parent-style-name="Text_20_body" style:list-style-name="L36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93" style:family="paragraph" style:parent-style-name="Text_20_body" style:list-style-name="L37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94" style:family="paragraph" style:parent-style-name="Text_20_body" style:list-style-name="L37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95" style:family="paragraph" style:parent-style-name="Text_20_body" style:list-style-name="L37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96" style:family="paragraph" style:parent-style-name="Text_20_body" style:list-style-name="L37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97" style:family="paragraph" style:parent-style-name="Text_20_body" style:list-style-name="L37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798" style:family="paragraph" style:parent-style-name="Text_20_body" style:list-style-name="L37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799" style:family="paragraph" style:parent-style-name="Text_20_body" style:list-style-name="L37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00" style:family="paragraph" style:parent-style-name="Text_20_body" style:list-style-name="L37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01" style:family="paragraph" style:parent-style-name="Text_20_body" style:list-style-name="L37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02" style:family="paragraph" style:parent-style-name="Text_20_body" style:list-style-name="L37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03" style:family="paragraph" style:parent-style-name="Text_20_body" style:list-style-name="L37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04" style:family="paragraph" style:parent-style-name="Text_20_body" style:list-style-name="L37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05" style:family="paragraph" style:parent-style-name="Text_20_body" style:list-style-name="L37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06" style:family="paragraph" style:parent-style-name="Text_20_body" style:list-style-name="L37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07" style:family="paragraph" style:parent-style-name="Text_20_body" style:list-style-name="L37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08" style:family="paragraph" style:parent-style-name="Text_20_body" style:list-style-name="L37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09" style:family="paragraph" style:parent-style-name="Text_20_body" style:list-style-name="L37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10" style:family="paragraph" style:parent-style-name="Text_20_body" style:list-style-name="L37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11" style:family="paragraph" style:parent-style-name="Text_20_body" style:list-style-name="L37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12" style:family="paragraph" style:parent-style-name="Text_20_body" style:list-style-name="L37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13" style:family="paragraph" style:parent-style-name="Text_20_body" style:list-style-name="L38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14" style:family="paragraph" style:parent-style-name="Text_20_body" style:list-style-name="L38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15" style:family="paragraph" style:parent-style-name="Text_20_body" style:list-style-name="L38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16" style:family="paragraph" style:parent-style-name="Text_20_body" style:list-style-name="L38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17" style:family="paragraph" style:parent-style-name="Text_20_body" style:list-style-name="L38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18" style:family="paragraph" style:parent-style-name="Text_20_body" style:list-style-name="L38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19" style:family="paragraph" style:parent-style-name="Text_20_body" style:list-style-name="L38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20" style:family="paragraph" style:parent-style-name="Text_20_body" style:list-style-name="L38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21" style:family="paragraph" style:parent-style-name="Text_20_body" style:list-style-name="L38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22" style:family="paragraph" style:parent-style-name="Text_20_body" style:list-style-name="L38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23" style:family="paragraph" style:parent-style-name="Text_20_body" style:list-style-name="L38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24" style:family="paragraph" style:parent-style-name="Text_20_body" style:list-style-name="L38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25" style:family="paragraph" style:parent-style-name="Text_20_body" style:list-style-name="L38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26" style:family="paragraph" style:parent-style-name="Text_20_body" style:list-style-name="L38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27" style:family="paragraph" style:parent-style-name="Text_20_body" style:list-style-name="L38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28" style:family="paragraph" style:parent-style-name="Text_20_body" style:list-style-name="L38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29" style:family="paragraph" style:parent-style-name="Text_20_body" style:list-style-name="L38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30" style:family="paragraph" style:parent-style-name="Text_20_body" style:list-style-name="L38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31" style:family="paragraph" style:parent-style-name="Text_20_body" style:list-style-name="L38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32" style:family="paragraph" style:parent-style-name="Text_20_body" style:list-style-name="L38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33" style:family="paragraph" style:parent-style-name="Text_20_body" style:list-style-name="L39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34" style:family="paragraph" style:parent-style-name="Text_20_body" style:list-style-name="L39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35" style:family="paragraph" style:parent-style-name="Text_20_body" style:list-style-name="L39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36" style:family="paragraph" style:parent-style-name="Text_20_body" style:list-style-name="L39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37" style:family="paragraph" style:parent-style-name="Text_20_body" style:list-style-name="L39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38" style:family="paragraph" style:parent-style-name="Text_20_body" style:list-style-name="L39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39" style:family="paragraph" style:parent-style-name="Text_20_body" style:list-style-name="L39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40" style:family="paragraph" style:parent-style-name="Text_20_body" style:list-style-name="L39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41" style:family="paragraph" style:parent-style-name="Text_20_body" style:list-style-name="L39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42" style:family="paragraph" style:parent-style-name="Text_20_body" style:list-style-name="L39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43" style:family="paragraph" style:parent-style-name="Text_20_body" style:list-style-name="L39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fo:font-weight="bold" officeooo:rsid="000372ca" style:font-size-asian="12pt" style:font-weight-asian="bold" style:font-weight-complex="bold"/>
    </style:style>
    <style:style style:name="P844" style:family="paragraph" style:parent-style-name="Text_20_body" style:list-style-name="L39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45" style:family="paragraph" style:parent-style-name="Text_20_body" style:list-style-name="L39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46" style:family="paragraph" style:parent-style-name="Text_20_body" style:list-style-name="L39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47" style:family="paragraph" style:parent-style-name="Text_20_body" style:list-style-name="L39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48" style:family="paragraph" style:parent-style-name="Text_20_body" style:list-style-name="L39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49" style:family="paragraph" style:parent-style-name="Text_20_body" style:list-style-name="L39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50" style:family="paragraph" style:parent-style-name="Text_20_body" style:list-style-name="L39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51" style:family="paragraph" style:parent-style-name="Text_20_body" style:list-style-name="L39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52" style:family="paragraph" style:parent-style-name="Text_20_body" style:list-style-name="L39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53" style:family="paragraph" style:parent-style-name="Text_20_body" style:list-style-name="L39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54" style:family="paragraph" style:parent-style-name="Text_20_body" style:list-style-name="L40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55" style:family="paragraph" style:parent-style-name="Text_20_body" style:list-style-name="L40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56" style:family="paragraph" style:parent-style-name="Text_20_body" style:list-style-name="L40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57" style:family="paragraph" style:parent-style-name="Text_20_body" style:list-style-name="L40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58" style:family="paragraph" style:parent-style-name="Text_20_body" style:list-style-name="L40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59" style:family="paragraph" style:parent-style-name="Text_20_body" style:list-style-name="L40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60" style:family="paragraph" style:parent-style-name="Text_20_body" style:list-style-name="L40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61" style:family="paragraph" style:parent-style-name="Text_20_body" style:list-style-name="L40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62" style:family="paragraph" style:parent-style-name="Text_20_body" style:list-style-name="L40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63" style:family="paragraph" style:parent-style-name="Text_20_body" style:list-style-name="L40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64" style:family="paragraph" style:parent-style-name="Text_20_body" style:list-style-name="L40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65" style:family="paragraph" style:parent-style-name="Text_20_body" style:list-style-name="L40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66" style:family="paragraph" style:parent-style-name="Text_20_body" style:list-style-name="L40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67" style:family="paragraph" style:parent-style-name="Text_20_body" style:list-style-name="L40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68" style:family="paragraph" style:parent-style-name="Text_20_body" style:list-style-name="L40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69" style:family="paragraph" style:parent-style-name="Text_20_body" style:list-style-name="L40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70" style:family="paragraph" style:parent-style-name="Text_20_body" style:list-style-name="L40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71" style:family="paragraph" style:parent-style-name="Text_20_body" style:list-style-name="L40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72" style:family="paragraph" style:parent-style-name="Text_20_body" style:list-style-name="L40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73" style:family="paragraph" style:parent-style-name="Text_20_body" style:list-style-name="L40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74" style:family="paragraph" style:parent-style-name="Text_20_body" style:list-style-name="L41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75" style:family="paragraph" style:parent-style-name="Text_20_body" style:list-style-name="L41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76" style:family="paragraph" style:parent-style-name="Text_20_body" style:list-style-name="L41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77" style:family="paragraph" style:parent-style-name="Text_20_body" style:list-style-name="L41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78" style:family="paragraph" style:parent-style-name="Text_20_body" style:list-style-name="L41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79" style:family="paragraph" style:parent-style-name="Text_20_body" style:list-style-name="L41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80" style:family="paragraph" style:parent-style-name="Text_20_body" style:list-style-name="L41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81" style:family="paragraph" style:parent-style-name="Text_20_body" style:list-style-name="L41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82" style:family="paragraph" style:parent-style-name="Text_20_body" style:list-style-name="L41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83" style:family="paragraph" style:parent-style-name="Text_20_body" style:list-style-name="L41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84" style:family="paragraph" style:parent-style-name="Text_20_body" style:list-style-name="L41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85" style:family="paragraph" style:parent-style-name="Text_20_body" style:list-style-name="L41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86" style:family="paragraph" style:parent-style-name="Text_20_body" style:list-style-name="L41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87" style:family="paragraph" style:parent-style-name="Text_20_body" style:list-style-name="L41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88" style:family="paragraph" style:parent-style-name="Text_20_body" style:list-style-name="L41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89" style:family="paragraph" style:parent-style-name="Text_20_body" style:list-style-name="L41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90" style:family="paragraph" style:parent-style-name="Text_20_body" style:list-style-name="L41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91" style:family="paragraph" style:parent-style-name="Text_20_body" style:list-style-name="L41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92" style:family="paragraph" style:parent-style-name="Text_20_body" style:list-style-name="L41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93" style:family="paragraph" style:parent-style-name="Text_20_body" style:list-style-name="L41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94" style:family="paragraph" style:parent-style-name="Text_20_body" style:list-style-name="L42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95" style:family="paragraph" style:parent-style-name="Text_20_body" style:list-style-name="L42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96" style:family="paragraph" style:parent-style-name="Text_20_body" style:list-style-name="L42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97" style:family="paragraph" style:parent-style-name="Text_20_body" style:list-style-name="L42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898" style:family="paragraph" style:parent-style-name="Text_20_body" style:list-style-name="L42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899" style:family="paragraph" style:parent-style-name="Text_20_body" style:list-style-name="L42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00" style:family="paragraph" style:parent-style-name="Text_20_body" style:list-style-name="L42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01" style:family="paragraph" style:parent-style-name="Text_20_body" style:list-style-name="L42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02" style:family="paragraph" style:parent-style-name="Text_20_body" style:list-style-name="L42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03" style:family="paragraph" style:parent-style-name="Text_20_body" style:list-style-name="L42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04" style:family="paragraph" style:parent-style-name="Text_20_body" style:list-style-name="L42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05" style:family="paragraph" style:parent-style-name="Text_20_body" style:list-style-name="L42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06" style:family="paragraph" style:parent-style-name="Text_20_body" style:list-style-name="L42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07" style:family="paragraph" style:parent-style-name="Text_20_body" style:list-style-name="L42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08" style:family="paragraph" style:parent-style-name="Text_20_body" style:list-style-name="L42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09" style:family="paragraph" style:parent-style-name="Text_20_body" style:list-style-name="L42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10" style:family="paragraph" style:parent-style-name="Text_20_body" style:list-style-name="L42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11" style:family="paragraph" style:parent-style-name="Text_20_body" style:list-style-name="L42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12" style:family="paragraph" style:parent-style-name="Text_20_body" style:list-style-name="L42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13" style:family="paragraph" style:parent-style-name="Text_20_body" style:list-style-name="L42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14" style:family="paragraph" style:parent-style-name="Text_20_body" style:list-style-name="L43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15" style:family="paragraph" style:parent-style-name="Text_20_body" style:list-style-name="L43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16" style:family="paragraph" style:parent-style-name="Text_20_body" style:list-style-name="L43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17" style:family="paragraph" style:parent-style-name="Text_20_body" style:list-style-name="L43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18" style:family="paragraph" style:parent-style-name="Text_20_body" style:list-style-name="L43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19" style:family="paragraph" style:parent-style-name="Text_20_body" style:list-style-name="L43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20" style:family="paragraph" style:parent-style-name="Text_20_body" style:list-style-name="L43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21" style:family="paragraph" style:parent-style-name="Text_20_body" style:list-style-name="L43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22" style:family="paragraph" style:parent-style-name="Text_20_body" style:list-style-name="L43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23" style:family="paragraph" style:parent-style-name="Text_20_body" style:list-style-name="L43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24" style:family="paragraph" style:parent-style-name="Heading_20_1">
      <style:paragraph-properties fo:margin-top="0cm" fo:margin-bottom="0.247cm" style:contextual-spacing="false" fo:line-height="115%">
        <style:tab-stops>
          <style:tab-stop style:position="8.5cm" style:type="center"/>
          <style:tab-stop style:position="17cm" style:type="right"/>
        </style:tab-stops>
      </style:paragraph-properties>
      <style:text-properties style:font-name="Times New Roman" fo:font-size="13pt" fo:font-weight="bold" officeooo:rsid="000372ca" style:font-size-asian="13pt" style:font-weight-asian="bold" style:font-size-complex="13pt" style:font-weight-complex="bold"/>
    </style:style>
    <style:style style:name="P925" style:family="paragraph" style:parent-style-name="Text_20_body" style:list-style-name="L43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26" style:family="paragraph" style:parent-style-name="Text_20_body" style:list-style-name="L43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27" style:family="paragraph" style:parent-style-name="Text_20_body" style:list-style-name="L43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28" style:family="paragraph" style:parent-style-name="Text_20_body" style:list-style-name="L43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29" style:family="paragraph" style:parent-style-name="Text_20_body" style:list-style-name="L43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30" style:family="paragraph" style:parent-style-name="Text_20_body" style:list-style-name="L43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31" style:family="paragraph" style:parent-style-name="Text_20_body" style:list-style-name="L43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32" style:family="paragraph" style:parent-style-name="Text_20_body" style:list-style-name="L43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33" style:family="paragraph" style:parent-style-name="Text_20_body" style:list-style-name="L43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34" style:family="paragraph" style:parent-style-name="Text_20_body" style:list-style-name="L43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35" style:family="paragraph" style:parent-style-name="Text_20_body" style:list-style-name="L44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36" style:family="paragraph" style:parent-style-name="Text_20_body" style:list-style-name="L44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37" style:family="paragraph" style:parent-style-name="Text_20_body" style:list-style-name="L44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38" style:family="paragraph" style:parent-style-name="Text_20_body" style:list-style-name="L44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39" style:family="paragraph" style:parent-style-name="Text_20_body" style:list-style-name="L44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40" style:family="paragraph" style:parent-style-name="Text_20_body" style:list-style-name="L44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41" style:family="paragraph" style:parent-style-name="Text_20_body" style:list-style-name="L44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42" style:family="paragraph" style:parent-style-name="Text_20_body" style:list-style-name="L44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43" style:family="paragraph" style:parent-style-name="Text_20_body" style:list-style-name="L44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44" style:family="paragraph" style:parent-style-name="Text_20_body" style:list-style-name="L44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45" style:family="paragraph" style:parent-style-name="Text_20_body" style:list-style-name="L44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46" style:family="paragraph" style:parent-style-name="Text_20_body" style:list-style-name="L44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47" style:family="paragraph" style:parent-style-name="Text_20_body" style:list-style-name="L44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48" style:family="paragraph" style:parent-style-name="Text_20_body" style:list-style-name="L44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49" style:family="paragraph" style:parent-style-name="Text_20_body" style:list-style-name="L44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50" style:family="paragraph" style:parent-style-name="Text_20_body" style:list-style-name="L44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51" style:family="paragraph" style:parent-style-name="Text_20_body" style:list-style-name="L448">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52" style:family="paragraph" style:parent-style-name="Text_20_body" style:list-style-name="L448">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53" style:family="paragraph" style:parent-style-name="Text_20_body" style:list-style-name="L449">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54" style:family="paragraph" style:parent-style-name="Text_20_body" style:list-style-name="L449">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55" style:family="paragraph" style:parent-style-name="Text_20_body" style:list-style-name="L450">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56" style:family="paragraph" style:parent-style-name="Text_20_body" style:list-style-name="L450">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57" style:family="paragraph" style:parent-style-name="Text_20_body" style:list-style-name="L451">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58" style:family="paragraph" style:parent-style-name="Text_20_body" style:list-style-name="L451">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59" style:family="paragraph" style:parent-style-name="Text_20_body" style:list-style-name="L452">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60" style:family="paragraph" style:parent-style-name="Text_20_body" style:list-style-name="L452">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61" style:family="paragraph" style:parent-style-name="Text_20_body" style:list-style-name="L453">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62" style:family="paragraph" style:parent-style-name="Text_20_body" style:list-style-name="L453">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63" style:family="paragraph" style:parent-style-name="Text_20_body" style:list-style-name="L454">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64" style:family="paragraph" style:parent-style-name="Text_20_body" style:list-style-name="L454">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65" style:family="paragraph" style:parent-style-name="Text_20_body" style:list-style-name="L455">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66" style:family="paragraph" style:parent-style-name="Text_20_body" style:list-style-name="L455">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67" style:family="paragraph" style:parent-style-name="Text_20_body" style:list-style-name="L456">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68" style:family="paragraph" style:parent-style-name="Text_20_body" style:list-style-name="L456">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P969" style:family="paragraph" style:parent-style-name="Text_20_body" style:list-style-name="L457">
      <style:paragraph-properties fo:margin-top="0cm" fo:margin-bottom="0cm" style:contextual-spacing="false">
        <style:tab-stops>
          <style:tab-stop style:position="8.5cm" style:type="center"/>
          <style:tab-stop style:position="17cm" style:type="right"/>
        </style:tab-stops>
      </style:paragraph-properties>
      <style:text-properties style:font-name="Times New Roman" officeooo:rsid="000372ca" style:font-size-asian="12pt"/>
    </style:style>
    <style:style style:name="P970" style:family="paragraph" style:parent-style-name="Text_20_body" style:list-style-name="L457">
      <style:paragraph-properties>
        <style:tab-stops>
          <style:tab-stop style:position="8.5cm" style:type="center"/>
          <style:tab-stop style:position="17cm" style:type="right"/>
        </style:tab-stops>
      </style:paragraph-properties>
      <style:text-properties style:font-name="Times New Roman" officeooo:rsid="000372ca" style:font-size-asian="12pt"/>
    </style:style>
    <style:style style:name="T1" style:family="text">
      <style:text-properties style:font-name="Times New Roman" fo:font-size="16pt" style:text-underline-style="none" fo:font-weight="bold" style:font-size-asian="16pt" style:font-weight-asian="bold" style:font-size-complex="16pt" style:font-weight-complex="bold"/>
    </style:style>
    <style:style style:name="T2" style:family="text">
      <style:text-properties style:font-name="Times New Roman" fo:font-size="12pt" style:text-underline-style="none" fo:font-weight="bold" style:font-size-asian="12pt" style:font-weight-asian="bold" style:font-size-complex="12pt" style:font-weight-complex="bold"/>
    </style:style>
    <style:style style:name="T3" style:family="text">
      <style:text-properties style:font-name="Times New Roman" fo:font-size="12pt" style:text-underline-style="none" fo:font-weight="normal" style:font-size-asian="12pt" style:font-weight-asian="normal" style:font-size-complex="12pt" style:font-weight-complex="normal"/>
    </style:style>
    <style:style style:name="T4" style:family="text">
      <style:text-properties style:font-name="Times New Roman" fo:font-size="12pt" style:text-underline-style="none" fo:font-weight="normal" officeooo:rsid="000372ca" style:font-size-asian="12pt" style:font-weight-asian="normal" style:font-size-complex="12pt" style:font-weight-complex="normal"/>
    </style:style>
    <style:style style:name="T5" style:family="text">
      <style:text-properties style:font-name="Times New Roman" fo:font-size="12pt" style:text-underline-style="none" fo:font-weight="bold" officeooo:rsid="000372ca" style:font-size-asian="12pt" style:font-weight-asian="bold" style:font-size-complex="12pt" style:font-weight-complex="bold"/>
    </style:style>
    <style:style style:name="T6" style:family="text">
      <style:text-properties style:font-name="Times New Roman" fo:font-size="12pt" style:text-underline-style="none" fo:font-weight="normal" officeooo:rsid="0003ec05" style:font-size-asian="12pt" style:font-weight-asian="normal" style:font-size-complex="12pt" style:font-weight-complex="normal"/>
    </style:style>
    <style:style style:name="T7" style:family="text">
      <style:text-properties style:font-name="Times New Roman" fo:font-size="12pt" style:text-underline-style="none" fo:font-weight="bold" officeooo:rsid="0003ec05" style:font-size-asian="12pt" style:font-weight-asian="bold" style:font-size-complex="12pt" style:font-weight-complex="bold"/>
    </style:style>
    <style:style style:name="T8" style:family="text">
      <style:text-properties style:font-name="Times New Roman" fo:font-size="16pt" style:text-underline-style="none" fo:font-weight="bold" officeooo:rsid="000372ca" style:font-size-asian="16pt" style:font-weight-asian="bold" style:font-size-complex="16pt" style:font-weight-complex="bold"/>
    </style:style>
    <style:style style:name="T9" style:family="text">
      <style:text-properties style:font-name="Times New Roman" fo:font-size="16pt" style:text-underline-style="none" fo:font-weight="normal" officeooo:rsid="000372ca" style:font-size-asian="16pt" style:font-weight-asian="normal" style:font-size-complex="16pt" style:font-weight-complex="normal"/>
    </style:style>
    <style:style style:name="T10" style:family="text">
      <style:text-properties fo:font-weight="normal" style:font-weight-asian="normal" style:font-weight-complex="normal"/>
    </style:style>
    <style:style style:name="T11" style:family="text">
      <style:text-properties style:font-name="Times New Roman" officeooo:rsid="000372ca" style:font-size-asian="12pt"/>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5pt" fo:font-weight="bold" style:font-size-asian="15pt" style:font-weight-asian="bold" style:font-size-complex="15pt" style:font-weight-complex="bold"/>
    </style:style>
    <style:style style:name="T15" style:family="text">
      <style:text-properties fo:font-weight="bold" style:font-weight-asian="bold" style:font-weight-complex="bold"/>
    </style:style>
    <style:style style:name="T16" style:family="text">
      <style:text-properties fo:font-size="12pt" style:font-size-asian="12pt" style:font-size-complex="12pt"/>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style:font-name="Times New Roman" fo:font-size="14pt" style:text-underline-style="none" fo:font-weight="normal" officeooo:rsid="000372ca" style:font-size-asian="14pt" style:font-weight-asian="normal" style:font-size-complex="14pt"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ize="12pt" style:font-size-complex="12pt"/>
    </style:style>
    <style:style style:name="T22" style:family="text">
      <style:text-properties style:font-name="Times New Roman" fo:font-size="14pt" style:text-underline-style="none" fo:font-weight="bold" officeooo:rsid="000372ca" style:font-size-asian="14pt" style:font-weight-asian="bold" style:font-size-complex="14pt" style:font-weight-complex="bold"/>
    </style:style>
    <style:style style:name="T23" style:family="text">
      <style:text-properties officeooo:rsid="00197ae2"/>
    </style:style>
    <style:style style:name="T24" style:family="text">
      <style:text-properties fo:font-size="15pt" style:font-size-asian="15pt" style:font-size-complex="15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CERTIFICATE</text:span></text:span></text:p>
      <text:p text:style-name="P1"><text:span text:style-name="T2">This is to certify that the project titled </text:span><text:span text:style-name="Strong_20_Emphasis"><text:span text:style-name="T2">“Customer Segmentation using</text:span></text:span><text:span text:style-name="Strong_20_Emphasis"><text:span text:style-name="T3"> R</text:span></text:span><text:span text:style-name="Strong_20_Emphasis"><text:span text:style-name="T4">FM</text:span></text:span><text:span text:style-name="Strong_20_Emphasis"><text:span text:style-name="T2"> Analysis”</text:span></text:span><text:span text:style-name="T2"> is a bona fide work carried out by </text:span><text:span text:style-name="Strong_20_Emphasis"><text:span text:style-name="T2">[Your Name]</text:span></text:span><text:span text:style-name="T2">, bearing Roll Number </text:span><text:span text:style-name="Strong_20_Emphasis"><text:span text:style-name="T2">[Your Roll Number]</text:span></text:span><text:span text:style-name="T2">, in partial fulfilment of the requirements for the award of the degree/course in </text:span><text:span text:style-name="Strong_20_Emphasis"><text:span text:style-name="T2">[Your Course Name]</text:span></text:span><text:span text:style-name="T2">.</text:span></text:p>
      <text:p text:style-name="P1"><text:span text:style-name="T2">This project has been completed under my supervision and guidance during the academic year </text:span><text:span text:style-name="Strong_20_Emphasis"><text:span text:style-name="T2">2025–2026</text:span></text:span><text:span text:style-name="T2">. The work presented in this project is original and has not been submitted previously, either in full or in part, to any other institution or university for the award of any degree or diploma.</text:span></text:p>
      <text:p text:style-name="P2">To the best of my knowledge, the project work carried out by the student is satisfactory and meets the academic standards required for submission.</text:p>
      <text:p text:style-name="P1"><text:span text:style-name="Strong_20_Emphasis"><text:span text:style-name="T2">Project Guide Signature</text:span></text:span><text:span text:style-name="T2"><text:line-break/>Name: </text:span><text:span text:style-name="T5"><text:s text:c="24"/></text:span><text:span text:style-name="T4"><text:s/>Guggilla Upendrachary</text:span><text:span text:style-name="T2"><text:line-break/>Designation: <text:s text:c="15"/></text:span><text:span text:style-name="T5">Data Analytics</text:span></text:p>
      <text:p text:style-name="P1"><text:span text:style-name="Strong_20_Emphasis"><text:span text:style-name="T5">Batch Number: <text:s text:c="10"/>DA|TE-BN007</text:span></text:span></text:p>
      <text:p text:style-name="P1"><text:span text:style-name="Strong_20_Emphasis"><text:span text:style-name="T5">Institutional Name: <text:s text:c="5"/>Entri Elevate Software Solution pvt.ltd</text:span></text:span></text:p>
      <text:p text:style-name="P1"><text:span text:style-name="Strong_20_Emphasis"><text:span text:style-name="T2">Place: <text:s text:c="13"/></text:span></text:span><text:span text:style-name="Strong_20_Emphasis"><text:span text:style-name="T5">khammam</text:span></text:span><text:span text:style-name="T2"><text:line-break/></text:span><text:span text:style-name="Strong_20_Emphasis"><text:span text:style-name="T2">Date: <text:s text:c="14"/></text:span></text:span><text:span text:style-name="Strong_20_Emphasis"><text:span text:style-name="T5">14/05/2026</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oft-page-break/><text:span text:style-name="Strong_20_Emphasis"><text:span text:style-name="T5"/></text:span></text:p>
      <text:p text:style-name="P1"><text:span text:style-name="Strong_20_Emphasis"><text:span text:style-name="T1">DECLARATION</text:span></text:span></text:p>
      <text:p text:style-name="P1"><text:span text:style-name="T3">I hereby declare that the project titled </text:span><text:span text:style-name="Strong_20_Emphasis"><text:span text:style-name="T3">“Customer Segmentation using RFM Analysis”</text:span></text:span><text:span text:style-name="T3"> submitted by me is a genuine and original piece of work carried out as part of my academic requirements. This project has been completed under the guidance and supervision of my faculty, and it has not been submitted previously, either in full or in part, to any other institution or university for the award of any degree, diploma, or certification.</text:span></text:p>
      <text:p text:style-name="P3">I confirm that all the data, analysis, and results presented in this project are based on my own efforts, except where due acknowledgment has been made. The dataset used for this project has been obtained from publicly available sources, and all necessary steps such as data cleaning, transformation, modelling, and analysis have been performed by me using appropriate tools and techniques including Excel, Python, SQL, and Power BI.</text:p>
      <text:p text:style-name="P3">I further declare that I have maintained academic integrity throughout the project work. Any external references, concepts, or methodologies used in this project have been properly cited and acknowledged in the references section. I understand that any form of plagiarism or misrepresentation of data would lead to disciplinary action as per institutional rules.</text:p>
      <text:p text:style-name="P3">This project reflects my understanding of data analytics concepts, particularly customer segmentation using RFM analysis, and demonstrates my ability to apply theoretical knowledge to practical business problems.</text:p>
      <text:p text:style-name="P3">I take full responsibility for the content of this project and assure that it is submitted in good faith for academic evaluation.</text:p>
      <text:p text:style-name="P1"><text:span text:style-name="Strong_20_Emphasis"><text:span text:style-name="T3">Place:</text:span></text:span><text:span text:style-name="T3"><text:line-break/></text:span><text:span text:style-name="Strong_20_Emphasis"><text:span text:style-name="T3">Date: <text:s text:c="15"/></text:span></text:span><text:span text:style-name="Strong_20_Emphasis"><text:span text:style-name="T6">Khammam</text:span></text:span></text:p>
      <text:p text:style-name="P1"><text:span text:style-name="Strong_20_Emphasis"><text:span text:style-name="T3">Signature of the Student : <text:s/></text:span></text:span><text:span text:style-name="Strong_20_Emphasis"><text:span text:style-name="T6">G. Upendrachary</text:span></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oft-page-break/><text:span text:style-name="Strong_20_Emphasis"><text:span text:style-name="T6"/></text:span></text:p>
      <text:p text:style-name="P4"><text:span text:style-name="Strong_20_Emphasis"><text:span text:style-name="T1">ACKNOWLEDGEMENT</text:span></text:span></text:p>
      <text:p text:style-name="P4"><text:span text:style-name="T3">I would like to express my sincere gratitude to all those who have contributed to the successful completion of this project titled </text:span><text:span text:style-name="Strong_20_Emphasis"><text:span text:style-name="T3">“Customer Segmentation using RFM Analysis.”</text:span></text:span></text:p>
      <text:p text:style-name="P5">First and foremost, I would like to thank my respected faculty and project guide for their continuous support, valuable guidance, and encouragement throughout the development of this project. Their insights, suggestions, and constructive feedback helped me understand the concepts clearly and complete the project effectively.</text:p>
      <text:p text:style-name="P5">I am also thankful to my institution for providing me with the necessary resources, infrastructure, and learning environment to carry out this work. The academic support and facilities provided played a crucial role in the successful execution of this project.</text:p>
      <text:p text:style-name="P5">I would like to extend my gratitude to all the online platforms, documentation sources, and dataset providers that helped me gain practical knowledge. Resources such as data analytics documentation, tutorials, and publicly available datasets were extremely useful in understanding real world applications of customer segmentation and RFM analysis.</text:p>
      <text:p text:style-name="P5">I am grateful to my friends and classmates for their support, discussions, and motivation during the project work. Their cooperation and encouragement helped me stay focused and complete the project on time.</text:p>
      <text:p text:style-name="P5">Finally, I would like to thank my family for their constant support, patience, and encouragement throughout my academic journey. Their belief in me has always been a source of motivation.</text:p>
      <text:p text:style-name="P5">This project has been a great learning experience, and I am thankful to everyone who directly or indirectly contributed to its successful completion.</text:p>
      <text:p text:style-name="P4"><text:span text:style-name="Strong_20_Emphasis"><text:span text:style-name="T3">Place:</text:span></text:span><text:span text:style-name="T3"><text:line-break/></text:span><text:span text:style-name="Strong_20_Emphasis"><text:span text:style-name="T3">Date: <text:s text:c="13"/></text:span></text:span><text:span text:style-name="Strong_20_Emphasis"><text:span text:style-name="T6">Khammam</text:span></text:span></text:p>
      <text:p text:style-name="P4"><text:span text:style-name="Strong_20_Emphasis"><text:span text:style-name="T3">Signature of the Student : </text:span></text:span><text:span text:style-name="Strong_20_Emphasis"><text:span text:style-name="T6">G.Upendrachary</text:span></text:span></text:p>
      <text:p text:style-name="P6"/>
      <text:p text:style-name="P6"/>
      <text:p text:style-name="P6"/>
      <text:p text:style-name="P6"/>
      <text:p text:style-name="P7"/>
      <text:p text:style-name="P7"/>
      <text:p text:style-name="P7"/>
      <text:p text:style-name="P7"/>
      <text:p text:style-name="P7"><text:span text:style-name="Strong_20_Emphasis"><text:span text:style-name="T7"/></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8"><text:soft-page-break/><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5"/></text:span></text:p>
      <text:p text:style-name="P4"><text:span text:style-name="Strong_20_Emphasis"><text:span text:style-name="T1">ABSTRACT</text:span></text:span></text:p>
      <text:p text:style-name="P4"><text:span text:style-name="T3">In today’s competitive business environment, understanding customer behaviour is essential for improving marketing strategies and increasing profitability. This project focuses on </text:span><text:span text:style-name="Strong_20_Emphasis"><text:span text:style-name="T3">Customer Segmentation using RFM Analysis</text:span></text:span><text:span text:style-name="T3">, a widely used analytical technique that helps businesses classify customers based on their purchasing behaviour.</text:span></text:p>
      <text:p text:style-name="P4"><text:span text:style-name="T3">The main objective of this project is to identify valuable customers and group them into meaningful segments using three key metrics: </text:span><text:span text:style-name="Strong_20_Emphasis"><text:span text:style-name="T3">Recency, Frequency, and Monetary value</text:span></text:span><text:span text:style-name="T3">. Recency measures how recently a customer has made a purchase, Frequency indicates how often a customer makes purchases, and Monetary represents the total amount spent by the customer. By analysing these factors, businesses can better understand customer value and take informed decisions.</text:span></text:p>
      <text:p text:style-name="P4"><text:span text:style-name="T3">The project uses an online retail dataset containing transaction level data such as customer ID, order date, sales, and product details. The raw dataset is first processed through </text:span><text:span text:style-name="Strong_20_Emphasis"><text:span text:style-name="T3">data cleaning techniques</text:span></text:span><text:span text:style-name="T3">, including removal of duplicates, handling missing values, and correcting data formats. After cleaning, the data is transformed and structured into a </text:span><text:span text:style-name="Strong_20_Emphasis"><text:span text:style-name="T3">star schema model</text:span></text:span><text:span text:style-name="T3">, consisting of fact and dimension tables, to improve data analysis efficiency.</text:span></text:p>
      <text:p text:style-name="P4"><text:span text:style-name="T3">RFM values are calculated using both </text:span><text:span text:style-name="Strong_20_Emphasis"><text:span text:style-name="T3">SQL and Python</text:span></text:span><text:span text:style-name="T3">, and customers are assigned scores based on their behaviour. These scores are then used to segment customers into categories such as </text:span><text:span text:style-name="Strong_20_Emphasis"><text:span text:style-name="T3">VIP customers, loyal customers, regular customers, at risk customers, and lost customers</text:span></text:span><text:span text:style-name="T3">. This segmentation helps businesses design targeted marketing strategies and improve customer retention.</text:span></text:p>
      <text:p text:style-name="P4"><text:span text:style-name="T3">To visualize the results, a </text:span><text:span text:style-name="Strong_20_Emphasis"><text:span text:style-name="T3">Power BI dashboard</text:span></text:span><text:span text:style-name="T3"> is developed, which includes KPI cards, bar charts, pie charts, and line charts. These visualisations provide clear insights into customer distribution, revenue contribution, and sales trends over time.</text:span></text:p>
      <text:p text:style-name="P5">The findings of this project highlight that a small group of high value customers contributes significantly to overall revenue, while some customers show signs of inactivity. This demonstrates the importance of customer segmentation in business decision making.</text:p>
      <text:p text:style-name="P5">In conclusion, this project successfully shows how RFM analysis can be used to analyze customer behaviour, improve marketing effectiveness, and support data driven decision making. The project can be further enhanced by incorporating advanced techniques such as machine learning models and predictive analytics in the future.</text:p>
      <text:p text:style-name="P6"/>
      <text:p text:style-name="P4"><text:span text:style-name="Strong_20_Emphasis"><text:span text:style-name="T2"/></text:span></text:p>
      <text:p text:style-name="P7"/>
      <text:p text:style-name="P7"/>
      <text:p text:style-name="P7"/>
      <text:p text:style-name="P7"/>
      <text:p text:style-name="P7"/>
      <text:p text:style-name="P7"/>
      <text:p text:style-name="P7"><text:soft-page-break/></text:p>
      <text:p text:style-name="P7"><text:span text:style-name="Strong_20_Emphasis"><text:span text:style-name="T5"/></text:span></text:p>
      <text:p text:style-name="P1"><text:span text:style-name="Strong_20_Emphasis"><text:span text:style-name="T5"/></text:span></text:p>
      <text:h text:style-name="P9" text:outline-level="1"><text:span text:style-name="Strong_20_Emphasis"><text:span text:style-name="T8">📑 INDEX (TABLE OF CONTENTS)</text:span></text:span></text:h>
      <text:h text:style-name="P10" text:outline-level="2">1. Project Overview</text:h>
      <text:p text:style-name="P11">1.1 Introduction<text:line-break/>1.2 Importance of Customer Segmentation<text:line-break/>1.3 Overview of RFM Analysis<text:line-break/>1.4 Business Problem Statement<text:line-break/>1.5 Proposed Solution</text:p>
      <text:h text:style-name="P10" text:outline-level="2">2. Objectives</text:h>
      <text:p text:style-name="P11">2.1 Main Objective<text:line-break/>2.2 Specific Objectives<text:line-break/>2.3 Business Goals<text:line-break/>2.4 Analytical Goals</text:p>
      <text:h text:style-name="P10" text:outline-level="2">3. Scope of the Project</text:h>
      <text:p text:style-name="P12">3.1 Scope of Customer Analytics<text:line-break/>3.2 Scope of Data Processing<text:line-break/>3.3 Scope of Visualisation<text:line-break/>3.4 Scope of Business Decision Making<text:line-break/>3.5 Limitations of the Project</text:p>
      <text:h text:style-name="P10" text:outline-level="2">4. Tools and Technologies</text:h>
      <text:p text:style-name="P12">4.1 Introduction to Tools<text:line-break/>4.2 SQL for Data Querying<text:line-break/>4.3 Python for Data Cleaning and Analysis<text:line-break/>4.4 Power BI for Dashboard Creation<text:line-break/>4.5 Excel as Raw Dataset Source<text:line-break/>4.6 Technology Architecture</text:p>
      <text:h text:style-name="P13" text:outline-level="2">5. Dataset Description</text:h>
      <text:p text:style-name="P12">5.1 Online Store Dataset Overview<text:line-break/>5.2 Dataset Source<text:line-break/>5.3 Features and Attributes<text:line-break/>5.4 Data Types and Structure<text:line-break/>5.5 Understanding Customer Information<text:line-break/>5.6 Understanding Product Information<text:line-break/>5.7 Understanding Sales Transactions</text:p>
      <text:h text:style-name="P10" text:outline-level="2"><text:soft-page-break/>6. Data Cleaning</text:h>
      <text:p text:style-name="P12">6.1 Importance of Data Cleaning<text:line-break/>6.2 Handling Missing Values<text:line-break/>6.3 Removing Duplicate Records<text:line-break/>6.4 Data Formatting<text:line-break/>6.5 Handling Null Values<text:line-break/>6.6 Removing Unwanted Columns<text:line-break/>6.7 Correcting Data Types<text:line-break/>6.8 Data Validation Process</text:p>
      <text:h text:style-name="P10" text:outline-level="2">7. Data Transformation</text:h>
      <text:p text:style-name="P12">7.1 Introduction to ETL Process<text:line-break/>7.2 Extract Process<text:line-break/>7.3 Transform Process<text:line-break/>7.4 Load Process<text:line-break/>7.5 Feature Engineering<text:line-break/>7.6 Creating Calculated Columns<text:line-break/>7.7 Data Aggregation<text:line-break/>7.8 Creating Customer Metrics</text:p>
      <text:h text:style-name="P10" text:outline-level="2">8. Data Modelling (Star Schema)</text:h>
      <text:p text:style-name="P12">8.1 Introduction to Data Modelling<text:line-break/>8.2 Importance of Star Schema<text:line-break/>8.3 Fact Table Design<text:line-break/>8.4 Dimension Tables Design<text:line-break/>8.5 Relationship Building<text:line-break/>8.6 Cardinality<text:line-break/>8.7 Schema Diagram Explanation<text:line-break/>8.8 Advantages of Star Schema</text:p>
      <text:h text:style-name="P13" text:outline-level="2">9. RFM Analysis</text:h>
      <text:p text:style-name="P12">9.1 Introduction to RFM<text:line-break/>9.2 Recency Analysis<text:line-break/>9.3 Frequency Analysis<text:line-break/>9.4 Monetary Analysis<text:line-break/>9.5 RFM Score Calculation<text:line-break/>9.6 Customer Segmentation Logic<text:line-break/>9.7 Customer Categories<text:line-break/>9.8 Business Value of RFM</text:p>
      <text:h text:style-name="P10" text:outline-level="2">10. SQL Implementation</text:h>
      <text:p text:style-name="P12">10.1 Introduction to SQL<text:line-break/>10.2 Database Creation<text:line-break/>10.3 Importing Dataset<text:line-break/><text:soft-page-break/>10.4 SQL Queries for Cleaning<text:line-break/>10.5 SQL Queries for Transformation<text:line-break/>10.6 Aggregate Functions<text:line-break/>10.7 GROUP BY and ORDER BY<text:line-break/>10.8 JOIN Operations<text:line-break/>10.9 Window Functions<text:line-break/>10.10 SQL Queries for RFM Analysis<text:line-break/>10.11 SQL Optimisation Techniques</text:p>
      <text:h text:style-name="P10" text:outline-level="2">11. Python Implementation</text:h>
      <text:p text:style-name="P12">11.1 Introduction to Python<text:line-break/>11.2 Python Libraries Used<text:line-break/>11.3 Importing Dataset using Pandas<text:line-break/>11.4 Data Cleaning using Python<text:line-break/>11.5 Data Transformation using Python<text:line-break/>11.6 Exploratory Data Analysis<text:line-break/>11.7 RFM Calculation using Python<text:line-break/>11.8 Data Visualisation using Matplotlib<text:line-break/>11.9 Exporting Final Dataset</text:p>
      <text:h text:style-name="P10" text:outline-level="2">12. Power BI Dashboard</text:h>
      <text:p text:style-name="P12">12.1 Introduction to Power BI<text:line-break/>12.2 Importing Data into Power BI<text:line-break/>12.3 Data Modelling in Power BI<text:line-break/>12.4 DAX Calculations<text:line-break/>12.5 KPI Cards<text:line-break/>12.6 Bar Charts<text:line-break/>12.7 Pie Charts<text:line-break/>12.8 Line Charts<text:line-break/>12.9 Scatter Charts<text:line-break/>12.10 Customer Segmentation Dashboard<text:line-break/>12.11 Interactive Filters and Slicers<text:line-break/>12.12 Dashboard Design Best Practices</text:p>
      <text:h text:style-name="P10" text:outline-level="2">13. Data Analysis and Insights</text:h>
      <text:p text:style-name="P12">13.1 Sales Performance Analysis<text:line-break/>13.2 Customer Purchase Behaviour<text:line-break/>13.3 High Value Customers<text:line-break/>13.4 Low Value Customers<text:line-break/>13.5 Product Category Analysis<text:line-break/>13.6 Revenue Contribution Analysis<text:line-break/>13.7 Customer Retention Insights<text:line-break/>13.8 Business Recommendations</text:p>
      <text:h text:style-name="P10" text:outline-level="2"><text:soft-page-break/>14. Conclusion</text:h>
      <text:p text:style-name="P12">14.1 Summary of the Project<text:line-break/>14.2 Key Findings<text:line-break/>14.3 Business Impact<text:line-break/>14.4 Learning Outcomes</text:p>
      <text:h text:style-name="P10" text:outline-level="2">15. Future Scope</text:h>
      <text:p text:style-name="P12">15.1 AI Based Customer Prediction<text:line-break/>15.2 Machine Learning Integration<text:line-break/>15.3 Real Time Dashboard Development<text:line-break/>15.4 Cloud Database Integration<text:line-break/>15.5 Advanced Customer Analytics</text:p>
      <text:h text:style-name="P10" text:outline-level="2">16. References</text:h>
      <text:p text:style-name="P12">16.1 Research Papers<text:line-break/>16.2 Online Articles<text:line-break/>16.3 Documentation References<text:line-break/>16.4 Books and Journals<text:line-break/>16.5 Dataset References</text:p>
      <text:p text:style-name="P1"><text:span text:style-name="Strong_20_Emphasis"><text:span text:style-name="T4"><text:tab/></text:span></text:span></text:p>
      <text:h text:style-name="P9" text:outline-level="1"><text:span text:style-name="Strong_20_Emphasis"><text:span text:style-name="T9">CHAPTER 1</text:span></text:span></text:h>
      <text:h text:style-name="P14" text:outline-level="1">PROJECT OVERVIEW</text:h>
      <text:h text:style-name="P15" text:outline-level="2">1.1 Introduction</text:h>
      <text:p text:style-name="P12">Customer segmentation is one of the most important analytical methods used in modern business organisations. Every business organisation wants to understand customer behaviour, customer purchasing patterns, customer preferences, and customer value. In the competitive business environment, companies cannot treat all customers equally because every customer contributes differently to the business revenue and profit. Some customers purchase products frequently and generate high revenue, while some customers purchase occasionally and contribute less revenue. Therefore, organisations need a proper analytical method to identify valuable customers and understand their buying behaviour.</text:p>
      <text:p text:style-name="P12">RFM Analysis is one of the most effective customer segmentation techniques used in marketing analytics and customer relationship management. RFM stands for Recency, Frequency, and Monetary value. This technique helps organisations classify customers based on their transaction history and purchasing activities. Businesses can use this information to improve customer satisfaction, increase customer retention, improve marketing campaigns, and maximise profits.</text:p>
      <text:p text:style-name="P12">In this project, an Online Super Store dataset is used to perform Customer Segmentation using RFM Analysis. The project involves multiple stages such as data cleaning, data transformation, SQL implementation, Python analysis, star schema modelling, and Power BI dashboard development. <text:soft-page-break/>The project provides practical knowledge about how raw business data can be converted into meaningful insights using data analytics tools and technologies.</text:p>
      <text:p text:style-name="P12">The project mainly focuses on identifying high value customers, inactive customers, loyal customers, and potential customers by analysing transaction data. The analysis helps business organisations make better decisions regarding customer engagement, sales strategies, promotional campaigns, and retention programs.</text:p>
      <text:p text:style-name="P12">This project also demonstrates the integration of multiple technologies such as SQL, Python, and Power BI. SQL is used for querying and data transformation. Python is used for data cleaning, exploratory data analysis, and RFM calculations. Power BI is used for interactive dashboards and visual analytics. The combination of these technologies provides a complete end to end data analytics solution.</text:p>
      <text:p text:style-name="P12">The Online Super Store dataset contains customer details, product details, sales transactions, shipping information, and profit information. The dataset is transformed into a star schema model to improve analytical performance and reporting efficiency. The star schema model consists of fact tables and dimension tables that support efficient querying and visualisation.</text:p>
      <text:p text:style-name="P12">The project helps understand real world business analytics concepts and demonstrates how customer data can be transformed into business intelligence. It also improves technical skills in SQL, Python programming, Power BI visualisation, data modelling, and data analytics.</text:p>
      <text:p text:style-name="P16"/>
      <text:h text:style-name="P15" text:outline-level="2">1.2 Background of the Study</text:h>
      <text:p text:style-name="P12">In the digital business world, customer data is generated continuously through online purchases, mobile applications, payment systems, and e commerce platforms. Organisations collect huge volumes of customer transaction data every day. However, raw data alone does not provide business value unless it is analysed properly.</text:p>
      <text:p text:style-name="P12">Traditional marketing methods focus on general promotional activities without understanding individual customer behaviour. Modern businesses require personalised marketing strategies to improve customer satisfaction and customer retention. Customer segmentation techniques help organisations divide customers into different groups based on common characteristics.</text:p>
      <text:p text:style-name="P12">RFM Analysis is one of the oldest and most widely used customer segmentation techniques in business analytics. The concept of RFM Analysis is based on customer purchasing behavior. The assumption behind RFM Analysis is that customers who purchased recently, purchase frequently, and spend more money are more valuable to the business.</text:p>
      <text:p text:style-name="P12">The Recency component measures how recently a customer made a purchase. Customers who purchased recently are more likely to purchase again.</text:p>
      <text:p text:style-name="P12">The Frequency component measures how often a customer purchases products. Customers who purchase frequently are considered loyal customers.</text:p>
      <text:p text:style-name="P12">The Monetary component measures how much money a customer spends on purchases. Customers with higher spending are considered high value customers.</text:p>
      <text:p text:style-name="P12">By combining these three metrics, businesses can classify customers into multiple categories such as:</text:p>
      <text:list text:style-name="L1">
        <text:list-item>
          <text:p text:style-name="P17"><text:soft-page-break/>Loyal Customers</text:p>
        </text:list-item>
        <text:list-item>
          <text:p text:style-name="P17">Premium Customers</text:p>
        </text:list-item>
        <text:list-item>
          <text:p text:style-name="P17">Potential Customers</text:p>
        </text:list-item>
        <text:list-item>
          <text:p text:style-name="P17">At Risk Customers</text:p>
        </text:list-item>
        <text:list-item>
          <text:p text:style-name="P17">Lost Customers</text:p>
        </text:list-item>
        <text:list-item>
          <text:p text:style-name="P17">Occasional Buyers</text:p>
        </text:list-item>
        <text:list-item>
          <text:p text:style-name="P17">High Spending Customers</text:p>
        </text:list-item>
        <text:list-item>
          <text:p text:style-name="P18">Low Spending Customers</text:p>
        </text:list-item>
      </text:list>
      <text:p text:style-name="P12">Customer segmentation helps organisations improve marketing efficiency by targeting the right customers with the right products and services. It also reduces marketing costs because organisations can focus their resources on profitable customers.</text:p>
      <text:p text:style-name="P12">The rapid growth of business intelligence tools and analytics platforms has increased the importance of customer analytics in organisations. Companies such as Amazon, Flipkart, Netflix, and Spotify use customer segmentation techniques to recommend products and improve customer engagement.</text:p>
      <text:p text:style-name="P12">This project applies RFM Analysis on an Online Super Store dataset to identify customer segments and generate meaningful business insights.</text:p>
      <text:p text:style-name="P16"/>
      <text:h text:style-name="P15" text:outline-level="2">1.3 Problem Statement</text:h>
      <text:p text:style-name="P12">Many business organisations collect large amounts of sales and customer data but fail to utilize the data effectively for decision making. The absence of proper customer analysis leads to several business challenges such as:</text:p>
      <text:list text:style-name="L2">
        <text:list-item>
          <text:p text:style-name="P19">Poor customer retention</text:p>
        </text:list-item>
        <text:list-item>
          <text:p text:style-name="P19">Ineffective marketing campaigns</text:p>
        </text:list-item>
        <text:list-item>
          <text:p text:style-name="P19">Low customer satisfaction</text:p>
        </text:list-item>
        <text:list-item>
          <text:p text:style-name="P19">Reduced sales performance</text:p>
        </text:list-item>
        <text:list-item>
          <text:p text:style-name="P19">Lack of understanding about customer behaviour</text:p>
        </text:list-item>
        <text:list-item>
          <text:p text:style-name="P19">Difficulty in identifying valuable customers</text:p>
        </text:list-item>
        <text:list-item>
          <text:p text:style-name="P19">Increased customer churn</text:p>
        </text:list-item>
        <text:list-item>
          <text:p text:style-name="P20">Inefficient resource allocation</text:p>
        </text:list-item>
      </text:list>
      <text:p text:style-name="P12">The Online Super Store business generates huge transaction data through online purchases. However, without proper analysis, it becomes difficult to identify customer purchasing patterns and customer value.</text:p>
      <text:p text:style-name="P12">The major problem addressed in this project is how to analyze customer transaction data effectively and segment customers based on purchasing behaviour using RFM Analysis.</text:p>
      <text:p text:style-name="P12">The project aims to solve the following problems:</text:p>
      <text:list text:style-name="L3">
        <text:list-item>
          <text:p text:style-name="P21">How to identify loyal customers</text:p>
        </text:list-item>
        <text:list-item>
          <text:p text:style-name="P21">How to identify inactive customers</text:p>
        </text:list-item>
        <text:list-item>
          <text:p text:style-name="P21">How to identify high spending customers</text:p>
        </text:list-item>
        <text:list-item>
          <text:p text:style-name="P21">How to improve customer retention</text:p>
        </text:list-item>
        <text:list-item>
          <text:p text:style-name="P21">How to improve business decision making using data analytics</text:p>
        </text:list-item>
        <text:list-item>
          <text:p text:style-name="P22"><text:soft-page-break/>How to transform raw transaction data into meaningful insights</text:p>
        </text:list-item>
      </text:list>
      <text:p text:style-name="P12">The project uses SQL, Python, and Power BI technologies to solve these business problems and provide analytical solutions.</text:p>
      <text:p text:style-name="P16"/>
      <text:h text:style-name="P15" text:outline-level="2">1.4 Need for the Project</text:h>
      <text:p text:style-name="P12">Customer segmentation has become an essential requirement for modern businesses. Organisations need analytical systems to understand customer behaviour and improve business performance.</text:p>
      <text:p text:style-name="P12">The major need for this project includes:</text:p>
      <text:h text:style-name="P23" text:outline-level="3">Improving Customer Retention</text:h>
      <text:p text:style-name="P12">Retaining existing customers is more profitable than acquiring new customers. By identifying loyal customers and at risk customers, organisations can design better retention strategies.</text:p>
      <text:h text:style-name="P23" text:outline-level="3">Increasing Sales Revenue</text:h>
      <text:p text:style-name="P12">Businesses can improve sales revenue by targeting high value customers with personalised offers and promotional campaigns.</text:p>
      <text:h text:style-name="P23" text:outline-level="3">Enhancing Customer Experience</text:h>
      <text:p text:style-name="P12">Customer segmentation helps organisations understand customer preferences and provide personalised services.</text:p>
      <text:h text:style-name="P23" text:outline-level="3">Better Marketing Strategies</text:h>
      <text:p text:style-name="P12">Organisations can reduce marketing costs and improve campaign effectiveness by targeting specific customer groups.</text:p>
      <text:h text:style-name="P23" text:outline-level="3">Business Intelligence Development</text:h>
      <text:p text:style-name="P12">The project demonstrates how data analytics tools can convert raw data into business intelligence.</text:p>
      <text:h text:style-name="P23" text:outline-level="3">Learning Analytical Skills</text:h>
      <text:p text:style-name="P12">The project provides practical knowledge about:</text:p>
      <text:list text:style-name="L4">
        <text:list-item>
          <text:p text:style-name="P24">SQL querying</text:p>
        </text:list-item>
        <text:list-item>
          <text:p text:style-name="P24">Python programming</text:p>
        </text:list-item>
        <text:list-item>
          <text:p text:style-name="P24">Data cleaning</text:p>
        </text:list-item>
        <text:list-item>
          <text:p text:style-name="P24">Data transformation</text:p>
        </text:list-item>
        <text:list-item>
          <text:p text:style-name="P24">Power BI visualisation</text:p>
        </text:list-item>
        <text:list-item>
          <text:p text:style-name="P24">Data modelling</text:p>
        </text:list-item>
        <text:list-item>
          <text:p text:style-name="P25">Business analytics</text:p>
        </text:list-item>
      </text:list>
      <text:h text:style-name="P23" text:outline-level="3">Real World Business Application</text:h>
      <text:p text:style-name="P12">The project reflects real business scenarios where organisations use customer analytics to improve business operations and profitability.</text:p>
      <text:h text:style-name="P15" text:outline-level="2"><text:soft-page-break/>1.5 Objectives of the Project</text:h>
      <text:p text:style-name="P12">The main objective of this project is to perform Customer Segmentation using RFM Analysis on an Online Super Store dataset and generate business insights using SQL, Python, and Power BI.</text:p>
      <text:h text:style-name="P23" text:outline-level="3">Primary Objectives</text:h>
      <text:list text:style-name="L5">
        <text:list-item>
          <text:p text:style-name="P26">To analyze customer purchasing behaviour using RFM Analysis</text:p>
        </text:list-item>
        <text:list-item>
          <text:p text:style-name="P26">To identify loyal customers and high value customers</text:p>
        </text:list-item>
        <text:list-item>
          <text:p text:style-name="P26">To transform raw transaction data into analytical datasets</text:p>
        </text:list-item>
        <text:list-item>
          <text:p text:style-name="P26">To create a star schema data model</text:p>
        </text:list-item>
        <text:list-item>
          <text:p text:style-name="P26">To build interactive Power BI dashboards</text:p>
        </text:list-item>
        <text:list-item>
          <text:p text:style-name="P27">To generate business insights from customer transaction data</text:p>
        </text:list-item>
      </text:list>
      <text:h text:style-name="P23" text:outline-level="3">Secondary Objectives</text:h>
      <text:list text:style-name="L6">
        <text:list-item>
          <text:p text:style-name="P28">To perform data cleaning and transformation</text:p>
        </text:list-item>
        <text:list-item>
          <text:p text:style-name="P28">To implement SQL queries for analytical operations</text:p>
        </text:list-item>
        <text:list-item>
          <text:p text:style-name="P28">To use Python for exploratory data analysis</text:p>
        </text:list-item>
        <text:list-item>
          <text:p text:style-name="P28">To calculate Recency, Frequency, and Monetary metrics</text:p>
        </text:list-item>
        <text:list-item>
          <text:p text:style-name="P28">To classify customers into different segments</text:p>
        </text:list-item>
        <text:list-item>
          <text:p text:style-name="P29">To improve understanding of business analytics concepts</text:p>
        </text:list-item>
      </text:list>
      <text:h text:style-name="P23" text:outline-level="3">Technical Objectives</text:h>
      <text:list text:style-name="L7">
        <text:list-item>
          <text:p text:style-name="P30">To use SQL for data querying and aggregation</text:p>
        </text:list-item>
        <text:list-item>
          <text:p text:style-name="P30">To use Python libraries such as Pandas and Matplotlib</text:p>
        </text:list-item>
        <text:list-item>
          <text:p text:style-name="P30">To use Power BI for dashboard visualisation</text:p>
        </text:list-item>
        <text:list-item>
          <text:p text:style-name="P30">To create relationships between tables using star schema modelling</text:p>
        </text:list-item>
        <text:list-item>
          <text:p text:style-name="P31">To generate calculated measures and KPIs</text:p>
        </text:list-item>
      </text:list>
      <text:h text:style-name="P15" text:outline-level="2">1.6 Scope of the Project</text:h>
      <text:p text:style-name="P12">The scope of the project defines the boundaries and limitations of the analysis.</text:p>
      <text:h text:style-name="P23" text:outline-level="3">Included Scope</text:h>
      <text:p text:style-name="P12">The project includes the following activities:</text:p>
      <text:list text:style-name="L8">
        <text:list-item>
          <text:p text:style-name="P32">Importing the Online Super Store dataset</text:p>
        </text:list-item>
        <text:list-item>
          <text:p text:style-name="P32">Cleaning and preprocessing the data</text:p>
        </text:list-item>
        <text:list-item>
          <text:p text:style-name="P32">Handling missing values and duplicates</text:p>
        </text:list-item>
        <text:list-item>
          <text:p text:style-name="P32">Creating transformed datasets</text:p>
        </text:list-item>
        <text:list-item>
          <text:p text:style-name="P32">Building star schema data models</text:p>
        </text:list-item>
        <text:list-item>
          <text:p text:style-name="P32">Performing RFM Analysis</text:p>
        </text:list-item>
        <text:list-item>
          <text:p text:style-name="P32">Segmenting customers</text:p>
        </text:list-item>
        <text:list-item>
          <text:p text:style-name="P32">Creating SQL queries</text:p>
        </text:list-item>
        <text:list-item>
          <text:p text:style-name="P32">Performing Python based analysis</text:p>
        </text:list-item>
        <text:list-item>
          <text:p text:style-name="P32">Building Power BI dashboards</text:p>
        </text:list-item>
        <text:list-item>
          <text:p text:style-name="P33">Generating business insights</text:p>
        </text:list-item>
      </text:list>
      <text:h text:style-name="P34" text:outline-level="3"><text:soft-page-break/>Excluded Scope</text:h>
      <text:p text:style-name="P12">The project does not include:</text:p>
      <text:list text:style-name="L9">
        <text:list-item>
          <text:p text:style-name="P35">Real time data processing</text:p>
        </text:list-item>
        <text:list-item>
          <text:p text:style-name="P35">Machine learning prediction models</text:p>
        </text:list-item>
        <text:list-item>
          <text:p text:style-name="P35">Cloud deployment</text:p>
        </text:list-item>
        <text:list-item>
          <text:p text:style-name="P35">Mobile application development</text:p>
        </text:list-item>
        <text:list-item>
          <text:p text:style-name="P35">Customer feedback analysis</text:p>
        </text:list-item>
        <text:list-item>
          <text:p text:style-name="P36">Social media analytics</text:p>
        </text:list-item>
      </text:list>
      <text:h text:style-name="P34" text:outline-level="3">Business Scope</text:h>
      <text:p text:style-name="P12">The project supports business decision making in areas such as:</text:p>
      <text:list text:style-name="L10">
        <text:list-item>
          <text:p text:style-name="P37">Customer retention</text:p>
        </text:list-item>
        <text:list-item>
          <text:p text:style-name="P37">Sales improvement</text:p>
        </text:list-item>
        <text:list-item>
          <text:p text:style-name="P37">Marketing strategy</text:p>
        </text:list-item>
        <text:list-item>
          <text:p text:style-name="P37">Customer engagement</text:p>
        </text:list-item>
        <text:list-item>
          <text:p text:style-name="P38">Revenue optimisation</text:p>
        </text:list-item>
      </text:list>
      <text:h text:style-name="P15" text:outline-level="2">1.7 Tools and Technologies Used</text:h>
      <text:p text:style-name="P12">The project uses multiple technologies for data analysis and visualization.</text:p>
      <text:h text:style-name="P23" text:outline-level="3">SQL</text:h>
      <text:p text:style-name="P12">SQL is used for:</text:p>
      <text:list text:style-name="L11">
        <text:list-item>
          <text:p text:style-name="P39">Data querying</text:p>
        </text:list-item>
        <text:list-item>
          <text:p text:style-name="P39">Data transformation</text:p>
        </text:list-item>
        <text:list-item>
          <text:p text:style-name="P39">Data aggregation</text:p>
        </text:list-item>
        <text:list-item>
          <text:p text:style-name="P39">Table creation</text:p>
        </text:list-item>
        <text:list-item>
          <text:p text:style-name="P39">Joining tables</text:p>
        </text:list-item>
        <text:list-item>
          <text:p text:style-name="P40">RFM calculations</text:p>
        </text:list-item>
      </text:list>
      <text:p text:style-name="P12">SQL helps organise and process transaction data efficiently.</text:p>
      <text:h text:style-name="P23" text:outline-level="3">Python</text:h>
      <text:p text:style-name="P12">Python is used for:</text:p>
      <text:list text:style-name="L12">
        <text:list-item>
          <text:p text:style-name="P41">Data cleaning</text:p>
        </text:list-item>
        <text:list-item>
          <text:p text:style-name="P41">Exploratory data analysis</text:p>
        </text:list-item>
        <text:list-item>
          <text:p text:style-name="P41">Data transformation</text:p>
        </text:list-item>
        <text:list-item>
          <text:p text:style-name="P41">RFM metric calculations</text:p>
        </text:list-item>
        <text:list-item>
          <text:p text:style-name="P42">Data visualisation</text:p>
        </text:list-item>
      </text:list>
      <text:p text:style-name="P12">Python libraries used in the project include:</text:p>
      <text:list text:style-name="L13">
        <text:list-item>
          <text:p text:style-name="P43">Pandas</text:p>
        </text:list-item>
        <text:list-item>
          <text:p text:style-name="P43">NumPy</text:p>
        </text:list-item>
        <text:list-item>
          <text:p text:style-name="P43">Matplotlib</text:p>
        </text:list-item>
        <text:list-item>
          <text:p text:style-name="P44">Seaborn</text:p>
        </text:list-item>
      </text:list>
      <text:h text:style-name="P23" text:outline-level="3"><text:soft-page-break/>Power BI</text:h>
      <text:p text:style-name="P12">Power BI is used for:</text:p>
      <text:list text:style-name="L14">
        <text:list-item>
          <text:p text:style-name="P45">Interactive dashboards</text:p>
        </text:list-item>
        <text:list-item>
          <text:p text:style-name="P45">KPI visualisation</text:p>
        </text:list-item>
        <text:list-item>
          <text:p text:style-name="P45">Customer segmentation reports</text:p>
        </text:list-item>
        <text:list-item>
          <text:p text:style-name="P45">Sales analysis</text:p>
        </text:list-item>
        <text:list-item>
          <text:p text:style-name="P46">Business intelligence reporting</text:p>
        </text:list-item>
      </text:list>
      <text:h text:style-name="P23" text:outline-level="3">Excel</text:h>
      <text:p text:style-name="P12">Excel is used as the source dataset containing Online Super Store transaction data.</text:p>
      <text:p text:style-name="P16"/>
      <text:h text:style-name="P15" text:outline-level="2">1.8 Overview of Dataset</text:h>
      <text:p text:style-name="P12">The Online Super Store dataset contains sales transactions from an online retail business. The dataset includes multiple attributes related to customers, products, sales, profits, orders, and shipping information.</text:p>
      <text:h text:style-name="P23" text:outline-level="3">Important Columns in the Dataset</text:h>
      <text:list text:style-name="L15">
        <text:list-item>
          <text:p text:style-name="P47">Order ID</text:p>
        </text:list-item>
        <text:list-item>
          <text:p text:style-name="P47">Customer ID</text:p>
        </text:list-item>
        <text:list-item>
          <text:p text:style-name="P47">Customer Name</text:p>
        </text:list-item>
        <text:list-item>
          <text:p text:style-name="P47">Product Name</text:p>
        </text:list-item>
        <text:list-item>
          <text:p text:style-name="P47">Category</text:p>
        </text:list-item>
        <text:list-item>
          <text:p text:style-name="P47">Sub Category</text:p>
        </text:list-item>
        <text:list-item>
          <text:p text:style-name="P47">Sales</text:p>
        </text:list-item>
        <text:list-item>
          <text:p text:style-name="P47">Quantity</text:p>
        </text:list-item>
        <text:list-item>
          <text:p text:style-name="P47">Profit</text:p>
        </text:list-item>
        <text:list-item>
          <text:p text:style-name="P47">Order Date</text:p>
        </text:list-item>
        <text:list-item>
          <text:p text:style-name="P47">Ship Date</text:p>
        </text:list-item>
        <text:list-item>
          <text:p text:style-name="P47">Region</text:p>
        </text:list-item>
        <text:list-item>
          <text:p text:style-name="P47">Segment</text:p>
        </text:list-item>
        <text:list-item>
          <text:p text:style-name="P47">City</text:p>
        </text:list-item>
        <text:list-item>
          <text:p text:style-name="P47">State</text:p>
        </text:list-item>
        <text:list-item>
          <text:p text:style-name="P48">Postal Code</text:p>
        </text:list-item>
      </text:list>
      <text:h text:style-name="P23" text:outline-level="3">Dataset Characteristics</text:h>
      <text:list text:style-name="L16">
        <text:list-item>
          <text:p text:style-name="P49">Structured dataset</text:p>
        </text:list-item>
        <text:list-item>
          <text:p text:style-name="P49">Transaction based data</text:p>
        </text:list-item>
        <text:list-item>
          <text:p text:style-name="P49">Multiple dimensions</text:p>
        </text:list-item>
        <text:list-item>
          <text:p text:style-name="P49">Sales and profit metrics</text:p>
        </text:list-item>
        <text:list-item>
          <text:p text:style-name="P50">Customer level information</text:p>
        </text:list-item>
      </text:list>
      <text:p text:style-name="P12">The dataset is transformed into dimension tables and fact tables to support analytical operations.</text:p>
      <text:p text:style-name="P16"/>
      <text:h text:style-name="P15" text:outline-level="2"><text:soft-page-break/>1.9 Expected Outcomes</text:h>
      <text:p text:style-name="P12">The expected outcomes of the project include:</text:p>
      <text:list text:style-name="L17">
        <text:list-item>
          <text:p text:style-name="P51">Identification of valuable customers</text:p>
        </text:list-item>
        <text:list-item>
          <text:p text:style-name="P51">Identification of inactive customers</text:p>
        </text:list-item>
        <text:list-item>
          <text:p text:style-name="P51">Improved understanding of customer behaviour</text:p>
        </text:list-item>
        <text:list-item>
          <text:p text:style-name="P51">Interactive dashboards for management reporting</text:p>
        </text:list-item>
        <text:list-item>
          <text:p text:style-name="P51">Business insights for decision making</text:p>
        </text:list-item>
        <text:list-item>
          <text:p text:style-name="P51">Improved analytical skills</text:p>
        </text:list-item>
        <text:list-item>
          <text:p text:style-name="P52">Complete end to end analytics project development</text:p>
        </text:list-item>
      </text:list>
      <text:p text:style-name="P12">The project demonstrates how customer transaction data can be converted into actionable business intelligence.</text:p>
      <text:p text:style-name="P16"/>
      <text:h text:style-name="P15" text:outline-level="2">1.10 Benefits of the Project</text:h>
      <text:p text:style-name="P12">The project provides benefits to both business organisations and learners.</text:p>
      <text:h text:style-name="P23" text:outline-level="3">Business Benefits</text:h>
      <text:list text:style-name="L18">
        <text:list-item>
          <text:p text:style-name="P53">Better customer understanding</text:p>
        </text:list-item>
        <text:list-item>
          <text:p text:style-name="P53">Improved customer retention</text:p>
        </text:list-item>
        <text:list-item>
          <text:p text:style-name="P53">Increased sales performance</text:p>
        </text:list-item>
        <text:list-item>
          <text:p text:style-name="P53">Effective marketing campaigns</text:p>
        </text:list-item>
        <text:list-item>
          <text:p text:style-name="P53">Improved decision making</text:p>
        </text:list-item>
        <text:list-item>
          <text:p text:style-name="P54">Revenue growth</text:p>
        </text:list-item>
      </text:list>
      <text:h text:style-name="P23" text:outline-level="3">Academic Benefits</text:h>
      <text:list text:style-name="L19">
        <text:list-item>
          <text:p text:style-name="P55">Understanding of RFM Analysis</text:p>
        </text:list-item>
        <text:list-item>
          <text:p text:style-name="P55">Knowledge of data analytics workflow</text:p>
        </text:list-item>
        <text:list-item>
          <text:p text:style-name="P55">Practical exposure to SQL and Python</text:p>
        </text:list-item>
        <text:list-item>
          <text:p text:style-name="P55">Dashboard creation skills</text:p>
        </text:list-item>
        <text:list-item>
          <text:p text:style-name="P55">Data modelling knowledge</text:p>
        </text:list-item>
        <text:list-item>
          <text:p text:style-name="P56">Business intelligence understanding</text:p>
        </text:list-item>
      </text:list>
      <text:h text:style-name="P23" text:outline-level="3">Career Benefits</text:h>
      <text:p text:style-name="P12">The project improves skills required for:</text:p>
      <text:list text:style-name="L20">
        <text:list-item>
          <text:p text:style-name="P57">Data Analyst roles</text:p>
        </text:list-item>
        <text:list-item>
          <text:p text:style-name="P57">Business Analyst roles</text:p>
        </text:list-item>
        <text:list-item>
          <text:p text:style-name="P57">Power BI Developer roles</text:p>
        </text:list-item>
        <text:list-item>
          <text:p text:style-name="P57">SQL Developer roles</text:p>
        </text:list-item>
        <text:list-item>
          <text:p text:style-name="P58">Data Visualisation roles</text:p>
        </text:list-item>
      </text:list>
      <text:h text:style-name="P15" text:outline-level="2">1.11 Conclusion</text:h>
      <text:p text:style-name="P12">This chapter provided an overview of the Customer Segmentation using RFM Analysis project based on the Online Super Store dataset. The chapter discussed the importance of customer <text:soft-page-break/>segmentation, background of the study, problem statement, objectives, project scope, tools and technologies, dataset overview, expected outcomes, and project benefits.</text:p>
      <text:p text:style-name="P12">The project demonstrates how customer transaction data can be transformed into meaningful business insights using analytical techniques and business intelligence tools. The integration of SQL, Python, and Power BI provides a complete analytical framework for customer segmentation and business reporting.</text:p>
      <text:p text:style-name="P12">The next chapter discusses the objectives and scope of the project in detail and explains the business goals associated with customer segmentation and RFM Analysis.</text:p>
      <text:h text:style-name="P59" text:outline-level="1">CHAPTER 2</text:h>
      <text:h text:style-name="P60" text:outline-level="1">OBJECTIVES AND SCOPE OF THE PROJECT</text:h>
      <text:h text:style-name="P61" text:outline-level="2">2.1 Introduction</text:h>
      <text:p text:style-name="P11">Every business organisation aims to increase customer satisfaction, improve customer retention, and maximise profits. In the modern business environment, customer data plays a major role in business decision making. Organisations collect huge amounts of customer transaction data through online shopping platforms, retail stores, payment systems, and e commerce applications. However, collecting data alone is not sufficient unless the data is properly analysed.</text:p>
      <text:p text:style-name="P11">Customer segmentation is a business analytical technique used to divide customers into different groups based on purchasing behaviour and transaction patterns. RFM Analysis is one of the most effective methods used for customer segmentation because it evaluates customer behaviour using three important metrics: Recency, Frequency, and Monetary value.</text:p>
      <text:p text:style-name="P11">This chapter explains the objectives and scope of the Customer Segmentation using RFM Analysis project based on the Online Super Store dataset. The chapter discusses business objectives, technical objectives, analytical objectives, project limitations, and future expansion opportunities.</text:p>
      <text:p text:style-name="P11">The project combines multiple technologies such as SQL, Python, and Power BI to create a complete data analytics solution. The main purpose of the project is to transform raw transaction data into meaningful business insights that support customer focused decision making.</text:p>
      <text:p text:style-name="P16"/>
      <text:h text:style-name="P62" text:outline-level="2">2.2 Main Objective of the Project</text:h>
      <text:p text:style-name="P11">The primary objective of this project is to perform Customer Segmentation using RFM Analysis on the Online Super Store dataset and generate meaningful business insights using data analytics tools.</text:p>
      <text:p text:style-name="P11">The project aims to:</text:p>
      <text:list text:style-name="L21">
        <text:list-item>
          <text:p text:style-name="P63">Analyze customer purchasing behaviour</text:p>
        </text:list-item>
        <text:list-item>
          <text:p text:style-name="P63">Identify high value customers</text:p>
        </text:list-item>
        <text:list-item>
          <text:p text:style-name="P63">Identify loyal customers</text:p>
        </text:list-item>
        <text:list-item>
          <text:p text:style-name="P63">Identify inactive customers</text:p>
        </text:list-item>
        <text:list-item>
          <text:p text:style-name="P63">Improve customer retention strategies</text:p>
        </text:list-item>
        <text:list-item>
          <text:p text:style-name="P63">Develop interactive dashboards</text:p>
        </text:list-item>
        <text:list-item>
          <text:p text:style-name="P64">Build analytical reports for business decision making</text:p>
        </text:list-item>
      </text:list>
      <text:p text:style-name="P11"><text:soft-page-break/>The project demonstrates how customer transaction data can be converted into actionable business intelligence using modern analytical techniques.</text:p>
      <text:h text:style-name="P61" text:outline-level="2">2.3 Specific Objectives</text:h>
      <text:p text:style-name="P11">The project contains multiple specific objectives related to business analytics, customer behaviour analysis, data transformation, and dashboard visualisation.</text:p>
      <text:h text:style-name="P23" text:outline-level="3">2.3.1 Customer Behaviour Analysis</text:h>
      <text:h text:style-name="P65" text:outline-level="3"><text:span text:style-name="Strong_20_Emphasis"><text:span text:style-name="T4">2.3.1 Customer Behaviour Analysis</text:span></text:span></text:h>
      <text:p text:style-name="P66">The project aims to understand customer purchasing patterns and transaction behaviour.</text:p>
      <text:p text:style-name="P66">The objectives include:</text:p>
      <text:list text:style-name="L22">
        <text:list-item>
          <text:p text:style-name="P67">Identifying recent customers</text:p>
        </text:list-item>
        <text:list-item>
          <text:p text:style-name="P67">Identifying frequent customers</text:p>
        </text:list-item>
        <text:list-item>
          <text:p text:style-name="P67">Identifying high spending customers</text:p>
        </text:list-item>
        <text:list-item>
          <text:p text:style-name="P67">Understanding customer purchase frequency</text:p>
        </text:list-item>
        <text:list-item>
          <text:p text:style-name="P68">Understanding customer contribution to revenue</text:p>
        </text:list-item>
      </text:list>
      <text:p text:style-name="P66">Customer behaviour analysis helps businesses design better marketing strategies and improve customer satisfaction.</text:p>
      <text:h text:style-name="P69" text:outline-level="3">2.3.2 Customer Segmentation</text:h>
      <text:p text:style-name="P66">The project aims to divide customers into different categories based on RFM scores.</text:p>
      <text:p text:style-name="P66">The customer categories include:</text:p>
      <text:list text:style-name="L23">
        <text:list-item>
          <text:p text:style-name="P70">Loyal Customers</text:p>
        </text:list-item>
        <text:list-item>
          <text:p text:style-name="P70">Premium Customers</text:p>
        </text:list-item>
        <text:list-item>
          <text:p text:style-name="P70">High Value Customers</text:p>
        </text:list-item>
        <text:list-item>
          <text:p text:style-name="P70">At Risk Customers</text:p>
        </text:list-item>
        <text:list-item>
          <text:p text:style-name="P70">Lost Customers</text:p>
        </text:list-item>
        <text:list-item>
          <text:p text:style-name="P70">Potential Customers</text:p>
        </text:list-item>
        <text:list-item>
          <text:p text:style-name="P70">Occasional Buyers</text:p>
        </text:list-item>
        <text:list-item>
          <text:p text:style-name="P71">New Customers</text:p>
        </text:list-item>
      </text:list>
      <text:p text:style-name="P66">Customer segmentation helps organisations target customers effectively and improve business performance.</text:p>
      <text:h text:style-name="P69" text:outline-level="3">2.3.3 Data Cleaning and Transformation</text:h>
      <text:p text:style-name="P12">The project aims to clean and preprocess the raw dataset before analysis.</text:p>
      <text:p text:style-name="P12">The data cleaning objectives include:</text:p>
      <text:list text:style-name="L24">
        <text:list-item>
          <text:p text:style-name="P72">Removing null values</text:p>
        </text:list-item>
        <text:list-item>
          <text:p text:style-name="P72">Removing duplicate records</text:p>
        </text:list-item>
        <text:list-item>
          <text:p text:style-name="P72">Correcting data types</text:p>
        </text:list-item>
        <text:list-item>
          <text:p text:style-name="P72">Handling missing values</text:p>
        </text:list-item>
        <text:list-item>
          <text:p text:style-name="P72">Removing unwanted columns</text:p>
        </text:list-item>
        <text:list-item>
          <text:p text:style-name="P73"><text:soft-page-break/>Standardising data formats</text:p>
        </text:list-item>
      </text:list>
      <text:p text:style-name="P74">Data transformation objectives include:</text:p>
      <text:list text:style-name="L25">
        <text:list-item>
          <text:p text:style-name="P75">Creating transformed datasets</text:p>
        </text:list-item>
        <text:list-item>
          <text:p text:style-name="P75">Creating calculated columns</text:p>
        </text:list-item>
        <text:list-item>
          <text:p text:style-name="P75">Aggregating customer data</text:p>
        </text:list-item>
        <text:list-item>
          <text:p text:style-name="P75">Creating analytical metrics</text:p>
        </text:list-item>
        <text:list-item>
          <text:p text:style-name="P76">Preparing datasets for reporting</text:p>
        </text:list-item>
      </text:list>
      <text:p text:style-name="P66">Proper data cleaning improves data quality and ensures accurate analysis.</text:p>
      <text:h text:style-name="P69" text:outline-level="3">2.3.4 Data Modelling Objectives</text:h>
      <text:p text:style-name="P12">The project aims to build a star schema model for analytical reporting.</text:p>
      <text:p text:style-name="P12">The objectives include:</text:p>
      <text:list text:style-name="L26">
        <text:list-item>
          <text:p text:style-name="P77">Creating fact tables</text:p>
        </text:list-item>
        <text:list-item>
          <text:p text:style-name="P77">Creating dimension tables</text:p>
        </text:list-item>
        <text:list-item>
          <text:p text:style-name="P77">Building relationships between tables</text:p>
        </text:list-item>
        <text:list-item>
          <text:p text:style-name="P77">Improving reporting performance</text:p>
        </text:list-item>
        <text:list-item>
          <text:p text:style-name="P78">Supporting dashboard analytics</text:p>
        </text:list-item>
      </text:list>
      <text:p text:style-name="P66"><text:span text:style-name="T10">The star schema model improves data organisation and reporting efficien</text:span>cy.</text:p>
      <text:h text:style-name="P69" text:outline-level="3">2.3.5 SQL Implementation Objectives</text:h>
      <text:p text:style-name="P66">SQL is used to process and analyze transaction data.</text:p>
      <text:p text:style-name="P66">The SQL objectives include:</text:p>
      <text:list text:style-name="L27">
        <text:list-item>
          <text:p text:style-name="P79">Creating database tables</text:p>
        </text:list-item>
        <text:list-item>
          <text:p text:style-name="P79">Writing SQL queries</text:p>
        </text:list-item>
        <text:list-item>
          <text:p text:style-name="P79">Performing aggregations</text:p>
        </text:list-item>
        <text:list-item>
          <text:p text:style-name="P79">Joining tables</text:p>
        </text:list-item>
        <text:list-item>
          <text:p text:style-name="P79">Calculating RFM metrics</text:p>
        </text:list-item>
        <text:list-item>
          <text:p text:style-name="P79">Filtering customer data</text:p>
        </text:list-item>
        <text:list-item>
          <text:p text:style-name="P80">Generating analytical reports</text:p>
        </text:list-item>
      </text:list>
      <text:p text:style-name="P66">SQL helps transform raw transaction data into meaningful analytical outputs.</text:p>
      <text:h text:style-name="P69" text:outline-level="3">2.3.6 Python Implementation Objectives</text:h>
      <text:p text:style-name="P66">Python is used for advanced data analysis and preprocessing.</text:p>
      <text:p text:style-name="P66">The Python objectives include:</text:p>
      <text:list text:style-name="L28">
        <text:list-item>
          <text:p text:style-name="P81">Reading datasets using Pandas</text:p>
        </text:list-item>
        <text:list-item>
          <text:p text:style-name="P81">Cleaning data using Python scripts</text:p>
        </text:list-item>
        <text:list-item>
          <text:p text:style-name="P81">Performing exploratory data analysis</text:p>
        </text:list-item>
        <text:list-item>
          <text:p text:style-name="P81">Calculating RFM metrics</text:p>
        </text:list-item>
        <text:list-item>
          <text:p text:style-name="P81">Generating visualisations</text:p>
        </text:list-item>
        <text:list-item>
          <text:p text:style-name="P82">Exporting transformed datasets</text:p>
        </text:list-item>
      </text:list>
      <text:p text:style-name="P66"><text:soft-page-break/>Python improves analytical flexibility and supports advanced data manipulation.</text:p>
      <text:h text:style-name="P69" text:outline-level="3">2.3.7 Power BI Dashboard Objectives</text:h>
      <text:p text:style-name="P66">Power BI is used for visualisation and reporting.</text:p>
      <text:p text:style-name="P66">The dashboard objectives include:</text:p>
      <text:list text:style-name="L29">
        <text:list-item>
          <text:p text:style-name="P83">Creating KPI cards</text:p>
        </text:list-item>
        <text:list-item>
          <text:p text:style-name="P83">Building customer segmentation dashboards</text:p>
        </text:list-item>
        <text:list-item>
          <text:p text:style-name="P83">Visualising sales performance</text:p>
        </text:list-item>
        <text:list-item>
          <text:p text:style-name="P83">Visualising profit analysis</text:p>
        </text:list-item>
        <text:list-item>
          <text:p text:style-name="P83">Creating interactive reports</text:p>
        </text:list-item>
        <text:list-item>
          <text:p text:style-name="P83">Building slicers and filters</text:p>
        </text:list-item>
        <text:list-item>
          <text:p text:style-name="P84">Improving business reporting</text:p>
        </text:list-item>
      </text:list>
      <text:p text:style-name="P66">Power BI dashboards help management understand business performance visually.</text:p>
      <text:h text:style-name="P61" text:outline-level="2">2.4 Business Objectives</text:h>
      <text:p text:style-name="P66">The project supports several business objectives related to customer management and sales performance.</text:p>
      <text:h text:style-name="P23" text:outline-level="3">Improving Customer Retention</text:h>
      <text:p text:style-name="P66">Businesses can improve customer retention by identifying loyal customers and inactive customers.</text:p>
      <text:h text:style-name="P23" text:outline-level="3">Increasing Revenue</text:h>
      <text:p text:style-name="P66">By identifying high spending customers, businesses can focus on profitable customer groups.</text:p>
      <text:h text:style-name="P23" text:outline-level="3">Enhancing Marketing Campaigns</text:h>
      <text:p text:style-name="P66">Customer segmentation helps organisations target customers with personalised offers and promotions.</text:p>
      <text:h text:style-name="P23" text:outline-level="3">Improving Customer Satisfaction</text:h>
      <text:p text:style-name="P66">Understanding customer preferences helps businesses provide better services and improve customer experience.</text:p>
      <text:h text:style-name="P23" text:outline-level="3">Supporting Decision Making</text:h>
      <text:p text:style-name="P66">The project provides analytical insights that support management decisions.</text:p>
      <text:h text:style-name="P61" text:outline-level="2">2.5 Technical Objectives</text:h>
      <text:p text:style-name="P66">The project includes several technical objectives related to database management, programming, and business intelligence.</text:p>
      <text:h text:style-name="P23" text:outline-level="3">SQL Technical Objectives</text:h>
      <text:list text:style-name="L30">
        <text:list-item>
          <text:p text:style-name="P85">Writing SELECT queries</text:p>
        </text:list-item>
        <text:list-item>
          <text:p text:style-name="P85">Using aggregate functions</text:p>
        </text:list-item>
        <text:list-item>
          <text:p text:style-name="P85">Using GROUP BY operations</text:p>
        </text:list-item>
        <text:list-item>
          <text:p text:style-name="P85">Performing JOIN operations</text:p>
        </text:list-item>
        <text:list-item>
          <text:p text:style-name="P85">Creating views and reports</text:p>
        </text:list-item>
        <text:list-item>
          <text:p text:style-name="P86"><text:soft-page-break/>Using filtering conditions</text:p>
        </text:list-item>
      </text:list>
      <text:h text:style-name="P23" text:outline-level="3">Python Technical Objectives</text:h>
      <text:list text:style-name="L31">
        <text:list-item>
          <text:p text:style-name="P87">Using Pandas for data analysis</text:p>
        </text:list-item>
        <text:list-item>
          <text:p text:style-name="P87">Using NumPy for numerical operations</text:p>
        </text:list-item>
        <text:list-item>
          <text:p text:style-name="P87">Using Matplotlib for visualization</text:p>
        </text:list-item>
        <text:list-item>
          <text:p text:style-name="P87">Performing data preprocessing</text:p>
        </text:list-item>
        <text:list-item>
          <text:p text:style-name="P88">Exporting transformed datasets</text:p>
        </text:list-item>
      </text:list>
      <text:h text:style-name="P23" text:outline-level="3">Power BI Technical Objectives</text:h>
      <text:list text:style-name="L32">
        <text:list-item>
          <text:p text:style-name="P89">Importing datasets</text:p>
        </text:list-item>
        <text:list-item>
          <text:p text:style-name="P89">Creating relationships</text:p>
        </text:list-item>
        <text:list-item>
          <text:p text:style-name="P89">Designing dashboards</text:p>
        </text:list-item>
        <text:list-item>
          <text:p text:style-name="P89">Writing DAX formulas</text:p>
        </text:list-item>
        <text:list-item>
          <text:p text:style-name="P89">Creating KPI metrics</text:p>
        </text:list-item>
        <text:list-item>
          <text:p text:style-name="P90">Building charts and visualisations</text:p>
        </text:list-item>
      </text:list>
      <text:h text:style-name="P61" text:outline-level="2">2.6 Analytical Objectives</text:h>
      <text:p text:style-name="P66">The project focuses on generating analytical insights from customer transaction data.</text:p>
      <text:h text:style-name="P23" text:outline-level="3">Sales Analysis</text:h>
      <text:p text:style-name="P66">The project analytes:</text:p>
      <text:list text:style-name="L33">
        <text:list-item>
          <text:p text:style-name="P91">Total sales</text:p>
        </text:list-item>
        <text:list-item>
          <text:p text:style-name="P91">Monthly sales</text:p>
        </text:list-item>
        <text:list-item>
          <text:p text:style-name="P91">Yearly sales</text:p>
        </text:list-item>
        <text:list-item>
          <text:p text:style-name="P91">Category wise sales</text:p>
        </text:list-item>
        <text:list-item>
          <text:p text:style-name="P92">Region wise sales</text:p>
        </text:list-item>
      </text:list>
      <text:h text:style-name="P23" text:outline-level="3">Customer Analysis</text:h>
      <text:p text:style-name="P66">The project analytes:</text:p>
      <text:list text:style-name="L34">
        <text:list-item>
          <text:p text:style-name="P93">Customer purchase frequency</text:p>
        </text:list-item>
        <text:list-item>
          <text:p text:style-name="P93">Customer spending behaviour</text:p>
        </text:list-item>
        <text:list-item>
          <text:p text:style-name="P93">Customer retention patterns</text:p>
        </text:list-item>
        <text:list-item>
          <text:p text:style-name="P94">Customer segmentation categories</text:p>
        </text:list-item>
      </text:list>
      <text:h text:style-name="P23" text:outline-level="3">Profit Analysis</text:h>
      <text:p text:style-name="P66">The project analyses:</text:p>
      <text:list text:style-name="L35">
        <text:list-item>
          <text:p text:style-name="P95">Total profit</text:p>
        </text:list-item>
        <text:list-item>
          <text:p text:style-name="P95">Category wise profit</text:p>
        </text:list-item>
        <text:list-item>
          <text:p text:style-name="P95">Region wise profit</text:p>
        </text:list-item>
        <text:list-item>
          <text:p text:style-name="P95">High profit products</text:p>
        </text:list-item>
        <text:list-item>
          <text:p text:style-name="P96">Low profit products</text:p>
        </text:list-item>
      </text:list>
      <text:h text:style-name="P61" text:outline-level="2">2.7 Scope of the Project</text:h>
      <text:p text:style-name="P66">The scope defines the activities and functionalities included in the project.</text:p>
      <text:h text:style-name="P23" text:outline-level="3"><text:soft-page-break/>Included Scope</text:h>
      <text:p text:style-name="P66">The project includes:</text:p>
      <text:list text:style-name="L36">
        <text:list-item>
          <text:p text:style-name="P97">Data collection</text:p>
        </text:list-item>
        <text:list-item>
          <text:p text:style-name="P97">Data cleaning</text:p>
        </text:list-item>
        <text:list-item>
          <text:p text:style-name="P97">Data transformation</text:p>
        </text:list-item>
        <text:list-item>
          <text:p text:style-name="P97">SQL analysis</text:p>
        </text:list-item>
        <text:list-item>
          <text:p text:style-name="P97">Python analysis</text:p>
        </text:list-item>
        <text:list-item>
          <text:p text:style-name="P97">RFM calculation</text:p>
        </text:list-item>
        <text:list-item>
          <text:p text:style-name="P97">Customer segmentation</text:p>
        </text:list-item>
        <text:list-item>
          <text:p text:style-name="P97">Star schema modelling</text:p>
        </text:list-item>
        <text:list-item>
          <text:p text:style-name="P97">Dashboard visualisation</text:p>
        </text:list-item>
        <text:list-item>
          <text:p text:style-name="P98">Business insights generation</text:p>
        </text:list-item>
      </text:list>
      <text:p text:style-name="P66">The project provides a complete end to end analytics workflow.</text:p>
      <text:h text:style-name="P61" text:outline-level="2">2.8 Functional Scope</text:h>
      <text:p text:style-name="P66">The functional scope defines the operations performed in the project.</text:p>
      <text:h text:style-name="P23" text:outline-level="3">Data Processing Functions</text:h>
      <text:list text:style-name="L37">
        <text:list-item>
          <text:p text:style-name="P99">Importing raw datasets</text:p>
        </text:list-item>
        <text:list-item>
          <text:p text:style-name="P99">Cleaning datasets</text:p>
        </text:list-item>
        <text:list-item>
          <text:p text:style-name="P99">Formatting data</text:p>
        </text:list-item>
        <text:list-item>
          <text:p text:style-name="P99">Removing duplicates</text:p>
        </text:list-item>
        <text:list-item>
          <text:p text:style-name="P100">Handling missing values</text:p>
        </text:list-item>
      </text:list>
      <text:h text:style-name="P23" text:outline-level="3">Analytical Functions</text:h>
      <text:list text:style-name="L38">
        <text:list-item>
          <text:p text:style-name="P101">Calculating Recency values</text:p>
        </text:list-item>
        <text:list-item>
          <text:p text:style-name="P101">Calculating Frequency values</text:p>
        </text:list-item>
        <text:list-item>
          <text:p text:style-name="P101">Calculating Monetary values</text:p>
        </text:list-item>
        <text:list-item>
          <text:p text:style-name="P101">Assigning RFM scores</text:p>
        </text:list-item>
        <text:list-item>
          <text:p text:style-name="P102">Segmenting customers</text:p>
        </text:list-item>
      </text:list>
      <text:h text:style-name="P23" text:outline-level="3">Reporting Functions</text:h>
      <text:list text:style-name="L39">
        <text:list-item>
          <text:p text:style-name="P103">Dashboard generation</text:p>
        </text:list-item>
        <text:list-item>
          <text:p text:style-name="P103">KPI reporting</text:p>
        </text:list-item>
        <text:list-item>
          <text:p text:style-name="P103">Chart visualisation</text:p>
        </text:list-item>
        <text:list-item>
          <text:p text:style-name="P103">Business reporting</text:p>
        </text:list-item>
        <text:list-item>
          <text:p text:style-name="P104">Performance analysis</text:p>
        </text:list-item>
      </text:list>
      <text:h text:style-name="P61" text:outline-level="2">2.9 Technical Scope</text:h>
      <text:p text:style-name="P66">The technical scope includes technologies and tools used in the project.</text:p>
      <text:h text:style-name="P23" text:outline-level="3">Database Scope</text:h>
      <text:p text:style-name="P66">The project uses SQL databases for:</text:p>
      <text:list text:style-name="L40">
        <text:list-item>
          <text:p text:style-name="P105">Storing transformed datasets</text:p>
        </text:list-item>
        <text:list-item>
          <text:p text:style-name="P105"><text:soft-page-break/>Querying data</text:p>
        </text:list-item>
        <text:list-item>
          <text:p text:style-name="P105">Aggregating records</text:p>
        </text:list-item>
        <text:list-item>
          <text:p text:style-name="P106">Creating analytical tables</text:p>
        </text:list-item>
      </text:list>
      <text:h text:style-name="P23" text:outline-level="3">Programming Scope</text:h>
      <text:p text:style-name="P66">Python is used for:</text:p>
      <text:list text:style-name="L41">
        <text:list-item>
          <text:p text:style-name="P107">Data preprocessing</text:p>
        </text:list-item>
        <text:list-item>
          <text:p text:style-name="P107">Data analysis</text:p>
        </text:list-item>
        <text:list-item>
          <text:p text:style-name="P107">Data transformation</text:p>
        </text:list-item>
        <text:list-item>
          <text:p text:style-name="P108">RFM calculation</text:p>
        </text:list-item>
      </text:list>
      <text:h text:style-name="P23" text:outline-level="3">Visualisation Scope</text:h>
      <text:p text:style-name="P66">Power BI is used for:</text:p>
      <text:list text:style-name="L42">
        <text:list-item>
          <text:p text:style-name="P109">Dashboard development</text:p>
        </text:list-item>
        <text:list-item>
          <text:p text:style-name="P109">Interactive reporting</text:p>
        </text:list-item>
        <text:list-item>
          <text:p text:style-name="P109">KPI analysis</text:p>
        </text:list-item>
        <text:list-item>
          <text:p text:style-name="P110">Customer segmentation visualisation</text:p>
        </text:list-item>
      </text:list>
      <text:h text:style-name="P61" text:outline-level="2">2.10 Limitations of the Project</text:h>
      <text:p text:style-name="P66">Every analytical project has certain limitations. The limitations of this project include:</text:p>
      <text:h text:style-name="P23" text:outline-level="3">Limited Dataset</text:h>
      <text:p text:style-name="P66">The project uses a sample Online Super Store dataset and may not represent all business environments.</text:p>
      <text:h text:style-name="P23" text:outline-level="3">Historical Data Analysis</text:h>
      <text:p text:style-name="P66">The analysis is based only on historical transaction data.</text:p>
      <text:h text:style-name="P23" text:outline-level="3">No Real Time Processing</text:h>
      <text:p text:style-name="P66">The project does not support real time customer analytics.</text:p>
      <text:h text:style-name="P23" text:outline-level="3">No Machine Learning Prediction</text:h>
      <text:p text:style-name="P66">The project focuses only on descriptive analytics and does not include predictive machine learning models.</text:p>
      <text:h text:style-name="P23" text:outline-level="3">Limited Customer Attributes</text:h>
      <text:p text:style-name="P66">The dataset may not contain demographic or behavioural attributes such as customer age, income, or preferences.</text:p>
      <text:h text:style-name="P61" text:outline-level="2">2.11 Importance of RFM Analysis</text:h>
      <text:p text:style-name="P66">RFM Analysis is an important analytical technique because it helps businesses understand customer behaviour effectively.</text:p>
      <text:h text:style-name="P23" text:outline-level="3">Importance of Recency</text:h>
      <text:p text:style-name="P66">Customers who purchased recently are more likely to make future purchases.</text:p>
      <text:h text:style-name="P23" text:outline-level="3"><text:soft-page-break/>Importance of Frequency</text:h>
      <text:p text:style-name="P66">Customers who purchase frequently are considered loyal customers.</text:p>
      <text:h text:style-name="P23" text:outline-level="3">Importance of Monetary Value</text:h>
      <text:p text:style-name="P66">Customers with high spending contribute more revenue to the business.</text:p>
      <text:h text:style-name="P23" text:outline-level="3">Business Benefits of RFM Analysis</text:h>
      <text:list text:style-name="L43">
        <text:list-item>
          <text:p text:style-name="P111">Improved customer targeting</text:p>
        </text:list-item>
        <text:list-item>
          <text:p text:style-name="P111">Better customer retention</text:p>
        </text:list-item>
        <text:list-item>
          <text:p text:style-name="P111">Increased sales revenue</text:p>
        </text:list-item>
        <text:list-item>
          <text:p text:style-name="P111">Improved marketing efficiency</text:p>
        </text:list-item>
        <text:list-item>
          <text:p text:style-name="P112">Better customer relationship management</text:p>
        </text:list-item>
      </text:list>
      <text:h text:style-name="P61" text:outline-level="2">2.12 Real World Applications</text:h>
      <text:p text:style-name="P66">Customer segmentation using RFM Analysis is widely used in real world business environments.</text:p>
      <text:h text:style-name="P23" text:outline-level="3">E Commerce Industry</text:h>
      <text:p text:style-name="P66">Online shopping platforms use RFM Analysis to recommend products and target customers.</text:p>
      <text:h text:style-name="P23" text:outline-level="3">Banking Industry</text:h>
      <text:p text:style-name="P66">Banks use customer segmentation to identify premium customers and improve financial services.</text:p>
      <text:h text:style-name="P23" text:outline-level="3">Retail Industry</text:h>
      <text:p text:style-name="P66">Retail businesses use customer analytics to improve sales and marketing strategies.</text:p>
      <text:h text:style-name="P23" text:outline-level="3">Telecommunications Industry</text:h>
      <text:p text:style-name="P66">Telecommunication companies use customer segmentation to reduce customer churn.</text:p>
      <text:h text:style-name="P23" text:outline-level="3">Hospitality Industry</text:h>
      <text:p text:style-name="P66">Hotels and travel companies use customer analytics to improve customer experience.</text:p>
      <text:h text:style-name="P61" text:outline-level="2">2.13 Expected Business Outcomes</text:h>
      <text:p text:style-name="P66">The project is expected to generate several business outcomes.</text:p>
      <text:h text:style-name="P23" text:outline-level="3">Customer Retention Improvement</text:h>
      <text:p text:style-name="P66">Businesses can identify inactive customers and improve retention strategies.</text:p>
      <text:h text:style-name="P23" text:outline-level="3">Revenue Growth</text:h>
      <text:p text:style-name="P66">Businesses can focus on high value customers and increase profitability.</text:p>
      <text:h text:style-name="P23" text:outline-level="3">Better Marketing Performance</text:h>
      <text:p text:style-name="P66">Customer segmentation helps improve campaign effectiveness.</text:p>
      <text:h text:style-name="P23" text:outline-level="3">Improved Reporting</text:h>
      <text:p text:style-name="P66">Interactive dashboards provide better management reporting.</text:p>
      <text:h text:style-name="P23" text:outline-level="3"><text:soft-page-break/>Data Driven Decision Making</text:h>
      <text:p text:style-name="P66">Business decisions become more accurate using analytical insights.</text:p>
      <text:h text:style-name="P61" text:outline-level="2">2.14 Conclusion</text:h>
      <text:p text:style-name="P66">This chapter discussed the objectives and scope of the Customer Segmentation using RFM Analysis project. The chapter explained the main objectives, business objectives, technical objectives, analytical objectives, and project scope.</text:p>
      <text:p text:style-name="P66">The chapter also discussed the importance of customer segmentation, the benefits of RFM Analysis, project limitations, and real world applications. The project provides a complete analytical framework for transforming raw customer transaction data into meaningful business intelligence.</text:p>
      <text:p text:style-name="P66">The next chapter explains the Online Super Store dataset in detail, including dataset structure, columns, attributes, and data characteristics used for customer segmentation analysis.</text:p>
      <text:h text:style-name="P59" text:outline-level="1">CHAPTER 3</text:h>
      <text:h text:style-name="P113" text:outline-level="1">TOOLS AND TECHNOLOGIES USED</text:h>
      <text:h text:style-name="P61" text:outline-level="2">3.1 Introduction</text:h>
      <text:p text:style-name="P66">Modern business analytics projects require multiple tools and technologies to process, analyze, visualise, and interpret data effectively. Data generated by businesses is usually large, complex, and unstructured. Therefore, organisations use different analytical tools to transform raw data into meaningful business insights.</text:p>
      <text:p text:style-name="P66">In this project, Customer Segmentation using RFM Analysis is performed using the Online Super Store dataset. The project integrates SQL, Python, Power BI, and Excel to create a complete analytical workflow. Each technology used in the project performs a specific role in the analytics process.</text:p>
      <text:p text:style-name="P114"><text:span text:style-name="T11">The major activities performed in this </text:span>project include: </text:p>
      <text:p text:style-name="P1"><text:span text:style-name="Strong_20_Emphasis"><text:span text:style-name="T4">Data collection</text:span></text:span></text:p>
      <text:list text:style-name="L44">
        <text:list-item>
          <text:p text:style-name="P115">Data cleaning</text:p>
        </text:list-item>
        <text:list-item>
          <text:p text:style-name="P115">Data preprocessing</text:p>
        </text:list-item>
        <text:list-item>
          <text:p text:style-name="P115">Data transformation</text:p>
        </text:list-item>
        <text:list-item>
          <text:p text:style-name="P115">Data modelling</text:p>
        </text:list-item>
        <text:list-item>
          <text:p text:style-name="P115">RFM Analysis</text:p>
        </text:list-item>
        <text:list-item>
          <text:p text:style-name="P115">Data visualisation</text:p>
        </text:list-item>
        <text:list-item>
          <text:p text:style-name="P115">Dashboard development</text:p>
        </text:list-item>
        <text:list-item>
          <text:p text:style-name="P116">Business reporting</text:p>
        </text:list-item>
      </text:list>
      <text:p text:style-name="P66">This chapter explains the tools, technologies, libraries, software applications, and methodologies used throughout the project.</text:p>
      <text:h text:style-name="P61" text:outline-level="2">3.2 Importance of Analytical Tools in Business</text:h>
      <text:p text:style-name="P66">Business organisations generate huge volumes of customer and sales data daily. Manual analysis of such data is difficult, time consuming, and error prone. Analytical tools help organisations process data efficiently and support data driven decision making.</text:p>
      <text:p text:style-name="P66"><text:soft-page-break/>The importance of analytical tools includes:</text:p>
      <text:list text:style-name="L45">
        <text:list-item>
          <text:p text:style-name="P117">Faster data processing</text:p>
        </text:list-item>
        <text:list-item>
          <text:p text:style-name="P117">Improved data accuracy</text:p>
        </text:list-item>
        <text:list-item>
          <text:p text:style-name="P117">Better business reporting</text:p>
        </text:list-item>
        <text:list-item>
          <text:p text:style-name="P117">Automated calculations</text:p>
        </text:list-item>
        <text:list-item>
          <text:p text:style-name="P117">Advanced data visualisation</text:p>
        </text:list-item>
        <text:list-item>
          <text:p text:style-name="P117">Efficient data storage</text:p>
        </text:list-item>
        <text:list-item>
          <text:p text:style-name="P117">Real time decision support</text:p>
        </text:list-item>
        <text:list-item>
          <text:p text:style-name="P118">Improved business intelligence</text:p>
        </text:list-item>
      </text:list>
      <text:p text:style-name="P66">The integration of multiple tools improves the overall analytical workflow and enables organisations to gain deeper insights from business data.</text:p>
      <text:h text:style-name="P119" text:outline-level="1">3.3 Microsoft Excel</text:h>
      <text:h text:style-name="P61" text:outline-level="2">3.3.1 Introduction to Excel</text:h>
      <text:p text:style-name="P66">Microsoft Excel is one of the most commonly used spreadsheet applications for storing and organifying business data. Excel provides features for data entry, formatting, calculations, filtering, sorting, and basic analysis.</text:p>
      <text:p text:style-name="P66">In this project, the Online Super Store dataset is initially stored in Excel format. The raw transaction data is imported from Excel and processed using SQL, Python, and Power BI.</text:p>
      <text:h text:style-name="P61" text:outline-level="2">3.3.2 Role of Excel in the Project</text:h>
      <text:p text:style-name="P120">Excel is used for:</text:p>
      <text:list text:style-name="L46">
        <text:list-item>
          <text:p text:style-name="P121">Storing raw transaction data</text:p>
        </text:list-item>
        <text:list-item>
          <text:p text:style-name="P121">Viewing customer records</text:p>
        </text:list-item>
        <text:list-item>
          <text:p text:style-name="P121">Checking missing values</text:p>
        </text:list-item>
        <text:list-item>
          <text:p text:style-name="P121">Understanding dataset structure</text:p>
        </text:list-item>
        <text:list-item>
          <text:p text:style-name="P121">Exporting transformed datasets</text:p>
        </text:list-item>
        <text:list-item>
          <text:p text:style-name="P122">Data validation</text:p>
        </text:list-item>
      </text:list>
      <text:h text:style-name="P61" text:outline-level="2">3.3.3 Advantages of Excel</text:h>
      <text:list text:style-name="L47">
        <text:list-item>
          <text:p text:style-name="P123">Easy to use</text:p>
        </text:list-item>
        <text:list-item>
          <text:p text:style-name="P123">Simple data storage</text:p>
        </text:list-item>
        <text:list-item>
          <text:p text:style-name="P123">Supports filtering and sorting</text:p>
        </text:list-item>
        <text:list-item>
          <text:p text:style-name="P123">Supports formulas and calculations</text:p>
        </text:list-item>
        <text:list-item>
          <text:p text:style-name="P123">Easy data import and export</text:p>
        </text:list-item>
        <text:list-item>
          <text:p text:style-name="P124">Compatible with SQL and Power BI</text:p>
        </text:list-item>
      </text:list>
      <text:h text:style-name="P61" text:outline-level="2">3.3.4 Limitations of Excel</text:h>
      <text:list text:style-name="L48">
        <text:list-item>
          <text:p text:style-name="P125">Limited handling of very large datasets</text:p>
        </text:list-item>
        <text:list-item>
          <text:p text:style-name="P125">Slower processing compared to databases</text:p>
        </text:list-item>
        <text:list-item>
          <text:p text:style-name="P125">Manual errors during data entry</text:p>
        </text:list-item>
        <text:list-item>
          <text:p text:style-name="P126">Limited advanced analytical capabilities</text:p>
        </text:list-item>
      </text:list>
      <text:h text:style-name="P59" text:outline-level="1"><text:soft-page-break/>3.4 SQL</text:h>
      <text:h text:style-name="P61" text:outline-level="2">3.4.1 Introduction to SQL</text:h>
      <text:p text:style-name="P66">SQL stands for Structured Query Language. SQL is a database language used to store, retrieve, manipulate, and manage relational databases.</text:p>
      <text:p text:style-name="P66">SQL is widely used in business analytics because it provides efficient methods for querying and analysing structured data.</text:p>
      <text:p text:style-name="P66">In this project, SQL is used for:</text:p>
      <text:list text:style-name="L49">
        <text:list-item>
          <text:p text:style-name="P127">Data extraction</text:p>
        </text:list-item>
        <text:list-item>
          <text:p text:style-name="P127">Data transformation</text:p>
        </text:list-item>
        <text:list-item>
          <text:p text:style-name="P127">Data aggregation</text:p>
        </text:list-item>
        <text:list-item>
          <text:p text:style-name="P127">Table creation</text:p>
        </text:list-item>
        <text:list-item>
          <text:p text:style-name="P127">Joining datasets</text:p>
        </text:list-item>
        <text:list-item>
          <text:p text:style-name="P127">Customer analysis</text:p>
        </text:list-item>
        <text:list-item>
          <text:p text:style-name="P128">RFM metric calculations</text:p>
        </text:list-item>
      </text:list>
      <text:h text:style-name="P61" text:outline-level="2">3.4.2 Importance of SQL in Data Analytics</text:h>
      <text:p text:style-name="P66">SQL is one of the most important technologies used in data analytics and business intelligence.</text:p>
      <text:p text:style-name="P66">The importance of SQL includes:</text:p>
      <text:list text:style-name="L50">
        <text:list-item>
          <text:p text:style-name="P129">Fast querying</text:p>
        </text:list-item>
        <text:list-item>
          <text:p text:style-name="P129">Efficient data handling</text:p>
        </text:list-item>
        <text:list-item>
          <text:p text:style-name="P129">Data filtering</text:p>
        </text:list-item>
        <text:list-item>
          <text:p text:style-name="P129">Data grouping</text:p>
        </text:list-item>
        <text:list-item>
          <text:p text:style-name="P129">Data aggregation</text:p>
        </text:list-item>
        <text:list-item>
          <text:p text:style-name="P129">Relationship management</text:p>
        </text:list-item>
        <text:list-item>
          <text:p text:style-name="P130">Data reporting</text:p>
        </text:list-item>
      </text:list>
      <text:p text:style-name="P66">SQL allows analysts to process large amounts of transactional data efficiently.</text:p>
      <text:h text:style-name="P61" text:outline-level="2">3.4.3 SQL Operations Used in the Project</text:h>
      <text:p text:style-name="P120">The project uses multiple SQL operations.</text:p>
      <text:h text:style-name="P23" text:outline-level="3">SELECT Statement</text:h>
      <text:p text:style-name="P66">Used to retrieve data from tables.</text:p>
      <text:p text:style-name="P66">Example:</text:p>
      <text:p text:style-name="P66">SELECT * FROM Orders;</text:p>
      <text:h text:style-name="P23" text:outline-level="3">WHERE Clause</text:h>
      <text:p text:style-name="P66">Used to filter records.</text:p>
      <text:p text:style-name="P66">Example:</text:p>
      <text:p text:style-name="P66">SELECT * FROM Orders WHERE Sales &gt; 1000;</text:p>
      <text:h text:style-name="P23" text:outline-level="3"><text:soft-page-break/>GROUP BY Clause</text:h>
      <text:p text:style-name="P66">Used for aggregation.</text:p>
      <text:p text:style-name="P66">Example:</text:p>
      <text:p text:style-name="P66">SELECT Customer_ID, SUM(Sales) FROM Orders GROUP BY Customer_ID;</text:p>
      <text:h text:style-name="P23" text:outline-level="3">ORDER BY Clause</text:h>
      <text:p text:style-name="P66">Used to sort records.</text:p>
      <text:h text:style-name="P23" text:outline-level="3">Aggregate Functions</text:h>
      <text:p text:style-name="P66">Used functions include:</text:p>
      <text:list text:style-name="L51">
        <text:list-item>
          <text:p text:style-name="P131">SUM()</text:p>
        </text:list-item>
        <text:list-item>
          <text:p text:style-name="P131">COUNT()</text:p>
        </text:list-item>
        <text:list-item>
          <text:p text:style-name="P131">AVG()</text:p>
        </text:list-item>
        <text:list-item>
          <text:p text:style-name="P131">MAX()</text:p>
        </text:list-item>
        <text:list-item>
          <text:p text:style-name="P132">MIN()</text:p>
        </text:list-item>
      </text:list>
      <text:h text:style-name="P23" text:outline-level="3">JOIN Operations</text:h>
      <text:p text:style-name="P66">Used to combine multiple tables.</text:p>
      <text:p text:style-name="P66">JOIN types used:</text:p>
      <text:list text:style-name="L52">
        <text:list-item>
          <text:p text:style-name="P133">INNER JOIN</text:p>
        </text:list-item>
        <text:list-item>
          <text:p text:style-name="P133">LEFT JOIN</text:p>
        </text:list-item>
        <text:list-item>
          <text:p text:style-name="P134">RIGHT JOIN</text:p>
        </text:list-item>
      </text:list>
      <text:h text:style-name="P61" text:outline-level="2">3.4.4 SQL for RFM Analysis</text:h>
      <text:p text:style-name="P66">SQL is used to calculate:</text:p>
      <text:list text:style-name="L53">
        <text:list-item>
          <text:p text:style-name="P135">Recency values</text:p>
        </text:list-item>
        <text:list-item>
          <text:p text:style-name="P135">Frequency values</text:p>
        </text:list-item>
        <text:list-item>
          <text:p text:style-name="P135">Monetary values</text:p>
        </text:list-item>
        <text:list-item>
          <text:p text:style-name="P135">Customer rankings</text:p>
        </text:list-item>
        <text:list-item>
          <text:p text:style-name="P136">Customer segmentation</text:p>
        </text:list-item>
      </text:list>
      <text:p text:style-name="P66">Example SQL Query:</text:p>
      <text:p text:style-name="P66">SELECT Customer_ID, MAX(Order_Date) AS Last_Order_Date, COUNT(Order_ID) AS Frequency, SUM(Sales) AS Monetary FROM Orders GROUP BY Customer_ID;</text:p>
      <text:h text:style-name="P61" text:outline-level="2">3.4.5 Advantages of SQL</text:h>
      <text:list text:style-name="L54">
        <text:list-item>
          <text:p text:style-name="P137">High speed processing</text:p>
        </text:list-item>
        <text:list-item>
          <text:p text:style-name="P137">Efficient handling of large datasets</text:p>
        </text:list-item>
        <text:list-item>
          <text:p text:style-name="P137">Supports complex queries</text:p>
        </text:list-item>
        <text:list-item>
          <text:p text:style-name="P137">Easy integration with Power BI</text:p>
        </text:list-item>
        <text:list-item>
          <text:p text:style-name="P137">Accurate data management</text:p>
        </text:list-item>
        <text:list-item>
          <text:p text:style-name="P138">Supports relational databases</text:p>
        </text:list-item>
      </text:list>
      <text:h text:style-name="P61" text:outline-level="2"><text:soft-page-break/>3.4.6 Limitations of SQL</text:h>
      <text:list text:style-name="L55">
        <text:list-item>
          <text:p text:style-name="P139"><text:span text:style-name="T12">Requires query knowl</text:span>edge</text:p>
        </text:list-item>
        <text:list-item>
          <text:p text:style-name="P139">Complex queries can become difficult</text:p>
        </text:list-item>
        <text:list-item>
          <text:p text:style-name="P139">Limited advanced visualization</text:p>
        </text:list-item>
        <text:list-item>
          <text:p text:style-name="P140">Database dependency</text:p>
        </text:list-item>
      </text:list>
      <text:h text:style-name="P60" text:outline-level="1">3.5 Python</text:h>
      <text:h text:style-name="P141" text:outline-level="2">3.5.1 Introduction to Python</text:h>
      <text:p text:style-name="P66">Python is a high level programming language widely used in data science, machine learning, and business analytics.</text:p>
      <text:p text:style-name="P66">Python provides powerful libraries for:</text:p>
      <text:list text:style-name="L56">
        <text:list-item>
          <text:p text:style-name="P142">Data manipulation</text:p>
        </text:list-item>
        <text:list-item>
          <text:p text:style-name="P142">Data cleaning</text:p>
        </text:list-item>
        <text:list-item>
          <text:p text:style-name="P142">Statistical analysis</text:p>
        </text:list-item>
        <text:list-item>
          <text:p text:style-name="P142">Visualization</text:p>
        </text:list-item>
        <text:list-item>
          <text:p text:style-name="P142">Automation</text:p>
        </text:list-item>
        <text:list-item>
          <text:p text:style-name="P143">Machine learning</text:p>
        </text:list-item>
      </text:list>
      <text:p text:style-name="P66">In this project, Python is used for preprocessing and analytical operations.</text:p>
      <text:h text:style-name="P61" text:outline-level="2">3.5.2 Importance of Python in Data Analytics</text:h>
      <text:p text:style-name="P66"><text:span text:style-name="T12">Python has become one of the most popular progr</text:span>amming languages in analytics because of its simplicity and flexibility.</text:p>
      <text:p text:style-name="P66">The importance of Python includes:</text:p>
      <text:list text:style-name="L57">
        <text:list-item>
          <text:p text:style-name="P144">Easy syntax</text:p>
        </text:list-item>
        <text:list-item>
          <text:p text:style-name="P144">Powerful libraries</text:p>
        </text:list-item>
        <text:list-item>
          <text:p text:style-name="P144">Automation support</text:p>
        </text:list-item>
        <text:list-item>
          <text:p text:style-name="P144">Advanced analytics</text:p>
        </text:list-item>
        <text:list-item>
          <text:p text:style-name="P144">Fast processing</text:p>
        </text:list-item>
        <text:list-item>
          <text:p text:style-name="P145">Strong community support</text:p>
        </text:list-item>
      </text:list>
      <text:h text:style-name="P61" text:outline-level="2">3.5.3 Python Libraries Used</text:h>
      <text:p text:style-name="P66">Several Python libraries are used in this project.</text:p>
      <text:h text:style-name="P23" text:outline-level="3">Pandas</text:h>
      <text:p text:style-name="P66">Pandas is used for:</text:p>
      <text:list text:style-name="L58">
        <text:list-item>
          <text:p text:style-name="P146">Reading datasets</text:p>
        </text:list-item>
        <text:list-item>
          <text:p text:style-name="P146">Data cleaning</text:p>
        </text:list-item>
        <text:list-item>
          <text:p text:style-name="P146">Data transformation</text:p>
        </text:list-item>
        <text:list-item>
          <text:p text:style-name="P146">Data aggregation</text:p>
        </text:list-item>
        <text:list-item>
          <text:p text:style-name="P147">Data analysis</text:p>
        </text:list-item>
      </text:list>
      <text:p text:style-name="P66">Example:</text:p>
      <text:p text:style-name="P66"><text:soft-page-break/>import pandas as pd</text:p>
      <text:h text:style-name="P23" text:outline-level="3">NumPy</text:h>
      <text:p text:style-name="P66">NumPy is used for numerical calculations.</text:p>
      <text:h text:style-name="P23" text:outline-level="3">Matplotlib</text:h>
      <text:p text:style-name="P66">Matplotlib is used for data visualization.</text:p>
      <text:h text:style-name="P23" text:outline-level="3">Seaborn</text:h>
      <text:p text:style-name="P66">Seaborn is used for statistical visualization.</text:p>
      <text:h text:style-name="P61" text:outline-level="2">3.5.4 Python Operations Used in the Project</text:h>
      <text:p text:style-name="P66">Python operations include:</text:p>
      <text:list text:style-name="L59">
        <text:list-item>
          <text:p text:style-name="P148">Reading CSV files</text:p>
        </text:list-item>
        <text:list-item>
          <text:p text:style-name="P148">Handling missing values</text:p>
        </text:list-item>
        <text:list-item>
          <text:p text:style-name="P148">Removing duplicates</text:p>
        </text:list-item>
        <text:list-item>
          <text:p text:style-name="P148">Data transformation</text:p>
        </text:list-item>
        <text:list-item>
          <text:p text:style-name="P148">Calculating RFM scores</text:p>
        </text:list-item>
        <text:list-item>
          <text:p text:style-name="P148">Data visualization</text:p>
        </text:list-item>
        <text:list-item>
          <text:p text:style-name="P149">Exporting cleaned datasets</text:p>
        </text:list-item>
      </text:list>
      <text:h text:style-name="P61" text:outline-level="2">3.5.5 Example Python Code</text:h>
      <text:p text:style-name="P66">import pandas as pd</text:p>
      <text:p text:style-name="P66">file = pd.read_csv('SuperStore.csv') print(file.head())</text:p>
      <text:p text:style-name="P66">The above code imports the dataset and displays sample records.</text:p>
      <text:h text:style-name="P61" text:outline-level="2">3.5.6 Advantages of Python</text:h>
      <text:list text:style-name="L60">
        <text:list-item>
          <text:p text:style-name="P150">Easy programming language</text:p>
        </text:list-item>
        <text:list-item>
          <text:p text:style-name="P150">Supports automation</text:p>
        </text:list-item>
        <text:list-item>
          <text:p text:style-name="P150">Powerful analytical libraries</text:p>
        </text:list-item>
        <text:list-item>
          <text:p text:style-name="P150">Open source software</text:p>
        </text:list-item>
        <text:list-item>
          <text:p text:style-name="P150">Excellent for large datasets</text:p>
        </text:list-item>
        <text:list-item>
          <text:p text:style-name="P151">Supports visualization</text:p>
        </text:list-item>
      </text:list>
      <text:h text:style-name="P61" text:outline-level="2">3.5.7 Limitations of Python</text:h>
      <text:list text:style-name="L61">
        <text:list-item>
          <text:p text:style-name="P152">Slower than some programming languages</text:p>
        </text:list-item>
        <text:list-item>
          <text:p text:style-name="P152">Requires programming knowledge</text:p>
        </text:list-item>
        <text:list-item>
          <text:p text:style-name="P153">High memory usage for large operations</text:p>
        </text:list-item>
      </text:list>
      <text:h text:style-name="P60" text:outline-level="1">3.6 Power BI</text:h>
      <text:h text:style-name="P141" text:outline-level="2">3.6.1 Introduction to Power BI</text:h>
      <text:p text:style-name="P66">Power BI is a business intelligence and data visualization tool developed by Microsoft.</text:p>
      <text:p text:style-name="P66">Power BI helps organisations:</text:p>
      <text:list text:style-name="L62">
        <text:list-item>
          <text:p text:style-name="P154"><text:soft-page-break/>Create dashboards</text:p>
        </text:list-item>
        <text:list-item>
          <text:p text:style-name="P154">Build reports</text:p>
        </text:list-item>
        <text:list-item>
          <text:p text:style-name="P154">Analyze data visually</text:p>
        </text:list-item>
        <text:list-item>
          <text:p text:style-name="P154">Share insights</text:p>
        </text:list-item>
        <text:list-item>
          <text:p text:style-name="P155">Monitor KPIs</text:p>
        </text:list-item>
      </text:list>
      <text:p text:style-name="P66">Power BI is widely used by data analysts and business organisations.</text:p>
      <text:h text:style-name="P61" text:outline-level="2">3.6.2 Role of Power BI in the Project</text:h>
      <text:p text:style-name="P66">In this project, Power BI is used for:</text:p>
      <text:list text:style-name="L63">
        <text:list-item>
          <text:p text:style-name="P156">Data visualization</text:p>
        </text:list-item>
        <text:list-item>
          <text:p text:style-name="P156">Dashboard creation</text:p>
        </text:list-item>
        <text:list-item>
          <text:p text:style-name="P156">KPI analysis</text:p>
        </text:list-item>
        <text:list-item>
          <text:p text:style-name="P156">Customer segmentation reporting</text:p>
        </text:list-item>
        <text:list-item>
          <text:p text:style-name="P156">Sales analysis</text:p>
        </text:list-item>
        <text:list-item>
          <text:p text:style-name="P157">Profit analysis</text:p>
        </text:list-item>
      </text:list>
      <text:h text:style-name="P61" text:outline-level="2">3.6.3 Power BI Components Used</text:h>
      <text:h text:style-name="P158" text:outline-level="3">Power Query</text:h>
      <text:p text:style-name="P66">Used for data transformation and preprocessing.</text:p>
      <text:h text:style-name="P23" text:outline-level="3">Data Model</text:h>
      <text:p text:style-name="P66">Used to create relationships between tables.</text:p>
      <text:h text:style-name="P23" text:outline-level="3">DAX</text:h>
      <text:p text:style-name="P66">Used for calculated measures and KPIs.</text:p>
      <text:h text:style-name="P23" text:outline-level="3">Visualisations</text:h>
      <text:p text:style-name="P66">Used charts include:</text:p>
      <text:list text:style-name="L64">
        <text:list-item>
          <text:p text:style-name="P159">Bar charts</text:p>
        </text:list-item>
        <text:list-item>
          <text:p text:style-name="P159">Pie charts</text:p>
        </text:list-item>
        <text:list-item>
          <text:p text:style-name="P159">Line charts</text:p>
        </text:list-item>
        <text:list-item>
          <text:p text:style-name="P159">KPI cards</text:p>
        </text:list-item>
        <text:list-item>
          <text:p text:style-name="P159">Scatter charts</text:p>
        </text:list-item>
        <text:list-item>
          <text:p text:style-name="P159">Tree maps</text:p>
        </text:list-item>
        <text:list-item>
          <text:p text:style-name="P159">Tables</text:p>
        </text:list-item>
        <text:list-item>
          <text:p text:style-name="P160">Slicers</text:p>
        </text:list-item>
      </text:list>
      <text:h text:style-name="P61" text:outline-level="2"><text:span text:style-name="T10">3.6.4</text:span> DAX Functions Used</text:h>
      <text:p text:style-name="P66">DAX stands for Data Analysis Expressions.</text:p>
      <text:p text:style-name="P66">Common DAX formulas used:</text:p>
      <text:h text:style-name="P23" text:outline-level="3">Total Sales</text:h>
      <text:p text:style-name="P66">Total Sales = SUM(Fact_Sales[Sales])</text:p>
      <text:h text:style-name="P23" text:outline-level="3"><text:soft-page-break/>Total Profit</text:h>
      <text:p text:style-name="P66">Total Profit = SUM(Fact_Sales[Profit])</text:p>
      <text:h text:style-name="P23" text:outline-level="3">Total Customers</text:h>
      <text:p text:style-name="P66">Total Customers = DISTINCTCOUNT(Fact_Sales[Customer_ID])</text:p>
      <text:h text:style-name="P15" text:outline-level="2">3.6.5 Advantages of Power BI</text:h>
      <text:list text:style-name="L65">
        <text:list-item>
          <text:p text:style-name="P161">Interactive dashboards</text:p>
        </text:list-item>
        <text:list-item>
          <text:p text:style-name="P161">Easy visualization</text:p>
        </text:list-item>
        <text:list-item>
          <text:p text:style-name="P161">Real time reporting</text:p>
        </text:list-item>
        <text:list-item>
          <text:p text:style-name="P161">Strong integration with SQL and Excel</text:p>
        </text:list-item>
        <text:list-item>
          <text:p text:style-name="P161">User friendly interface</text:p>
        </text:list-item>
        <text:list-item>
          <text:p text:style-name="P162">Powerful DAX calculations</text:p>
        </text:list-item>
      </text:list>
      <text:h text:style-name="P61" text:outline-level="2">3.6.6 Limitations of Power BI</text:h>
      <text:list text:style-name="L66">
        <text:list-item>
          <text:p text:style-name="P163">Requires system resources</text:p>
        </text:list-item>
        <text:list-item>
          <text:p text:style-name="P163">Limited free features</text:p>
        </text:list-item>
        <text:list-item>
          <text:p text:style-name="P164">Complex DAX formulas require practice</text:p>
        </text:list-item>
      </text:list>
      <text:h text:style-name="P165" text:outline-level="1">3.7 Star Schema Modelling</text:h>
      <text:h text:style-name="P141" text:outline-level="2">3.7.1 Introduction to Star Schema</text:h>
      <text:p text:style-name="P66">Star schema is a data modelling technique used in data warehousing and business intelligence systems.</text:p>
      <text:p text:style-name="P66">A star schema contains:</text:p>
      <text:list text:style-name="L67">
        <text:list-item>
          <text:p text:style-name="P166">Fact tables</text:p>
        </text:list-item>
        <text:list-item>
          <text:p text:style-name="P167">Dimension tables</text:p>
        </text:list-item>
      </text:list>
      <text:p text:style-name="P66">The fact table contains numerical business metrics, while dimension tables contain descriptive attributes.</text:p>
      <text:h text:style-name="P61" text:outline-level="2">3.7.2 Importance of Star Schema</text:h>
      <text:list text:style-name="L68">
        <text:list-item>
          <text:p text:style-name="P168">Faster query performance</text:p>
        </text:list-item>
        <text:list-item>
          <text:p text:style-name="P168">Better dashboard reporting</text:p>
        </text:list-item>
        <text:list-item>
          <text:p text:style-name="P168">Simplified data relationships</text:p>
        </text:list-item>
        <text:list-item>
          <text:p text:style-name="P168">Improved analytical efficiency</text:p>
        </text:list-item>
        <text:list-item>
          <text:p text:style-name="P169">Easy understanding of data structures</text:p>
        </text:list-item>
      </text:list>
      <text:h text:style-name="P15" text:outline-level="2">3.7.3 Fact Table</text:h>
      <text:p text:style-name="P66">The fact table contains:</text:p>
      <text:list text:style-name="L69">
        <text:list-item>
          <text:p text:style-name="P170">Sales</text:p>
        </text:list-item>
        <text:list-item>
          <text:p text:style-name="P170">Profit</text:p>
        </text:list-item>
        <text:list-item>
          <text:p text:style-name="P170">Quantity</text:p>
        </text:list-item>
        <text:list-item>
          <text:p text:style-name="P171">Order information</text:p>
        </text:list-item>
      </text:list>
      <text:h text:style-name="P61" text:outline-level="2"><text:soft-page-break/>3.7.4 Dimension Tables</text:h>
      <text:p text:style-name="P120">Dimension tables include:</text:p>
      <text:list text:style-name="L70">
        <text:list-item>
          <text:p text:style-name="P172">Customer Dimension</text:p>
        </text:list-item>
        <text:list-item>
          <text:p text:style-name="P172">Product Dimension</text:p>
        </text:list-item>
        <text:list-item>
          <text:p text:style-name="P172">Date Dimension</text:p>
        </text:list-item>
        <text:list-item>
          <text:p text:style-name="P172">Shipping Dimension</text:p>
        </text:list-item>
        <text:list-item>
          <text:p text:style-name="P173">Region Dimension</text:p>
        </text:list-item>
      </text:list>
      <text:h text:style-name="P141" text:outline-level="2">3.7.5 Advantages of Star Schema</text:h>
      <text:list text:style-name="L71">
        <text:list-item>
          <text:p text:style-name="P174">Simple structure</text:p>
        </text:list-item>
        <text:list-item>
          <text:p text:style-name="P174">Better reporting speed</text:p>
        </text:list-item>
        <text:list-item>
          <text:p text:style-name="P174">Improved data organisation</text:p>
        </text:list-item>
        <text:list-item>
          <text:p text:style-name="P175">Supports business intelligence systems</text:p>
        </text:list-item>
      </text:list>
      <text:h text:style-name="P60" text:outline-level="1">3.8 RFM Analysis Technology</text:h>
      <text:h text:style-name="P141" text:outline-level="2">3.8.1 Introduction to RFM Analysis</text:h>
      <text:p text:style-name="P66">RFM Analysis is a customer segmentation technique based on:</text:p>
      <text:list text:style-name="L72">
        <text:list-item>
          <text:p text:style-name="P176">Recency</text:p>
        </text:list-item>
        <text:list-item>
          <text:p text:style-name="P176">Frequency</text:p>
        </text:list-item>
        <text:list-item>
          <text:p text:style-name="P177">Monetary Value</text:p>
        </text:list-item>
      </text:list>
      <text:h text:style-name="P141" text:outline-level="2">3.8.2 Recency</text:h>
      <text:p text:style-name="P66">Recency measures how recently a customer made a purchase.</text:p>
      <text:p text:style-name="P66">Formula:</text:p>
      <text:p text:style-name="P66">genui{"math_block_widget_always_prefetch_v2":{"content":"Recency = Current\ Date - Last\ Purchase\ Date"}}</text:p>
      <text:p text:style-name="P66">Customers with lower recency values are considered active customers.</text:p>
      <text:h text:style-name="P141" text:outline-level="2">3.8.3 Frequency</text:h>
      <text:p text:style-name="P66">Frequency measures how often customers purchase products.</text:p>
      <text:p text:style-name="P66">Formula:</text:p>
      <text:p text:style-name="P66">genui{"math_block_widget_always_prefetch_v2":{"content":"Frequency = Total\ Number\ of\ Orders"}}</text:p>
      <text:p text:style-name="P66">Higher frequency indicates loyal customers.</text:p>
      <text:h text:style-name="P141" text:outline-level="2">3.8.4 Monetary Value</text:h>
      <text:p text:style-name="P66">Monetary value measures total customer spending.</text:p>
      <text:p text:style-name="P66">Formula:</text:p>
      <text:p text:style-name="P66">genui{"math_block_widget_always_prefetch_v2":{"content":"Monetary = Total\ Sales\ Amount"}}</text:p>
      <text:p text:style-name="P66"><text:soft-page-break/>Higher monetary value indicates premium customers.</text:p>
      <text:h text:style-name="P61" text:outline-level="2">3.8.5 Benefits of RFM Analysis</text:h>
      <text:list text:style-name="L73">
        <text:list-item>
          <text:p text:style-name="P178">Improved customer retention<text:span text:style-name="T10"/></text:p>
        </text:list-item>
        <text:list-item>
          <text:p text:style-name="P179">Better customer targeting</text:p>
        </text:list-item>
        <text:list-item>
          <text:p text:style-name="P179">Increased revenue</text:p>
        </text:list-item>
        <text:list-item>
          <text:p text:style-name="P178"><text:span text:style-name="T10">Personali</text:span>sed marketing</text:p>
        </text:list-item>
        <text:list-item>
          <text:p text:style-name="P180">Better customer engagement</text:p>
        </text:list-item>
      </text:list>
      <text:h text:style-name="P60" text:outline-level="1">3.9 Integration of Technologies</text:h>
      <text:p text:style-name="P66"><text:span text:style-name="T13">The project integrates multiple te</text:span>chnologies to create a complete analytics workflow.</text:p>
      <text:h text:style-name="P23" text:outline-level="3">Workflow of the Project</text:h>
      <text:list text:style-name="L74">
        <text:list-item>
          <text:p text:style-name="P181">Dataset collected in Excel</text:p>
        </text:list-item>
        <text:list-item>
          <text:p text:style-name="P181">SQL used for querying and transformation</text:p>
        </text:list-item>
        <text:list-item>
          <text:p text:style-name="P181">Python used for cleaning and analysis</text:p>
        </text:list-item>
        <text:list-item>
          <text:p text:style-name="P181">Star schema model created</text:p>
        </text:list-item>
        <text:list-item>
          <text:p text:style-name="P181">Power BI dashboards developed</text:p>
        </text:list-item>
        <text:list-item>
          <text:p text:style-name="P182">Business insights generated</text:p>
        </text:list-item>
      </text:list>
      <text:p text:style-name="P66">The integration of these technologies improves efficiency and analytical accuracy.</text:p>
      <text:h text:style-name="P60" text:outline-level="1">3.10 Advantages of the Overall Technology Stack</text:h>
      <text:p text:style-name="P66">The combined use of SQL, Python, and Power BI provides several advantages.</text:p>
      <text:list text:style-name="L75">
        <text:list-item>
          <text:p text:style-name="P183">End to end analytical workflow</text:p>
        </text:list-item>
        <text:list-item>
          <text:p text:style-name="P183">Faster data processing</text:p>
        </text:list-item>
        <text:list-item>
          <text:p text:style-name="P183">Better data visualization</text:p>
        </text:list-item>
        <text:list-item>
          <text:p text:style-name="P183">Improved reporting efficiency</text:p>
        </text:list-item>
        <text:list-item>
          <text:p text:style-name="P183">Strong analytical capabilities</text:p>
        </text:list-item>
        <text:list-item>
          <text:p text:style-name="P184">Real world business applicability</text:p>
        </text:list-item>
      </text:list>
      <text:h text:style-name="P60" text:outline-level="1">3.11 Conclusion</text:h>
      <text:p text:style-name="P66">This chapter discussed the tools and technologies used in the Customer Segmentation using RFM Analysis project.</text:p>
      <text:p text:style-name="P66">The chapter explained the importance and role of Excel, SQL, Python, Power BI, star schema modelling, and RFM Analysis in the project. The integration of these technologies provides a complete analytical framework for transforming raw transaction data into business intelligence.</text:p>
      <text:p text:style-name="P66">The next chapter discusses the Online Super Store dataset in detail, including dataset structure, attributes, data types, and transaction information used for analysis.</text:p>
      <text:h text:style-name="P9" text:outline-level="1"><text:soft-page-break/><text:span text:style-name="Strong_20_Emphasis"><text:span text:style-name="T8">CHAPTER 4</text:span></text:span></text:h>
      <text:h text:style-name="P59" text:outline-level="1">DATASET DESCRIPTION</text:h>
      <text:h text:style-name="P61" text:outline-level="2">4.1 Introduction</text:h>
      <text:p text:style-name="P66">Data is one of the most important assets in modern business organisations. Every transaction performed by customers generates valuable information that can be analysed to understand customer behaviour, sales performance, product demand, and business growth. Proper understanding of datasets is essential before performing any analytical operations.</text:p>
      <text:p text:style-name="P66">In this project, the Online Super Store dataset is used for Customer Segmentation using RFM Analysis. The dataset contains customer transactions, product information, sales records, shipping details, and profit data collected from an online retail business.</text:p>
      <text:p text:style-name="P66">The dataset plays a major role in the success of the project because all business insights, customer segmentation results, dashboards, and analytical reports depend on the quality and structure of the data.</text:p>
      <text:p text:style-name="P66">This chapter explains the Online Super Store dataset in detail, including dataset structure, attributes, columns, data types, business meaning of fields, and dataset characteristics.</text:p>
      <text:h text:style-name="P60" text:outline-level="1">4.2 Overview of the Dataset</text:h>
      <text:p text:style-name="P66">The Online Super Store dataset is a structured business dataset containing retail sales transaction information. The dataset represents sales records generated through customer purchases in an online shopping environment.</text:p>
      <text:p text:style-name="P66">The dataset contains information related to:</text:p>
      <text:list text:style-name="L76">
        <text:list-item>
          <text:p text:style-name="P185">Customers</text:p>
        </text:list-item>
        <text:list-item>
          <text:p text:style-name="P185">Products</text:p>
        </text:list-item>
        <text:list-item>
          <text:p text:style-name="P185">Orders</text:p>
        </text:list-item>
        <text:list-item>
          <text:p text:style-name="P185">Sales</text:p>
        </text:list-item>
        <text:list-item>
          <text:p text:style-name="P185">Profit</text:p>
        </text:list-item>
        <text:list-item>
          <text:p text:style-name="P185">Quantity</text:p>
        </text:list-item>
        <text:list-item>
          <text:p text:style-name="P185">Shipping</text:p>
        </text:list-item>
        <text:list-item>
          <text:p text:style-name="P185">Regions</text:p>
        </text:list-item>
        <text:list-item>
          <text:p text:style-name="P185">Categories</text:p>
        </text:list-item>
        <text:list-item>
          <text:p text:style-name="P186">Order Dates</text:p>
        </text:list-item>
      </text:list>
      <text:p text:style-name="P66">The dataset is suitable for:</text:p>
      <text:list text:style-name="L77">
        <text:list-item>
          <text:p text:style-name="P187">Sales analysis</text:p>
        </text:list-item>
        <text:list-item>
          <text:p text:style-name="P187">Profit analysis</text:p>
        </text:list-item>
        <text:list-item>
          <text:p text:style-name="P187">Customer segmentation</text:p>
        </text:list-item>
        <text:list-item>
          <text:p text:style-name="P187">Product analysis</text:p>
        </text:list-item>
        <text:list-item>
          <text:p text:style-name="P187">Regional analysis</text:p>
        </text:list-item>
        <text:list-item>
          <text:p text:style-name="P188">Business intelligence reporting</text:p>
        </text:list-item>
      </text:list>
      <text:h text:style-name="P60" text:outline-level="1"><text:soft-page-break/>4.3 Purpose of Using the Dataset</text:h>
      <text:p text:style-name="P66">The dataset is used to analyze customer purchasing behaviour and perform RFM based customer segmentation.</text:p>
      <text:p text:style-name="P66">The main purposes include:</text:p>
      <text:list text:style-name="L78">
        <text:list-item>
          <text:p text:style-name="P189">Understanding customer transactions</text:p>
        </text:list-item>
        <text:list-item>
          <text:p text:style-name="P189">Identifying valuable customers</text:p>
        </text:list-item>
        <text:list-item>
          <text:p text:style-name="P189">Identifying frequent customers</text:p>
        </text:list-item>
        <text:list-item>
          <text:p text:style-name="P189">Measuring customer spending behaviour</text:p>
        </text:list-item>
        <text:list-item>
          <text:p text:style-name="P189">Building business dashboards</text:p>
        </text:list-item>
        <text:list-item>
          <text:p text:style-name="P189">Generating business insights</text:p>
        </text:list-item>
        <text:list-item>
          <text:p text:style-name="P190">Supporting data driven decision making</text:p>
        </text:list-item>
      </text:list>
      <text:p text:style-name="P66">The dataset supports both technical analysis and business reporting.</text:p>
      <text:h text:style-name="P60" text:outline-level="1">4.4 Source of the Dataset</text:h>
      <text:p text:style-name="P66">The Online Super Store dataset is a publicly available retail dataset commonly used for data analytics, business intelligence, SQL projects, Power BI projects, and machine learning projects.</text:p>
      <text:p text:style-name="P66">The dataset is generally available in:</text:p>
      <text:list text:style-name="L79">
        <text:list-item>
          <text:p text:style-name="P191">Excel format</text:p>
        </text:list-item>
        <text:list-item>
          <text:p text:style-name="P191">CSV format</text:p>
        </text:list-item>
        <text:list-item>
          <text:p text:style-name="P192">SQL database format</text:p>
        </text:list-item>
      </text:list>
      <text:p text:style-name="P66">The dataset is imported into the analytical environment for further processing and transformation.</text:p>
      <text:h text:style-name="P60" text:outline-level="1">4.5 Structure of the Dataset</text:h>
      <text:p text:style-name="P66">The dataset is organised in tabular format where:</text:p>
      <text:list text:style-name="L80">
        <text:list-item>
          <text:p text:style-name="P193">Rows represent individual transactions</text:p>
        </text:list-item>
        <text:list-item>
          <text:p text:style-name="P194">Columns represent transaction attributes</text:p>
        </text:list-item>
      </text:list>
      <text:p text:style-name="P66">Each row in the dataset represents one order transaction performed by a customer.</text:p>
      <text:p text:style-name="P66">The dataset contains:</text:p>
      <text:list text:style-name="L81">
        <text:list-item>
          <text:p text:style-name="P195">Numerical columns</text:p>
        </text:list-item>
        <text:list-item>
          <text:p text:style-name="P195">Text columns</text:p>
        </text:list-item>
        <text:list-item>
          <text:p text:style-name="P195">Date columns</text:p>
        </text:list-item>
        <text:list-item>
          <text:p text:style-name="P196">Categorical columns</text:p>
        </text:list-item>
      </text:list>
      <text:h text:style-name="P60" text:outline-level="1">4.6 Important Columns in the Dataset</text:h>
      <text:p text:style-name="P66">The Online Super Store dataset contains multiple important columns used for analysis.</text:p>
      <text:h text:style-name="P141" text:outline-level="2">4.6.1 Order ID</text:h>
      <text:p text:style-name="P66">Order ID is a unique identifier assigned to every customer order.</text:p>
      <text:p text:style-name="P66">Purpose:</text:p>
      <text:list text:style-name="L82">
        <text:list-item>
          <text:p text:style-name="P197">Identifying transactions</text:p>
        </text:list-item>
        <text:list-item>
          <text:p text:style-name="P197"><text:soft-page-break/>Tracking orders</text:p>
        </text:list-item>
        <text:list-item>
          <text:p text:style-name="P198">Counting order frequency</text:p>
        </text:list-item>
      </text:list>
      <text:p text:style-name="P66">Example:</text:p>
      <text:p text:style-name="P66">CA 2025 152156</text:p>
      <text:h text:style-name="P141" text:outline-level="2">4.6.2 Order Date</text:h>
      <text:p text:style-name="P66">Order Date represents the date when the customer placed the order.</text:p>
      <text:p text:style-name="P66">Purpose:</text:p>
      <text:list text:style-name="L83">
        <text:list-item>
          <text:p text:style-name="P199">Calculating Recency</text:p>
        </text:list-item>
        <text:list-item>
          <text:p text:style-name="P199">Monthly sales analysis</text:p>
        </text:list-item>
        <text:list-item>
          <text:p text:style-name="P199">Yearly sales analysis</text:p>
        </text:list-item>
        <text:list-item>
          <text:p text:style-name="P200">Time based analysis</text:p>
        </text:list-item>
      </text:list>
      <text:p text:style-name="P66">Data Type:</text:p>
      <text:p text:style-name="P66">Date</text:p>
      <text:h text:style-name="P61" text:outline-level="2">4.6.3 Ship Date</text:h>
      <text:p text:style-name="P66">Ship Date represents the date when the order was shipped.</text:p>
      <text:p text:style-name="P66">Purpose:</text:p>
      <text:list text:style-name="L84">
        <text:list-item>
          <text:p text:style-name="P201">Shipping analysis</text:p>
        </text:list-item>
        <text:list-item>
          <text:p text:style-name="P201">Delivery performance analysis</text:p>
        </text:list-item>
        <text:list-item>
          <text:p text:style-name="P202">Logistics reporting</text:p>
        </text:list-item>
      </text:list>
      <text:h text:style-name="P61" text:outline-level="2">4.6.4 Ship Mode</text:h>
      <text:p text:style-name="P66">Ship Mode indicates the shipping method used for delivery.</text:p>
      <text:p text:style-name="P66">Examples:</text:p>
      <text:list text:style-name="L85">
        <text:list-item>
          <text:p text:style-name="P203">Standard Class</text:p>
        </text:list-item>
        <text:list-item>
          <text:p text:style-name="P203">First Class</text:p>
        </text:list-item>
        <text:list-item>
          <text:p text:style-name="P203">Same Day</text:p>
        </text:list-item>
        <text:list-item>
          <text:p text:style-name="P204">Second Class</text:p>
        </text:list-item>
      </text:list>
      <text:p text:style-name="P66">Purpose:</text:p>
      <text:list text:style-name="L86">
        <text:list-item>
          <text:p text:style-name="P205">Shipping performance analysis</text:p>
        </text:list-item>
        <text:list-item>
          <text:p text:style-name="P206">Delivery method comparison</text:p>
        </text:list-item>
      </text:list>
      <text:h text:style-name="P61" text:outline-level="2">4.6.5 Customer ID</text:h>
      <text:p text:style-name="P66">Customer ID is a unique identifier assigned to customers.</text:p>
      <text:p text:style-name="P66">Purpose:</text:p>
      <text:list text:style-name="L87">
        <text:list-item>
          <text:p text:style-name="P207">Customer tracking</text:p>
        </text:list-item>
        <text:list-item>
          <text:p text:style-name="P207">Customer segmentation</text:p>
        </text:list-item>
        <text:list-item>
          <text:p text:style-name="P208">RFM Analysis</text:p>
        </text:list-item>
      </text:list>
      <text:h text:style-name="P61" text:outline-level="2"><text:soft-page-break/>4.6.6 Customer Name</text:h>
      <text:p text:style-name="P66">Customer Name contains the name of customers.</text:p>
      <text:p text:style-name="P66">Purpose:</text:p>
      <text:list text:style-name="L88">
        <text:list-item>
          <text:p text:style-name="P209">Customer identification</text:p>
        </text:list-item>
        <text:list-item>
          <text:p text:style-name="P209">Customer reporting</text:p>
        </text:list-item>
        <text:list-item>
          <text:p text:style-name="P210">Customer analysis</text:p>
        </text:list-item>
      </text:list>
      <text:h text:style-name="P61" text:outline-level="2">4.6.7 Segment</text:h>
      <text:p text:style-name="P66">Segment represents customer business categories.</text:p>
      <text:p text:style-name="P66">Examples:</text:p>
      <text:list text:style-name="L89">
        <text:list-item>
          <text:p text:style-name="P211">Consumer</text:p>
        </text:list-item>
        <text:list-item>
          <text:p text:style-name="P211">Corporate</text:p>
        </text:list-item>
        <text:list-item>
          <text:p text:style-name="P212">Home Office</text:p>
        </text:list-item>
      </text:list>
      <text:p text:style-name="P66">Purpose:</text:p>
      <text:list text:style-name="L90">
        <text:list-item>
          <text:p text:style-name="P213">Segment wise sales analysis</text:p>
        </text:list-item>
        <text:list-item>
          <text:p text:style-name="P214">Customer classification</text:p>
        </text:list-item>
      </text:list>
      <text:h text:style-name="P62" text:outline-level="2">4.6.8 Country</text:h>
      <text:p text:style-name="P66"><text:span text:style-name="T14">Country indicates cust</text:span>omer country location.</text:p>
      <text:p text:style-name="P66">Purpose:</text:p>
      <text:list text:style-name="L91">
        <text:list-item>
          <text:p text:style-name="P215">Geographic analysis</text:p>
        </text:list-item>
        <text:list-item>
          <text:p text:style-name="P216">Country wise reporting</text:p>
        </text:list-item>
      </text:list>
      <text:p text:style-name="P217"/>
      <text:h text:style-name="P141" text:outline-level="2">4.6.9 City</text:h>
      <text:p text:style-name="P66">City represents customer city location.</text:p>
      <text:p text:style-name="P66">Purpose:</text:p>
      <text:list text:style-name="L92">
        <text:list-item>
          <text:p text:style-name="P218">City wise sales analysis</text:p>
        </text:list-item>
        <text:list-item>
          <text:p text:style-name="P219">Customer location analysis</text:p>
        </text:list-item>
      </text:list>
      <text:h text:style-name="P61" text:outline-level="2">4.6.10 State</text:h>
      <text:p text:style-name="P66">State represents customer state information.</text:p>
      <text:p text:style-name="P66">Purpose:</text:p>
      <text:list text:style-name="L93">
        <text:list-item>
          <text:p text:style-name="P220">Regional sales analysis</text:p>
        </text:list-item>
        <text:list-item>
          <text:p text:style-name="P221">State wise reporting</text:p>
        </text:list-item>
      </text:list>
      <text:h text:style-name="P61" text:outline-level="2">4.6.11 Postal Code</text:h>
      <text:p text:style-name="P66">Postal Code represents location postal identification.</text:p>
      <text:p text:style-name="P66"><text:soft-page-break/>Purpose:</text:p>
      <text:list text:style-name="L94">
        <text:list-item>
          <text:p text:style-name="P222">Geographic segmentation</text:p>
        </text:list-item>
        <text:list-item>
          <text:p text:style-name="P223">Delivery location analysis</text:p>
        </text:list-item>
      </text:list>
      <text:h text:style-name="P61" text:outline-level="2">4.6.12 Region</text:h>
      <text:p text:style-name="P66"><text:span text:style-name="T15">Region represents sales regions</text:span>.</text:p>
      <text:p text:style-name="P66">Examples:</text:p>
      <text:list text:style-name="L95">
        <text:list-item>
          <text:p text:style-name="P224">East</text:p>
        </text:list-item>
        <text:list-item>
          <text:p text:style-name="P224">West</text:p>
        </text:list-item>
        <text:list-item>
          <text:p text:style-name="P224">South</text:p>
        </text:list-item>
        <text:list-item>
          <text:p text:style-name="P225">Central</text:p>
        </text:list-item>
      </text:list>
      <text:p text:style-name="P66">Purpose:</text:p>
      <text:list text:style-name="L96">
        <text:list-item>
          <text:p text:style-name="P226">Regional sales analysis</text:p>
        </text:list-item>
        <text:list-item>
          <text:p text:style-name="P226">Profit comparison</text:p>
        </text:list-item>
        <text:list-item>
          <text:p text:style-name="P227">Dashboard reporting</text:p>
        </text:list-item>
      </text:list>
      <text:h text:style-name="P61" text:outline-level="2">4.6.13 Product ID</text:h>
      <text:p text:style-name="P66">Product ID uniquely identifies products.</text:p>
      <text:p text:style-name="P66">Purpose:</text:p>
      <text:list text:style-name="L97">
        <text:list-item>
          <text:p text:style-name="P228">Product tracking</text:p>
        </text:list-item>
        <text:list-item>
          <text:p text:style-name="P228">Product analysis</text:p>
        </text:list-item>
        <text:list-item>
          <text:p text:style-name="P229">Inventory analysis</text:p>
        </text:list-item>
      </text:list>
      <text:h text:style-name="P61" text:outline-level="2">4.6.14 Category</text:h>
      <text:p text:style-name="P66"><text:span text:style-name="T15">Category represents prod</text:span>uct categories.</text:p>
      <text:p text:style-name="P66">Examples:</text:p>
      <text:list text:style-name="L98">
        <text:list-item>
          <text:p text:style-name="P230">Furniture</text:p>
        </text:list-item>
        <text:list-item>
          <text:p text:style-name="P230">Technology</text:p>
        </text:list-item>
        <text:list-item>
          <text:p text:style-name="P231">Office Supplies</text:p>
        </text:list-item>
      </text:list>
      <text:p text:style-name="P66">Purpose:</text:p>
      <text:list text:style-name="L99">
        <text:list-item>
          <text:p text:style-name="P232">Category wise sales analysis</text:p>
        </text:list-item>
        <text:list-item>
          <text:p text:style-name="P233">Product segmentation</text:p>
        </text:list-item>
      </text:list>
      <text:h text:style-name="P61" text:outline-level="2">4.6.15 Sub Category</text:h>
      <text:p text:style-name="P66">Sub Category represents product sub groups.</text:p>
      <text:p text:style-name="P66">Examples:</text:p>
      <text:list text:style-name="L100">
        <text:list-item>
          <text:p text:style-name="P234">Phones</text:p>
        </text:list-item>
        <text:list-item>
          <text:p text:style-name="P234">Chairs</text:p>
        </text:list-item>
        <text:list-item>
          <text:p text:style-name="P234">Binders</text:p>
        </text:list-item>
        <text:list-item>
          <text:p text:style-name="P235">Storage</text:p>
        </text:list-item>
      </text:list>
      <text:p text:style-name="P66"><text:soft-page-break/>Purpose:</text:p>
      <text:list text:style-name="L101">
        <text:list-item>
          <text:p text:style-name="P236">Detailed product analysis</text:p>
        </text:list-item>
        <text:list-item>
          <text:p text:style-name="P237">Product performance analysis</text:p>
        </text:list-item>
      </text:list>
      <text:h text:style-name="P61" text:outline-level="2">4.6.16 Product Name</text:h>
      <text:p text:style-name="P66">Product Name contains the actual product description.</text:p>
      <text:p text:style-name="P66">Purpose:</text:p>
      <text:list text:style-name="L102">
        <text:list-item>
          <text:p text:style-name="P238">Product level reporting</text:p>
        </text:list-item>
        <text:list-item>
          <text:p text:style-name="P239">Product sales analysis</text:p>
        </text:list-item>
      </text:list>
      <text:h text:style-name="P61" text:outline-level="2">4.6.17 Sales</text:h>
      <text:p text:style-name="P66">Sales represents transaction sales amount.</text:p>
      <text:p text:style-name="P66">Purpose:</text:p>
      <text:list text:style-name="L103">
        <text:list-item>
          <text:p text:style-name="P240">Revenue analysis</text:p>
        </text:list-item>
        <text:list-item>
          <text:p text:style-name="P240">Monetary value calculation</text:p>
        </text:list-item>
        <text:list-item>
          <text:p text:style-name="P241">KPI reporting</text:p>
        </text:list-item>
      </text:list>
      <text:p text:style-name="P66">Data Type:</text:p>
      <text:p text:style-name="P66">Decimal Number</text:p>
      <text:h text:style-name="P61" text:outline-level="2">4.6.18 Quantity</text:h>
      <text:p text:style-name="P66">Quantity represents the number of items purchased.</text:p>
      <text:p text:style-name="P66">Purpose:</text:p>
      <text:list text:style-name="L104">
        <text:list-item>
          <text:p text:style-name="P242">Product demand analysis</text:p>
        </text:list-item>
        <text:list-item>
          <text:p text:style-name="P242">Inventory analysis</text:p>
        </text:list-item>
        <text:list-item>
          <text:p text:style-name="P243">Sales quantity reporting</text:p>
        </text:list-item>
      </text:list>
      <text:h text:style-name="P61" text:outline-level="2">4.6.19 Discount</text:h>
      <text:p text:style-name="P66"><text:span text:style-name="T13">Discount represe</text:span>nts discount percentage applied to products.</text:p>
      <text:p text:style-name="P66">Purpose:</text:p>
      <text:list text:style-name="L105">
        <text:list-item>
          <text:p text:style-name="P244">Discount analysis</text:p>
        </text:list-item>
        <text:list-item>
          <text:p text:style-name="P245">Profitability analysis</text:p>
        </text:list-item>
      </text:list>
      <text:h text:style-name="P62" text:outline-level="2">4.6.20 Profit</text:h>
      <text:p text:style-name="P66">Profit represents net profit earned from transactions.</text:p>
      <text:p text:style-name="P66">Purpose:</text:p>
      <text:list text:style-name="L106">
        <text:list-item>
          <text:p text:style-name="P246">Profit analysis</text:p>
        </text:list-item>
        <text:list-item>
          <text:p text:style-name="P246">Business performance analysis</text:p>
        </text:list-item>
        <text:list-item>
          <text:p text:style-name="P247">KPI calculations</text:p>
        </text:list-item>
      </text:list>
      <text:h text:style-name="P60" text:outline-level="1"><text:soft-page-break/>4.7 Data Types in the Dataset</text:h>
      <text:p text:style-name="P66">The dataset contains multiple data types.</text:p>
      <text:h text:style-name="P141" text:outline-level="2">Numerical Data</text:h>
      <text:p text:style-name="P66">Examples:</text:p>
      <text:list text:style-name="L107">
        <text:list-item>
          <text:p text:style-name="P248">Sales</text:p>
        </text:list-item>
        <text:list-item>
          <text:p text:style-name="P248">Profit</text:p>
        </text:list-item>
        <text:list-item>
          <text:p text:style-name="P248">Quantity</text:p>
        </text:list-item>
        <text:list-item>
          <text:p text:style-name="P249">Discount</text:p>
        </text:list-item>
      </text:list>
      <text:p text:style-name="P66">Used for:</text:p>
      <text:list text:style-name="L108">
        <text:list-item>
          <text:p text:style-name="P250">Aggregations</text:p>
        </text:list-item>
        <text:list-item>
          <text:p text:style-name="P250">KPI calculations</text:p>
        </text:list-item>
        <text:list-item>
          <text:p text:style-name="P251">Statistical analysis</text:p>
        </text:list-item>
      </text:list>
      <text:h text:style-name="P141" text:outline-level="2">Text Data</text:h>
      <text:p text:style-name="P66">Examples:</text:p>
      <text:list text:style-name="L109">
        <text:list-item>
          <text:p text:style-name="P252">Customer Name</text:p>
        </text:list-item>
        <text:list-item>
          <text:p text:style-name="P252">Product Name</text:p>
        </text:list-item>
        <text:list-item>
          <text:p text:style-name="P252">Region</text:p>
        </text:list-item>
        <text:list-item>
          <text:p text:style-name="P253">Category</text:p>
        </text:list-item>
      </text:list>
      <text:p text:style-name="P66">Used for:</text:p>
      <text:list text:style-name="L110">
        <text:list-item>
          <text:p text:style-name="P254">Classification</text:p>
        </text:list-item>
        <text:list-item>
          <text:p text:style-name="P254">Filtering</text:p>
        </text:list-item>
        <text:list-item>
          <text:p text:style-name="P255">Segmentation</text:p>
        </text:list-item>
      </text:list>
      <text:h text:style-name="P141" text:outline-level="2">Date Data</text:h>
      <text:p text:style-name="P66">Examples:</text:p>
      <text:list text:style-name="L111">
        <text:list-item>
          <text:p text:style-name="P256">Order Date</text:p>
        </text:list-item>
        <text:list-item>
          <text:p text:style-name="P257">Ship Date</text:p>
        </text:list-item>
      </text:list>
      <text:p text:style-name="P66">Used for:</text:p>
      <text:list text:style-name="L112">
        <text:list-item>
          <text:p text:style-name="P258">Time analysis</text:p>
        </text:list-item>
        <text:list-item>
          <text:p text:style-name="P258">Trend analysis</text:p>
        </text:list-item>
        <text:list-item>
          <text:p text:style-name="P259">Recency calculations</text:p>
        </text:list-item>
      </text:list>
      <text:h text:style-name="P60" text:outline-level="1">4.8 Dataset Characteristics</text:h>
      <text:p text:style-name="P66">The Online Super Store dataset contains several important characteristics.</text:p>
      <text:h text:style-name="P141" text:outline-level="2">Structured Dataset</text:h>
      <text:p text:style-name="P66">The dataset is organised in rows and columns.</text:p>
      <text:h text:style-name="P141" text:outline-level="2">Transaction Based Dataset</text:h>
      <text:p text:style-name="P66">Each row represents a business transaction.</text:p>
      <text:h text:style-name="P141" text:outline-level="2"><text:soft-page-break/>Multi Dimensional Dataset</text:h>
      <text:p text:style-name="P66">The dataset contains:</text:p>
      <text:list text:style-name="L113">
        <text:list-item>
          <text:p text:style-name="P260">Customer dimension</text:p>
        </text:list-item>
        <text:list-item>
          <text:p text:style-name="P260">Product dimension</text:p>
        </text:list-item>
        <text:list-item>
          <text:p text:style-name="P260">Time dimension</text:p>
        </text:list-item>
        <text:list-item>
          <text:p text:style-name="P261">Geographic dimension</text:p>
        </text:list-item>
      </text:list>
      <text:h text:style-name="P141" text:outline-level="2">Analytical Dataset</text:h>
      <text:p text:style-name="P66">The dataset supports business analytics and reporting.</text:p>
      <text:h text:style-name="P60" text:outline-level="1">4.9 Importance of the Dataset in RFM Analysis</text:h>
      <text:p text:style-name="P66">The dataset provides all required attributes for RFM calculations.</text:p>
      <text:h text:style-name="P141" text:outline-level="2">Recency Calculation</text:h>
      <text:p text:style-name="P66">Recency is calculated using Order Date.</text:p>
      <text:p text:style-name="P66">Formula:</text:p>
      <text:p text:style-name="P66">genui{"math_block_widget_always_prefetch_v2":{"content":"Recency = Analysis\ Date - Last\ Purchase\ Date"}}</text:p>
      <text:h text:style-name="P141" text:outline-level="2">Frequency Calculation</text:h>
      <text:p text:style-name="P66">Frequency is calculated using total order count.</text:p>
      <text:p text:style-name="P66">Formula:</text:p>
      <text:p text:style-name="P66">genui{"math_block_widget_always_prefetch_v2":{"content":"Frequency = Count\ of\ Orders"}}</text:p>
      <text:h text:style-name="P141" text:outline-level="2">Monetary Calculation</text:h>
      <text:p text:style-name="P66">Monetary value is calculated using total sales amount.</text:p>
      <text:p text:style-name="P66">Formula:</text:p>
      <text:p text:style-name="P66">genui{"math_block_widget_always_prefetch_v2":{"content":"Monetary = Sum\ of\ Sales"}}</text:p>
      <text:h text:style-name="P60" text:outline-level="1">4.10 Dataset Challenges</text:h>
      <text:p text:style-name="P66">Real world datasets often contain several problems and inconsistencies.</text:p>
      <text:p text:style-name="P66">The Online Super Store dataset may contain:</text:p>
      <text:list text:style-name="L114">
        <text:list-item>
          <text:p text:style-name="P262">Missing values</text:p>
        </text:list-item>
        <text:list-item>
          <text:p text:style-name="P262">Duplicate records</text:p>
        </text:list-item>
        <text:list-item>
          <text:p text:style-name="P262">Incorrect data formats</text:p>
        </text:list-item>
        <text:list-item>
          <text:p text:style-name="P262">Null values</text:p>
        </text:list-item>
        <text:list-item>
          <text:p text:style-name="P262">Inconsistent values</text:p>
        </text:list-item>
        <text:list-item>
          <text:p text:style-name="P262">Unwanted columns</text:p>
        </text:list-item>
        <text:list-item>
          <text:p text:style-name="P263">Outliers</text:p>
        </text:list-item>
      </text:list>
      <text:p text:style-name="P66">These issues must be resolved during the data cleaning process.</text:p>
      <text:h text:style-name="P60" text:outline-level="1"><text:soft-page-break/>4.11 Data Quality Issues</text:h>
      <text:h text:style-name="P141" text:outline-level="2">Missing Values</text:h>
      <text:p text:style-name="P66">Some columns may contain empty or null values.</text:p>
      <text:h text:style-name="P141" text:outline-level="2">Duplicate Records</text:h>
      <text:p text:style-name="P66">Duplicate transactions may affect analytical accuracy.</text:p>
      <text:h text:style-name="P141" text:outline-level="2">Incorrect Data Types</text:h>
      <text:p text:style-name="P66">Date columns and numerical columns may require formatting.</text:p>
      <text:h text:style-name="P141" text:outline-level="2">Inconsistent Naming</text:h>
      <text:p text:style-name="P66">Product names and categories may contain formatting inconsistencies.</text:p>
      <text:h text:style-name="P60" text:outline-level="1">4.12 Importance of Data Cleaning</text:h>
      <text:p text:style-name="P66">Data cleaning is necessary before performing analytics.</text:p>
      <text:p text:style-name="P66">Benefits include:</text:p>
      <text:list text:style-name="L115">
        <text:list-item>
          <text:p text:style-name="P264">Improved accuracy</text:p>
        </text:list-item>
        <text:list-item>
          <text:p text:style-name="P264">Better reporting</text:p>
        </text:list-item>
        <text:list-item>
          <text:p text:style-name="P264">Faster processing</text:p>
        </text:list-item>
        <text:list-item>
          <text:p text:style-name="P264">Reliable dashboards</text:p>
        </text:list-item>
        <text:list-item>
          <text:p text:style-name="P265">Correct analytical insights</text:p>
        </text:list-item>
      </text:list>
      <text:p text:style-name="P66">The next chapter focuses on data cleaning and preprocessing techniques used in the project.</text:p>
      <text:h text:style-name="P60" text:outline-level="1">4.13 Dataset Preparation Process</text:h>
      <text:p text:style-name="P66">The dataset preparation process includes:</text:p>
      <text:list text:style-name="L116">
        <text:list-item>
          <text:p text:style-name="P266">Importing the dataset</text:p>
        </text:list-item>
        <text:list-item>
          <text:p text:style-name="P266">Understanding columns</text:p>
        </text:list-item>
        <text:list-item>
          <text:p text:style-name="P266">Identifying missing values</text:p>
        </text:list-item>
        <text:list-item>
          <text:p text:style-name="P266">Removing duplicates</text:p>
        </text:list-item>
        <text:list-item>
          <text:p text:style-name="P266">Formatting dates</text:p>
        </text:list-item>
        <text:list-item>
          <text:p text:style-name="P266">Creating transformed datasets</text:p>
        </text:list-item>
        <text:list-item>
          <text:p text:style-name="P267">Building star schema models</text:p>
        </text:list-item>
      </text:list>
      <text:p text:style-name="P66">Proper dataset preparation improves analytical performance.</text:p>
      <text:h text:style-name="P165" text:outline-level="1">4.14 Business Importance of Dataset Attributes</text:h>
      <text:p text:style-name="P66">Different attributes support different business operations.</text:p>
      <text:h text:style-name="P141" text:outline-level="2">Customer Attributes</text:h>
      <text:p text:style-name="P66">Used for:</text:p>
      <text:list text:style-name="L117">
        <text:list-item>
          <text:p text:style-name="P268">Customer segmentation</text:p>
        </text:list-item>
        <text:list-item>
          <text:p text:style-name="P268">Customer retention analysis</text:p>
        </text:list-item>
        <text:list-item>
          <text:p text:style-name="P269">Customer behaviour analysis</text:p>
        </text:list-item>
      </text:list>
      <text:h text:style-name="P141" text:outline-level="2"><text:soft-page-break/>Product Attributes</text:h>
      <text:p text:style-name="P66">Used for:</text:p>
      <text:list text:style-name="L118">
        <text:list-item>
          <text:p text:style-name="P270">Product sales analysis</text:p>
        </text:list-item>
        <text:list-item>
          <text:p text:style-name="P270">Inventory analysis</text:p>
        </text:list-item>
        <text:list-item>
          <text:p text:style-name="P271">Product performance reporting</text:p>
        </text:list-item>
      </text:list>
      <text:h text:style-name="P141" text:outline-level="2">Sales Attributes</text:h>
      <text:p text:style-name="P66">Used for:</text:p>
      <text:list text:style-name="L119">
        <text:list-item>
          <text:p text:style-name="P272">Revenue analysis</text:p>
        </text:list-item>
        <text:list-item>
          <text:p text:style-name="P272">Profitability analysis</text:p>
        </text:list-item>
        <text:list-item>
          <text:p text:style-name="P273">Business KPI reporting</text:p>
        </text:list-item>
      </text:list>
      <text:h text:style-name="P141" text:outline-level="2">Geographic Attributes</text:h>
      <text:p text:style-name="P66">Used for:</text:p>
      <text:list text:style-name="L120">
        <text:list-item>
          <text:p text:style-name="P274">Regional sales analysis</text:p>
        </text:list-item>
        <text:list-item>
          <text:p text:style-name="P274">Location based reporting</text:p>
        </text:list-item>
        <text:list-item>
          <text:p text:style-name="P275">Market analysis</text:p>
        </text:list-item>
      </text:list>
      <text:h text:style-name="P60" text:outline-level="1">4.15 Dataset Size and Analytical Capability</text:h>
      <text:p text:style-name="P66">The dataset contains sufficient records for:</text:p>
      <text:list text:style-name="L121">
        <text:list-item>
          <text:p text:style-name="P276">Customer analysis</text:p>
        </text:list-item>
        <text:list-item>
          <text:p text:style-name="P276">Product analysis</text:p>
        </text:list-item>
        <text:list-item>
          <text:p text:style-name="P276">Sales trend analysis</text:p>
        </text:list-item>
        <text:list-item>
          <text:p text:style-name="P276">Dashboard development</text:p>
        </text:list-item>
        <text:list-item>
          <text:p text:style-name="P277">Business intelligence reporting</text:p>
        </text:list-item>
      </text:list>
      <text:p text:style-name="P66">The dataset supports both beginner and advanced analytics projects.</text:p>
      <text:h text:style-name="P60" text:outline-level="1">4.16 Advantages of Using the Online Super Store Dataset</text:h>
      <text:list text:style-name="L122">
        <text:list-item>
          <text:p text:style-name="P278">Realistic business transactions</text:p>
        </text:list-item>
        <text:list-item>
          <text:p text:style-name="P278">Suitable for SQL projects</text:p>
        </text:list-item>
        <text:list-item>
          <text:p text:style-name="P278">Suitable for Python analysis</text:p>
        </text:list-item>
        <text:list-item>
          <text:p text:style-name="P278">Suitable for Power BI dashboards</text:p>
        </text:list-item>
        <text:list-item>
          <text:p text:style-name="P278">Supports RFM Analysis</text:p>
        </text:list-item>
        <text:list-item>
          <text:p text:style-name="P278">Supports star schema modelling</text:p>
        </text:list-item>
        <text:list-item>
          <text:p text:style-name="P278">Supports data cleaning practice</text:p>
        </text:list-item>
        <text:list-item>
          <text:p text:style-name="P279">Supports visualization development</text:p>
        </text:list-item>
      </text:list>
      <text:h text:style-name="P60" text:outline-level="1">4.17 Conclusion</text:h>
      <text:p text:style-name="P66">This chapter explained the Online Super Store dataset used in the Customer Segmentation using RFM Analysis project.</text:p>
      <text:p text:style-name="P66">The chapter discussed dataset structure, important columns, data types, dataset characteristics, data quality issues, and business importance of dataset attributes.</text:p>
      <text:p text:style-name="P66"><text:soft-page-break/>Understanding the dataset is essential before performing data cleaning, transformation, modeling, and customer segmentation analysis.</text:p>
      <text:p text:style-name="P66">The next chapter explains the data cleaning process in detail, including handling missing values, removing duplicates, correcting data types, and preprocessing the dataset for analysis.</text:p>
      <text:h text:style-name="P59" text:outline-level="1">CHAPTER 5</text:h>
      <text:h text:style-name="P60" text:outline-level="1">DATA CLEANING AND PREPROCESSING</text:h>
      <text:h text:style-name="P61" text:outline-level="2">5.1 Introduction</text:h>
      <text:p text:style-name="P1"><text:span text:style-name="Strong_20_Emphasis"><text:span text:style-name="T4">Data cleaning is one of the most important stages in the data analytics process. Raw business datasets often contain errors, missing values, duplicate records, incorrect formats, inconsistent values, and unnecessary information. These problems reduce the quality of analysis and may generate incorrect business insights.</text:span></text:span></text:p>
      <text:p text:style-name="P280">Before performing Customer Segmentation using RFM Analysis, the Online Super Store dataset must be cleaned and preprocessed properly. Clean data improves analytical accuracy, reporting quality, visualization performance, and business decision making.</text:p>
      <text:p text:style-name="P280">Data preprocessing transforms raw transaction data into a structured and analysis ready dataset. This process ensures that all records are valid, consistent, complete, and suitable for SQL analysis, Python analysis, and Power BI dashboard development.</text:p>
      <text:p text:style-name="P280">This chapter explains the complete data cleaning and preprocessing techniques used in the project.</text:p>
      <text:h text:style-name="P60" text:outline-level="1">5.2 Importance of Data Cleaning</text:h>
      <text:p text:style-name="P280">Data cleaning is essential because business decisions depend on data quality. Incorrect or inconsistent data may produce inaccurate reports and misleading insights.</text:p>
      <text:p text:style-name="P280">The importance of data cleaning includes:</text:p>
      <text:list text:style-name="L123">
        <text:list-item>
          <text:p text:style-name="P281">Improving data accuracy</text:p>
        </text:list-item>
        <text:list-item>
          <text:p text:style-name="P281">Removing duplicate records</text:p>
        </text:list-item>
        <text:list-item>
          <text:p text:style-name="P281">Handling missing values</text:p>
        </text:list-item>
        <text:list-item>
          <text:p text:style-name="P281">Correcting formatting issues</text:p>
        </text:list-item>
        <text:list-item>
          <text:p text:style-name="P281">Improving dashboard performance</text:p>
        </text:list-item>
        <text:list-item>
          <text:p text:style-name="P281">Ensuring reliable analysis</text:p>
        </text:list-item>
        <text:list-item>
          <text:p text:style-name="P281">Improving SQL query efficiency</text:p>
        </text:list-item>
        <text:list-item>
          <text:p text:style-name="P282">Supporting business intelligence systems</text:p>
        </text:list-item>
      </text:list>
      <text:p text:style-name="P280">Clean datasets improve the effectiveness of RFM Analysis and customer segmentation.</text:p>
      <text:h text:style-name="P60" text:outline-level="1">5.3 Data Cleaning Workflow</text:h>
      <text:p text:style-name="P280">The data cleaning workflow used in this project includes multiple steps.</text:p>
      <text:h text:style-name="P141" text:outline-level="2">Step 1</text:h>
      <text:p text:style-name="P280">Importing the raw dataset.</text:p>
      <text:h text:style-name="P141" text:outline-level="2"><text:soft-page-break/>Step 2</text:h>
      <text:p text:style-name="P280">Understanding dataset structure.</text:p>
      <text:h text:style-name="P141" text:outline-level="2">Step 3</text:h>
      <text:p text:style-name="P280">Identifying missing values.</text:p>
      <text:h text:style-name="P141" text:outline-level="2">Step 4</text:h>
      <text:p text:style-name="P280">Removing duplicate records.</text:p>
      <text:h text:style-name="P141" text:outline-level="2">Step 5</text:h>
      <text:p text:style-name="P280">Correcting data types.</text:p>
      <text:h text:style-name="P141" text:outline-level="2">Step 6</text:h>
      <text:p text:style-name="P280">Removing unwanted columns.</text:p>
      <text:h text:style-name="P141" text:outline-level="2">Step 7</text:h>
      <text:p text:style-name="P280">Handling inconsistent values.</text:p>
      <text:h text:style-name="P141" text:outline-level="2">Step 8</text:h>
      <text:p text:style-name="P280">Validating cleaned data.</text:p>
      <text:h text:style-name="P141" text:outline-level="2">Step 9</text:h>
      <text:p text:style-name="P280">Exporting transformed datasets.</text:p>
      <text:p text:style-name="P280">This workflow ensures the dataset becomes analysis ready.</text:p>
      <text:h text:style-name="P60" text:outline-level="1">5.4 Importing the Dataset</text:h>
      <text:p text:style-name="P280">The Online Super Store dataset is initially imported from Excel or CSV format.</text:p>
      <text:p text:style-name="P280">The dataset is loaded into:</text:p>
      <text:list text:style-name="L124">
        <text:list-item>
          <text:p text:style-name="P283">Python environment</text:p>
        </text:list-item>
        <text:list-item>
          <text:p text:style-name="P283">SQL database</text:p>
        </text:list-item>
        <text:list-item>
          <text:p text:style-name="P284">Power BI</text:p>
        </text:list-item>
      </text:list>
      <text:h text:style-name="P61" text:outline-level="2">5.4.1 Importing Dataset Using Python</text:h>
      <text:p text:style-name="P280">Python Pandas library is used to import the dataset.</text:p>
      <text:p text:style-name="P280">Example Code:</text:p>
      <text:p text:style-name="P280">import pandas as pd</text:p>
      <text:p text:style-name="P280">data = pd.read_csv('SuperStore.csv') print(data.head())</text:p>
      <text:p text:style-name="P280">Explanation:</text:p>
      <text:list text:style-name="L125">
        <text:list-item>
          <text:p text:style-name="P285">Pandas library is imported</text:p>
        </text:list-item>
        <text:list-item>
          <text:p text:style-name="P285">Dataset is loaded using read_csv()</text:p>
        </text:list-item>
        <text:list-item>
          <text:p text:style-name="P286">head() displays sample records</text:p>
        </text:list-item>
      </text:list>
      <text:h text:style-name="P61" text:outline-level="2"><text:soft-page-break/>5.4.2 Importing Dataset into SQL</text:h>
      <text:p text:style-name="P280">The dataset is imported into SQL database tables.</text:p>
      <text:p text:style-name="P280">Example:</text:p>
      <text:p text:style-name="P280">CREATE TABLE SuperStore ( Order_ID VARCHAR(50), Customer_ID VARCHAR(50), Sales FLOAT, Profit FLOAT );</text:p>
      <text:p text:style-name="P280">Purpose:</text:p>
      <text:list text:style-name="L126">
        <text:list-item>
          <text:p text:style-name="P287">Structured storage</text:p>
        </text:list-item>
        <text:list-item>
          <text:p text:style-name="P287">Faster querying</text:p>
        </text:list-item>
        <text:list-item>
          <text:p text:style-name="P287">Data transformation</text:p>
        </text:list-item>
        <text:list-item>
          <text:p text:style-name="P288">Analytical operations</text:p>
        </text:list-item>
      </text:list>
      <text:h text:style-name="P60" text:outline-level="1">5.5 Understanding Raw Data</text:h>
      <text:p text:style-name="P280">Before cleaning the dataset, the structure and quality of data must be analyzed.</text:p>
      <text:p text:style-name="P280">The following checks are performed:</text:p>
      <text:list text:style-name="L127">
        <text:list-item>
          <text:p text:style-name="P289">Total number of rows</text:p>
        </text:list-item>
        <text:list-item>
          <text:p text:style-name="P289">Total number of columns</text:p>
        </text:list-item>
        <text:list-item>
          <text:p text:style-name="P289">Missing values</text:p>
        </text:list-item>
        <text:list-item>
          <text:p text:style-name="P289">Duplicate records</text:p>
        </text:list-item>
        <text:list-item>
          <text:p text:style-name="P289">Incorrect formats</text:p>
        </text:list-item>
        <text:list-item>
          <text:p text:style-name="P289">Data inconsistencies</text:p>
        </text:list-item>
        <text:list-item>
          <text:p text:style-name="P290">Unwanted columns</text:p>
        </text:list-item>
      </text:list>
      <text:h text:style-name="P61" text:outline-level="2">5.5.1 Viewing Dataset Information</text:h>
      <text:p text:style-name="P280">Python provides functions to understand dataset structure.</text:p>
      <text:p text:style-name="P280">Example:</text:p>
      <text:p text:style-name="P280">print(data.info())</text:p>
      <text:p text:style-name="P280">Purpose:</text:p>
      <text:list text:style-name="L128">
        <text:list-item>
          <text:p text:style-name="P291">Viewing column names</text:p>
        </text:list-item>
        <text:list-item>
          <text:p text:style-name="P291">Checking data types</text:p>
        </text:list-item>
        <text:list-item>
          <text:p text:style-name="P292">Identifying missing values</text:p>
        </text:list-item>
      </text:list>
      <text:h text:style-name="P61" text:outline-level="2">5.5.2 Viewing Statistical Summary</text:h>
      <text:p text:style-name="P280">Example:</text:p>
      <text:p text:style-name="P280">print(data.describe())</text:p>
      <text:p text:style-name="P280">Purpose:</text:p>
      <text:list text:style-name="L129">
        <text:list-item>
          <text:p text:style-name="P293">Understanding numerical values</text:p>
        </text:list-item>
        <text:list-item>
          <text:p text:style-name="P293">Identifying outliers</text:p>
        </text:list-item>
        <text:list-item>
          <text:p text:style-name="P294">Understanding data distribution</text:p>
        </text:list-item>
      </text:list>
      <text:h text:style-name="P60" text:outline-level="1"><text:soft-page-break/>5.6 Identifying Missing Values</text:h>
      <text:p text:style-name="P280">Missing values occur when some fields do not contain data.</text:p>
      <text:p text:style-name="P280">Examples:</text:p>
      <text:list text:style-name="L130">
        <text:list-item>
          <text:p text:style-name="P295">Empty customer names</text:p>
        </text:list-item>
        <text:list-item>
          <text:p text:style-name="P295">Missing postal codes</text:p>
        </text:list-item>
        <text:list-item>
          <text:p text:style-name="P296">Missing profit values</text:p>
        </text:list-item>
      </text:list>
      <text:p text:style-name="P280">Missing values reduce analytical quality and may affect customer segmentation results.</text:p>
      <text:h text:style-name="P61" text:outline-level="2">5.6.1 Checking Missing Values Using Python</text:h>
      <text:p text:style-name="P74">Example:</text:p>
      <text:p text:style-name="P280">print(data.isnull().sum())</text:p>
      <text:p text:style-name="P280">Explanation:</text:p>
      <text:list text:style-name="L131">
        <text:list-item>
          <text:p text:style-name="P297">isnull() identifies missing values</text:p>
        </text:list-item>
        <text:list-item>
          <text:p text:style-name="P298">sum() counts missing values in each column</text:p>
        </text:list-item>
      </text:list>
      <text:h text:style-name="P299" text:outline-level="2">5.6.2 Handling Missing Value several</text:h>
      <text:h text:style-name="P300" text:outline-level="2">techniques are used to handle missing values.</text:h>
      <text:h text:style-name="P23" text:outline-level="3">Removing Missing Records</text:h>
      <text:p text:style-name="P280">Used when missing records are very few.</text:p>
      <text:p text:style-name="P280">Example:</text:p>
      <text:p text:style-name="P280">data = data.dropna()</text:p>
      <text:h text:style-name="P23" text:outline-level="3">Replacing Missing Values</text:h>
      <text:p text:style-name="P301">S</text:p>
      <text:p text:style-name="P280">Used when records are important.</text:p>
      <text:p text:style-name="P280">Example:</text:p>
      <text:p text:style-name="P280">data['Profit'] = data['Profit'].fillna(0)</text:p>
      <text:h text:style-name="P60" text:outline-level="1">5.7 Removing Duplicate Records</text:h>
      <text:p text:style-name="P280">Duplicate records occur when the same transaction appears multiple times.</text:p>
      <text:p text:style-name="P280">Duplicate data causes:</text:p>
      <text:list text:style-name="L132">
        <text:list-item>
          <text:p text:style-name="P302">Incorrect sales totals</text:p>
        </text:list-item>
        <text:list-item>
          <text:p text:style-name="P302">Incorrect customer counts</text:p>
        </text:list-item>
        <text:list-item>
          <text:p text:style-name="P302">Incorrect RFM calculations</text:p>
        </text:list-item>
        <text:list-item>
          <text:p text:style-name="P303">Incorrect dashboards</text:p>
        </text:list-item>
      </text:list>
      <text:h text:style-name="P61" text:outline-level="2">5.7.1 Identifying Duplicate Records</text:h>
      <text:p text:style-name="P74">Example:</text:p>
      <text:p text:style-name="P280"><text:soft-page-break/>print(data.duplicated().sum())</text:p>
      <text:p text:style-name="P280">Purpose:</text:p>
      <text:p text:style-name="P280">Counts duplicate records in the dataset.</text:p>
      <text:h text:style-name="P61" text:outline-level="2">5.7.2 Removing Duplicate Records</text:h>
      <text:p text:style-name="P304">Example:</text:p>
      <text:p text:style-name="P280">data = data.drop_duplicates()</text:p>
      <text:p text:style-name="P280">Benefits:</text:p>
      <text:list text:style-name="L133">
        <text:list-item>
          <text:p text:style-name="P305">Accurate analysis</text:p>
        </text:list-item>
        <text:list-item>
          <text:p text:style-name="P305">Improved reporting</text:p>
        </text:list-item>
        <text:list-item>
          <text:p text:style-name="P306">Correct KPI calculations</text:p>
        </text:list-item>
      </text:list>
      <text:h text:style-name="P60" text:outline-level="1">5.8 Correcting Data Types</text:h>
      <text:p text:style-name="P307"><text:span text:style-name="T15">Incorrect data types create p</text:span>roblems during analysis.</text:p>
      <text:p text:style-name="P280">Examples:</text:p>
      <text:list text:style-name="L134">
        <text:list-item>
          <text:p text:style-name="P308">Dates stored as text</text:p>
        </text:list-item>
        <text:list-item>
          <text:p text:style-name="P308">Sales stored as strings</text:p>
        </text:list-item>
        <text:list-item>
          <text:p text:style-name="P309">Profit stored incorrectly</text:p>
        </text:list-item>
      </text:list>
      <text:h text:style-name="P61" text:outline-level="2">5.8.1 Converting Date Columns</text:h>
      <text:p text:style-name="P280">Example:</text:p>
      <text:p text:style-name="P280">data['Order Date'] = pd.to_datetime(data['Order Date'])</text:p>
      <text:p text:style-name="P280">Purpose:</text:p>
      <text:list text:style-name="L135">
        <text:list-item>
          <text:p text:style-name="P310">Date calculations</text:p>
        </text:list-item>
        <text:list-item>
          <text:p text:style-name="P310">Trend analysis</text:p>
        </text:list-item>
        <text:list-item>
          <text:p text:style-name="P311">Recency calculations</text:p>
        </text:list-item>
      </text:list>
      <text:h text:style-name="P61" text:outline-level="2">5.8.2 Converting Numerical Columns</text:h>
      <text:p text:style-name="P280">Example:</text:p>
      <text:p text:style-name="P280">data['Sales'] = data['Sales'].astype(float)</text:p>
      <text:p text:style-name="P280">Purpose:</text:p>
      <text:list text:style-name="L136">
        <text:list-item>
          <text:p text:style-name="P312">Accurate calculations</text:p>
        </text:list-item>
        <text:list-item>
          <text:p text:style-name="P312">Aggregations</text:p>
        </text:list-item>
        <text:list-item>
          <text:p text:style-name="P313">KPI generation</text:p>
        </text:list-item>
      </text:list>
      <text:h text:style-name="P60" text:outline-level="1">5.9 Removing Unwanted Columns</text:h>
      <text:p text:style-name="P280">Some columns may not be useful for analysis.</text:p>
      <text:p text:style-name="P280">Examples:</text:p>
      <text:list text:style-name="L137">
        <text:list-item>
          <text:p text:style-name="P314">Unnecessary IDs</text:p>
        </text:list-item>
        <text:list-item>
          <text:p text:style-name="P314"><text:soft-page-break/>Empty columns</text:p>
        </text:list-item>
        <text:list-item>
          <text:p text:style-name="P315">Duplicate information columns</text:p>
        </text:list-item>
      </text:list>
      <text:p text:style-name="P280">Removing unnecessary columns improves processing performance.</text:p>
      <text:h text:style-name="P61" text:outline-level="2">5.9.1 Dropping Columns Using Python</text:h>
      <text:p text:style-name="P280">data = data.drop(columns=['Row ID'])</text:p>
      <text:p text:style-name="P280">Benefits:Example:</text:p>
      <text:p text:style-name="P280"/>
      <text:list text:style-name="L138">
        <text:list-item>
          <text:p text:style-name="P316">Reduced memory usage</text:p>
        </text:list-item>
        <text:list-item>
          <text:p text:style-name="P316">Faster processing</text:p>
        </text:list-item>
        <text:list-item>
          <text:p text:style-name="P317">Better dashboard performance</text:p>
        </text:list-item>
      </text:list>
      <text:h text:style-name="P60" text:outline-level="1">5.10 Handling Inconsistent Values</text:h>
      <text:p text:style-name="P307"><text:s/><text:span text:style-name="T16">values occur when the same information is represented differently.</text:span></text:p>
      <text:p text:style-name="P280">Examples:</text:p>
      <text:list text:style-name="L139">
        <text:list-item>
          <text:p text:style-name="P318">Different spellings</text:p>
        </text:list-item>
        <text:list-item>
          <text:p text:style-name="P318">Extra spaces</text:p>
        </text:list-item>
        <text:list-item>
          <text:p text:style-name="P319">Uppercase and lowercase mismatches</text:p>
        </text:list-item>
      </text:list>
      <text:p text:style-name="P280">Examples:Inconsistent</text:p>
      <text:p text:style-name="P280">Technology technology TECHNOLOGY</text:p>
      <text:p text:style-name="P280">These inconsistencies must be standardised.</text:p>
      <text:h text:style-name="P61" text:outline-level="2">5.10.1 Standardizing Text Values</text:h>
      <text:p text:style-name="P11">Example:</text:p>
      <text:p text:style-name="P11">data['Category'] = data['Category'].str.upper()</text:p>
      <text:p text:style-name="P11">Purpose:</text:p>
      <text:list text:style-name="L140">
        <text:list-item>
          <text:p text:style-name="P320">Uniform values</text:p>
        </text:list-item>
        <text:list-item>
          <text:p text:style-name="P320">Better grouping</text:p>
        </text:list-item>
        <text:list-item>
          <text:p text:style-name="P321">Accurate reporting</text:p>
        </text:list-item>
      </text:list>
      <text:h text:style-name="P61" text:outline-level="2">5.10.2 Removing Extra Spaces</text:h>
      <text:p text:style-name="P11">Example:</text:p>
      <text:p text:style-name="P11">data['Customer Name'] = data['Customer Name'].str.strip()</text:p>
      <text:p text:style-name="P11">Purpose:</text:p>
      <text:list text:style-name="L141">
        <text:list-item>
          <text:p text:style-name="P322">Consistent customer names</text:p>
        </text:list-item>
        <text:list-item>
          <text:p text:style-name="P323">Better segmentation</text:p>
        </text:list-item>
      </text:list>
      <text:p text:style-name="P324"/>
      <text:h text:style-name="P60" text:outline-level="1"><text:soft-page-break/>5.11 Handling Outliers</text:h>
      <text:p text:style-name="P11">Outliers are abnormal values that differ significantly from normal records.</text:p>
      <text:p text:style-name="P11">Examples:</text:p>
      <text:list text:style-name="L142">
        <text:list-item>
          <text:p text:style-name="P325">Extremely high sales values</text:p>
        </text:list-item>
        <text:list-item>
          <text:p text:style-name="P325">Negative profits</text:p>
        </text:list-item>
        <text:list-item>
          <text:p text:style-name="P326">Abnormal quantities</text:p>
        </text:list-item>
      </text:list>
      <text:p text:style-name="P11">Outliers may affect:</text:p>
      <text:list text:style-name="L143">
        <text:list-item>
          <text:p text:style-name="P327">Average calculations</text:p>
        </text:list-item>
        <text:list-item>
          <text:p text:style-name="P327">Dashboard visuals</text:p>
        </text:list-item>
        <text:list-item>
          <text:p text:style-name="P328">RFM segmentation</text:p>
        </text:list-item>
      </text:list>
      <text:h text:style-name="P15" text:outline-level="2">5.11.1 Detecting Outliers</text:h>
      <text:p text:style-name="P307">Statistical methods are used to identify outliers.</text:p>
      <text:p text:style-name="P307">Example:</text:p>
      <text:list text:style-name="L144">
        <text:list-item>
          <text:p text:style-name="P329">Box plots</text:p>
        </text:list-item>
        <text:list-item>
          <text:p text:style-name="P329">Z score method</text:p>
        </text:list-item>
        <text:list-item>
          <text:p text:style-name="P330">Interquartile range method</text:p>
        </text:list-item>
      </text:list>
      <text:h text:style-name="P15" text:outline-level="2">5.11.2 Managing Outliers</text:h>
      <text:p text:style-name="P307">Techniques include:</text:p>
      <text:list text:style-name="L145">
        <text:list-item>
          <text:p text:style-name="P331">Removing extreme values</text:p>
        </text:list-item>
        <text:list-item>
          <text:p text:style-name="P331">Capping values</text:p>
        </text:list-item>
        <text:list-item>
          <text:p text:style-name="P332">Investigating abnormal records</text:p>
        </text:list-item>
      </text:list>
      <text:h text:style-name="P14" text:outline-level="1">5.12 Formatting Date Columns</text:h>
      <text:p text:style-name="P307">Date formatting is important for time based analysis.</text:p>
      <text:p text:style-name="P307">The project uses:</text:p>
      <text:list text:style-name="L146">
        <text:list-item>
          <text:p text:style-name="P333">Order Date</text:p>
        </text:list-item>
        <text:list-item>
          <text:p text:style-name="P334">Ship Date</text:p>
        </text:list-item>
      </text:list>
      <text:p text:style-name="P307">Date formatting supports:</text:p>
      <text:list text:style-name="L147">
        <text:list-item>
          <text:p text:style-name="P335">Monthly analysis</text:p>
        </text:list-item>
        <text:list-item>
          <text:p text:style-name="P335">Yearly analysis</text:p>
        </text:list-item>
        <text:list-item>
          <text:p text:style-name="P335">Trend analysis</text:p>
        </text:list-item>
        <text:list-item>
          <text:p text:style-name="P336">Recency calculations</text:p>
        </text:list-item>
      </text:list>
      <text:h text:style-name="P61" text:outline-level="2">5.12.1 Creating Date Attributes</text:h>
      <text:p text:style-name="P307">Additional date columns are created.</text:p>
      <text:p text:style-name="P307"><text:soft-page-break/>Example:</text:p>
      <text:p text:style-name="P307">data['Year'] = data['Order Date'].dt.year</text:p>
      <text:p text:style-name="P307">data['Month'] = data['Order Date'].dt.month</text:p>
      <text:p text:style-name="P307">Benefits:</text:p>
      <text:list text:style-name="L148">
        <text:list-item>
          <text:p text:style-name="P337">Better reporting</text:p>
        </text:list-item>
        <text:list-item>
          <text:p text:style-name="P337">Trend analysis</text:p>
        </text:list-item>
        <text:list-item>
          <text:p text:style-name="P338">Dashboard filtering</text:p>
        </text:list-item>
      </text:list>
      <text:h text:style-name="P60" text:outline-level="1">5.13 Data Validation</text:h>
      <text:p text:style-name="P307"><text:span text:style-name="T15">Data validation ensures</text:span> the dataset is accurate after cleaning.</text:p>
      <text:p text:style-name="P307">Validation checks include:</text:p>
      <text:list text:style-name="L149">
        <text:list-item>
          <text:p text:style-name="P339">Null value verification</text:p>
        </text:list-item>
        <text:list-item>
          <text:p text:style-name="P339">Duplicate verification</text:p>
        </text:list-item>
        <text:list-item>
          <text:p text:style-name="P339">Data type verification</text:p>
        </text:list-item>
        <text:list-item>
          <text:p text:style-name="P339">Sales total verification</text:p>
        </text:list-item>
        <text:list-item>
          <text:p text:style-name="P340">Customer count verification</text:p>
        </text:list-item>
      </text:list>
      <text:p text:style-name="P280">Validation improves analytical reliability.</text:p>
      <text:h text:style-name="P61" text:outline-level="2">5.13.1 SQL Validation Queries</text:h>
      <text:p text:style-name="P304">Example:</text:p>
      <text:p text:style-name="P307"><text:span text:style-name="T17">SELECT COUNT(</text:span>*) FROM SuperStore;</text:p>
      <text:p text:style-name="P11">Purpose:</text:p>
      <text:p text:style-name="P11">Verifies total records.</text:p>
      <text:h text:style-name="P141" text:outline-level="2">5.13.2 Python Validation</text:h>
      <text:p text:style-name="P11">Example:</text:p>
      <text:p text:style-name="P11">print(data.shape)</text:p>
      <text:p text:style-name="P11">Purpose:</text:p>
      <text:p text:style-name="P11">Verifies rows and columns.</text:p>
      <text:h text:style-name="P60" text:outline-level="1">5.14 Data Transformation Preparation</text:h>
      <text:p text:style-name="P11">After cleaning the dataset, preprocessing activities prepare data for transformation.</text:p>
      <text:p text:style-name="P11">Activities include:</text:p>
      <text:list text:style-name="L150">
        <text:list-item>
          <text:p text:style-name="P341">Creating customer tables</text:p>
        </text:list-item>
        <text:list-item>
          <text:p text:style-name="P341">Creating product tables</text:p>
        </text:list-item>
        <text:list-item>
          <text:p text:style-name="P341">Creating date tables</text:p>
        </text:list-item>
        <text:list-item>
          <text:p text:style-name="P341">Creating fact tables</text:p>
        </text:list-item>
        <text:list-item>
          <text:p text:style-name="P342"><text:soft-page-break/>Creating dimension tables</text:p>
        </text:list-item>
      </text:list>
      <text:p text:style-name="P11">These transformed datasets support star schema modeling.</text:p>
      <text:h text:style-name="P60" text:outline-level="1">5.15 Benefits of Data Preprocessing</text:h>
      <text:p text:style-name="P307">P<text:span text:style-name="T18">roper preprocessing provides several advantages.</text:span></text:p>
      <text:h text:style-name="P141" text:outline-level="2">Improved Accuracy</text:h>
      <text:p text:style-name="P11">Clean data improves analytical reliability.</text:p>
      <text:h text:style-name="P141" text:outline-level="2">Faster Query Processing</text:h>
      <text:p text:style-name="P11">Optimized datasets improve SQL performance.</text:p>
      <text:h text:style-name="P141" text:outline-level="2">Better Dashboard Performance</text:h>
      <text:p text:style-name="P11">Power BI dashboards load faster with clean datasets.</text:p>
      <text:h text:style-name="P141" text:outline-level="2">Improved Visualization</text:h>
      <text:p text:style-name="P11">Clean data improves chart quality.</text:p>
      <text:h text:style-name="P141" text:outline-level="2">Better Business Insights</text:h>
      <text:p text:style-name="P11">Reliable data improves decision making.</text:p>
      <text:h text:style-name="P60" text:outline-level="1">5.16 Challenges Faced During Data Cleaning</text:h>
      <text:p text:style-name="P11">Several challenges may occur during preprocessing.</text:p>
      <text:h text:style-name="P141" text:outline-level="2">Missing Customer Data</text:h>
      <text:p text:style-name="P11">Some records may not contain customer information.</text:p>
      <text:h text:style-name="P141" text:outline-level="2">Duplicate Transactions</text:h>
      <text:p text:style-name="P11">Duplicate orders may affect total sales.</text:p>
      <text:h text:style-name="P141" text:outline-level="2">Inconsistent Product Names</text:h>
      <text:p text:style-name="P11">Different naming conventions create grouping issues.</text:p>
      <text:h text:style-name="P141" text:outline-level="2">Incorrect Date Formats</text:h>
      <text:p text:style-name="P11">Date formatting issues affect trend analysis.</text:p>
      <text:h text:style-name="P141" text:outline-level="2">Null Profit Values</text:h>
      <text:p text:style-name="P11">Missing profit values affect KPI calculations.</text:p>
      <text:p text:style-name="P11">These challenges are resolved using SQL and Python preprocessing techniques.</text:p>
      <text:h text:style-name="P60" text:outline-level="1">5.17 Role of Data Cleaning in RFM Analysis</text:h>
      <text:p text:style-name="P307">RFM Analysis depends heavily on accurate data.</text:p>
      <text:h text:style-name="P141" text:outline-level="2">Recency Accuracy</text:h>
      <text:p text:style-name="P280">Correct order dates are required.</text:p>
      <text:h text:style-name="P141" text:outline-level="2"><text:soft-page-break/>Frequency Accuracy</text:h>
      <text:p text:style-name="P280">Duplicate records must be removed.</text:p>
      <text:h text:style-name="P141" text:outline-level="2">Monetary Accuracy</text:h>
      <text:p text:style-name="P280">Sales values must be accurate.</text:p>
      <text:p text:style-name="P280">Clean data ensures correct customer segmentation.</text:p>
      <text:h text:style-name="P60" text:outline-level="1">5.18 Exporting the Cleaned Dataset</text:h>
      <text:p text:style-name="P307">After preprocessing, the cleaned dataset is exported for further analysis.</text:p>
      <text:p text:style-name="P307">The cleaned dataset is used in:</text:p>
      <text:list text:style-name="L151">
        <text:list-item>
          <text:p text:style-name="P343">SQL analysis</text:p>
        </text:list-item>
        <text:list-item>
          <text:p text:style-name="P343">Python analysis</text:p>
        </text:list-item>
        <text:list-item>
          <text:p text:style-name="P343">Power BI dashboards</text:p>
        </text:list-item>
        <text:list-item>
          <text:p text:style-name="P344">Star schema modelling</text:p>
        </text:list-item>
      </text:list>
      <text:h text:style-name="P61" text:outline-level="2">5.18.1 Exporting Using Python</text:h>
      <text:p text:style-name="P307">Example:</text:p>
      <text:p text:style-name="P307">data.to_csv('Cleaned_SuperStore.csv', index=False)</text:p>
      <text:p text:style-name="P307">Purpose:</text:p>
      <text:p text:style-name="P307">Exports cleaned data into CSV format.</text:p>
      <text:h text:style-name="P60" text:outline-level="1">5.19 Advantages of Clean Data</text:h>
      <text:list text:style-name="L152">
        <text:list-item>
          <text:p text:style-name="P345">Better reporting</text:p>
        </text:list-item>
        <text:list-item>
          <text:p text:style-name="P345">Faster analysis</text:p>
        </text:list-item>
        <text:list-item>
          <text:p text:style-name="P345">Accurate segmentation</text:p>
        </text:list-item>
        <text:list-item>
          <text:p text:style-name="P345">Improved dashboard performance</text:p>
        </text:list-item>
        <text:list-item>
          <text:p text:style-name="P345">Reliable business insights</text:p>
        </text:list-item>
        <text:list-item>
          <text:p text:style-name="P345">Better customer analysis</text:p>
        </text:list-item>
        <text:list-item>
          <text:p text:style-name="P346">Improved decision making</text:p>
        </text:list-item>
      </text:list>
      <text:h text:style-name="P60" text:outline-level="1">5.20 Conclusion</text:h>
      <text:p text:style-name="P11">This chapter explained the data cleaning and preprocessing techniques used in the Customer Segmentation using RFM Analysis project.</text:p>
      <text:p text:style-name="P11">The chapter discussed handling missing values, removing duplicates, correcting data types, formatting dates, standardising values, handling outliers, validating data, and exporting cleaned datasets.</text:p>
      <text:p text:style-name="P11">Data cleaning is a critical stage in the analytics workflow because accurate and reliable data improves the quality of RFM Analysis, SQL queries, Power BI dashboards, and business intelligence reporting.</text:p>
      <text:p text:style-name="P11"><text:soft-page-break/>The next chapter explains data transformation techniques and star schema modeling used to organise the Online Super Store dataset for analytical reporting and dashboard development.</text:p>
      <text:h text:style-name="P9" text:outline-level="1"><text:span text:style-name="Strong_20_Emphasis"><text:span text:style-name="T19">CHAPTER 6</text:span></text:span></text:h>
      <text:h text:style-name="P14" text:outline-level="1">DATA TRANSFORMATION AND STAR SCHEMA MODELING</text:h>
      <text:h text:style-name="P15" text:outline-level="2">6.1 Introduction</text:h>
      <text:p text:style-name="P280">Data transformation is an important stage in the data analytics process where cleaned raw data is converted into a structured format suitable for analysis, reporting, and visualization. Raw datasets collected from business systems are usually not optimized for analytical operations. Therefore, transformation techniques are required to improve data organization and analytical efficiency.</text:p>
      <text:p text:style-name="P280">In this project, the Online Super Store dataset is transformed into a structured analytical model using star schema design. The transformed data supports SQL querying, Python analysis, Power BI dashboards, and RFM based customer segmentation.</text:p>
      <text:p text:style-name="P280">Data transformation includes:</text:p>
      <text:list text:style-name="L153">
        <text:list-item>
          <text:p text:style-name="P347">Data aggregation</text:p>
        </text:list-item>
        <text:list-item>
          <text:p text:style-name="P347">Data normalization</text:p>
        </text:list-item>
        <text:list-item>
          <text:p text:style-name="P347">Creating calculated columns</text:p>
        </text:list-item>
        <text:list-item>
          <text:p text:style-name="P347">Creating dimension tables</text:p>
        </text:list-item>
        <text:list-item>
          <text:p text:style-name="P347">Creating fact tables</text:p>
        </text:list-item>
        <text:list-item>
          <text:p text:style-name="P347">Building relationships</text:p>
        </text:list-item>
        <text:list-item>
          <text:p text:style-name="P348">Preparing analytical datasets</text:p>
        </text:list-item>
      </text:list>
      <text:p text:style-name="P280">This chapter explains the complete transformation process and star schema modeling used in the project.</text:p>
      <text:h text:style-name="P60" text:outline-level="1">6.2 Importance of Data Transformation</text:h>
      <text:p text:style-name="P280">Data transformation improves the quality, structure, and usability of datasets.</text:p>
      <text:p text:style-name="P307"><text:span text:style-name="T16">The importance of d</text:span>ata transformation includes:</text:p>
      <text:list text:style-name="L154">
        <text:list-item>
          <text:p text:style-name="P349">Improved analytical performance</text:p>
        </text:list-item>
        <text:list-item>
          <text:p text:style-name="P349">Better dashboard efficiency</text:p>
        </text:list-item>
        <text:list-item>
          <text:p text:style-name="P349">Faster SQL queries</text:p>
        </text:list-item>
        <text:list-item>
          <text:p text:style-name="P349">Simplified reporting</text:p>
        </text:list-item>
        <text:list-item>
          <text:p text:style-name="P349">Better data organization</text:p>
        </text:list-item>
        <text:list-item>
          <text:p text:style-name="P349">Improved business intelligence</text:p>
        </text:list-item>
        <text:list-item>
          <text:p text:style-name="P349">Enhanced data consistency</text:p>
        </text:list-item>
        <text:list-item>
          <text:p text:style-name="P350">Reduced redundancy</text:p>
        </text:list-item>
      </text:list>
      <text:p text:style-name="P280">Transformation converts transactional data into an analytics friendly structure.</text:p>
      <text:h text:style-name="P60" text:outline-level="1">6.3 Objectives of Data Transformation</text:h>
      <text:p text:style-name="P280">The main objectives of transformation in this project include:</text:p>
      <text:list text:style-name="L155">
        <text:list-item>
          <text:p text:style-name="P351">Structuring the dataset for analytics</text:p>
        </text:list-item>
        <text:list-item>
          <text:p text:style-name="P351"><text:soft-page-break/>Improving query performance</text:p>
        </text:list-item>
        <text:list-item>
          <text:p text:style-name="P351">Supporting Power BI dashboards</text:p>
        </text:list-item>
        <text:list-item>
          <text:p text:style-name="P351">Creating star schema models</text:p>
        </text:list-item>
        <text:list-item>
          <text:p text:style-name="P351">Simplifying relationships between tables</text:p>
        </text:list-item>
        <text:list-item>
          <text:p text:style-name="P351">Supporting RFM Analysis</text:p>
        </text:list-item>
        <text:list-item>
          <text:p text:style-name="P352">Creating reusable analytical datasets</text:p>
        </text:list-item>
      </text:list>
      <text:h text:style-name="P60" text:outline-level="1">6.4 ETL Process</text:h>
      <text:p text:style-name="P280">ETL stands for:</text:p>
      <text:list text:style-name="L156">
        <text:list-item>
          <text:p text:style-name="P353">Extract</text:p>
        </text:list-item>
        <text:list-item>
          <text:p text:style-name="P353">Transform</text:p>
        </text:list-item>
        <text:list-item>
          <text:p text:style-name="P354">Load</text:p>
        </text:list-item>
      </text:list>
      <text:p text:style-name="P280">ETL is widely used in data warehousing and business intelligence systems.</text:p>
      <text:h text:style-name="P61" text:outline-level="2">6.4.1 Extract Process</text:h>
      <text:p text:style-name="P280">The extract stage collects data from the Online Super Store dataset.</text:p>
      <text:p text:style-name="P280">Data is extracted from:</text:p>
      <text:list text:style-name="L157">
        <text:list-item>
          <text:p text:style-name="P355">Excel files</text:p>
        </text:list-item>
        <text:list-item>
          <text:p text:style-name="P355">CSV files</text:p>
        </text:list-item>
        <text:list-item>
          <text:p text:style-name="P356">Database tables</text:p>
        </text:list-item>
      </text:list>
      <text:p text:style-name="P307"><text:span text:style-name="T16">The extracted data contains raw transaction record</text:span>s.</text:p>
      <text:h text:style-name="P61" text:outline-level="2">6.4.2 Transform Process</text:h>
      <text:p text:style-name="P280">The transform stage converts raw data into structured analytical data.</text:p>
      <text:p text:style-name="P280">Transformation activities include:</text:p>
      <text:list text:style-name="L158">
        <text:list-item>
          <text:p text:style-name="P357">Cleaning data</text:p>
        </text:list-item>
        <text:list-item>
          <text:p text:style-name="P357">Formatting columns</text:p>
        </text:list-item>
        <text:list-item>
          <text:p text:style-name="P357">Aggregating records</text:p>
        </text:list-item>
        <text:list-item>
          <text:p text:style-name="P357">Creating calculated fields</text:p>
        </text:list-item>
        <text:list-item>
          <text:p text:style-name="P357">Removing redundancy</text:p>
        </text:list-item>
        <text:list-item>
          <text:p text:style-name="P358">Creating dimension tables</text:p>
        </text:list-item>
      </text:list>
      <text:h text:style-name="P61" text:outline-level="2">6.4.3 Load Process</text:h>
      <text:p text:style-name="P280">The load stage stores transformed data into:</text:p>
      <text:list text:style-name="L159">
        <text:list-item>
          <text:p text:style-name="P359">SQL database</text:p>
        </text:list-item>
        <text:list-item>
          <text:p text:style-name="P359">Power BI model</text:p>
        </text:list-item>
        <text:list-item>
          <text:p text:style-name="P360">Analytical datasets</text:p>
        </text:list-item>
      </text:list>
      <text:p text:style-name="P280">The transformed data is ready for analysis and dashboard development.</text:p>
      <text:h text:style-name="P60" text:outline-level="1">6.5 Data Transformation Workflow</text:h>
      <text:p text:style-name="P280">The project transformation workflow includes:</text:p>
      <text:h text:style-name="P141" text:outline-level="2"><text:soft-page-break/>Step 1</text:h>
      <text:p text:style-name="P280">Importing cleaned datasets.</text:p>
      <text:h text:style-name="P141" text:outline-level="2">Step 2</text:h>
      <text:p text:style-name="P280">Creating calculated columns.</text:p>
      <text:h text:style-name="P141" text:outline-level="2">Step 3</text:h>
      <text:p text:style-name="P280">Splitting data into dimensions.</text:p>
      <text:h text:style-name="P141" text:outline-level="2">Step 4</text:h>
      <text:p text:style-name="P280">Creating fact tables.</text:p>
      <text:h text:style-name="P141" text:outline-level="2">Step 5</text:h>
      <text:p text:style-name="P280">Creating date tables.</text:p>
      <text:h text:style-name="P141" text:outline-level="2">Step 6</text:h>
      <text:p text:style-name="P280">Building relationships.</text:p>
      <text:h text:style-name="P141" text:outline-level="2">Step 7</text:h>
      <text:p text:style-name="P280">Validating transformed data.</text:p>
      <text:h text:style-name="P141" text:outline-level="2">Step 8</text:h>
      <text:p text:style-name="P280">Loading transformed data into Power BI.</text:p>
      <text:h text:style-name="P60" text:outline-level="1">6.6 Creating Calculated Columns</text:h>
      <text:p text:style-name="P280">Calculated columns are generated to improve analytical capabilities.</text:p>
      <text:p text:style-name="P280">Examples include:</text:p>
      <text:list text:style-name="L160">
        <text:list-item>
          <text:p text:style-name="P361">Year</text:p>
        </text:list-item>
        <text:list-item>
          <text:p text:style-name="P361">Month</text:p>
        </text:list-item>
        <text:list-item>
          <text:p text:style-name="P361">Quarter</text:p>
        </text:list-item>
        <text:list-item>
          <text:p text:style-name="P361">Sales Category</text:p>
        </text:list-item>
        <text:list-item>
          <text:p text:style-name="P361">Profit Margin</text:p>
        </text:list-item>
        <text:list-item>
          <text:p text:style-name="P362">Customer Type</text:p>
        </text:list-item>
      </text:list>
      <text:h text:style-name="P61" text:outline-level="2">6.6.1 Creating Year Column</text:h>
      <text:p text:style-name="P11">Python Example:</text:p>
      <text:p text:style-name="P11">Data['Year'] = Data['Order Date'].dt.year</text:p>
      <text:p text:style-name="P11">Purpose:</text:p>
      <text:list text:style-name="L161">
        <text:list-item>
          <text:p text:style-name="P363">Year wise analysis</text:p>
        </text:list-item>
        <text:list-item>
          <text:p text:style-name="P363">Trend reporting</text:p>
        </text:list-item>
        <text:list-item>
          <text:p text:style-name="P364">Dashboard filtering</text:p>
        </text:list-item>
      </text:list>
      <text:h text:style-name="P61" text:outline-level="2">6.6.2 Creating Month Column</text:h>
      <text:p text:style-name="P280">Python Example:</text:p>
      <text:p text:style-name="P280"><text:soft-page-break/>Data['Month'] = Data['Order Date'].dt.month_name()</text:p>
      <text:p text:style-name="P280">Purpose:</text:p>
      <text:list text:style-name="L162">
        <text:list-item>
          <text:p text:style-name="P365">Monthly analysis</text:p>
        </text:list-item>
        <text:list-item>
          <text:p text:style-name="P365">Seasonal trends</text:p>
        </text:list-item>
        <text:list-item>
          <text:p text:style-name="P366">Dashboard visualization</text:p>
        </text:list-item>
      </text:list>
      <text:h text:style-name="P141" text:outline-level="2">6.6.3 Creating Profit Margin Column</text:h>
      <text:p text:style-name="P280">Formula:</text:p>
      <text:p text:style-name="P280">genui{"math_block_widget_always_prefetch_v2":{"content":"Profit\ Margin = </text:p>
      <text:p text:style-name="P367">r<text:span text:style-name="T16">ac{Profit}{Sales} imes 100"}}</text:span></text:p>
      <text:p text:style-name="P280">Purpose:</text:p>
      <text:list text:style-name="L163">
        <text:list-item>
          <text:p text:style-name="P368">Profitability analysis</text:p>
        </text:list-item>
        <text:list-item>
          <text:p text:style-name="P368">Product performance analysis</text:p>
        </text:list-item>
        <text:list-item>
          <text:p text:style-name="P369">KPI reporting</text:p>
        </text:list-item>
      </text:list>
      <text:h text:style-name="P60" text:outline-level="1">6.7 Data Aggregation</text:h>
      <text:p text:style-name="P280">Data aggregation combines multiple records into summarized analytical information.</text:p>
      <text:p text:style-name="P280">Aggregation helps:</text:p>
      <text:list text:style-name="L164">
        <text:list-item>
          <text:p text:style-name="P370">Improve reporting speed</text:p>
        </text:list-item>
        <text:list-item>
          <text:p text:style-name="P370">Simplify dashboards</text:p>
        </text:list-item>
        <text:list-item>
          <text:p text:style-name="P370">Reduce processing complexity</text:p>
        </text:list-item>
        <text:list-item>
          <text:p text:style-name="P371">Generate business KPIs</text:p>
        </text:list-item>
      </text:list>
      <text:h text:style-name="P61" text:outline-level="2">6.7.1 Sales Aggregation</text:h>
      <text:p text:style-name="P74">SQL Example:</text:p>
      <text:p text:style-name="P280">SELECT Category, SUM(Sales) AS Total_Sales FROM SuperStore GROUP BY Category;</text:p>
      <text:p text:style-name="P280">Purpose:</text:p>
      <text:list text:style-name="L165">
        <text:list-item>
          <text:p text:style-name="P372">Category wise sales analysis</text:p>
        </text:list-item>
        <text:list-item>
          <text:p text:style-name="P373">KPI reporting</text:p>
        </text:list-item>
      </text:list>
      <text:h text:style-name="P61" text:outline-level="2">6.7.2 Customer Aggregation</text:h>
      <text:p text:style-name="P307">SQL Example:</text:p>
      <text:p text:style-name="P307">SELECT Customer_ID, COU<text:span text:style-name="T16">NT(Order_ID) AS Total_Orders, SUM(Sales) AS Total_Sales FROM SuperStore GROUP BY Customer_ID;</text:span></text:p>
      <text:p text:style-name="P280">Purpose:</text:p>
      <text:list text:style-name="L166">
        <text:list-item>
          <text:p text:style-name="P374">Customer segmentation</text:p>
        </text:list-item>
        <text:list-item>
          <text:p text:style-name="P374">Frequency calculation</text:p>
        </text:list-item>
        <text:list-item>
          <text:p text:style-name="P375">Monetary calculation</text:p>
        </text:list-item>
      </text:list>
      <text:h text:style-name="P60" text:outline-level="1">6.8 Data Normalization</text:h>
      <text:p text:style-name="P280">Normalization reduces data redundancy and improves organization.</text:p>
      <text:p text:style-name="P280">Benefits include:</text:p>
      <text:list text:style-name="L167">
        <text:list-item>
          <text:p text:style-name="P376">Reduced duplicate data</text:p>
        </text:list-item>
        <text:list-item>
          <text:p text:style-name="P376">Better consistency</text:p>
        </text:list-item>
        <text:list-item>
          <text:p text:style-name="P376">Improved database management</text:p>
        </text:list-item>
        <text:list-item>
          <text:p text:style-name="P377">Improved storage efficiency</text:p>
        </text:list-item>
      </text:list>
      <text:p text:style-name="P280">Normalization divides the dataset into multiple related tables.</text:p>
      <text:h text:style-name="P60" text:outline-level="1"><text:soft-page-break/>6.9 Introduction to Star Schema</text:h>
      <text:p text:style-name="P307">Star schema is one of the most commonly used data modelling techniques in business intelligence systems.</text:p>
      <text:p text:style-name="P307">A star schema consists of:</text:p>
      <text:list text:style-name="L168">
        <text:list-item>
          <text:p text:style-name="P378">Fact tables</text:p>
        </text:list-item>
        <text:list-item>
          <text:p text:style-name="P379">Dimension tables</text:p>
        </text:list-item>
      </text:list>
      <text:p text:style-name="P307">The schema structure resembles a star because dimension tables are connected to a central fact table.</text:p>
      <text:h text:style-name="P60" text:outline-level="1">6.10 Importance of Star Schema</text:h>
      <text:p text:style-name="P280">Star schema modelling provides several advantages.</text:p>
      <text:list text:style-name="L169">
        <text:list-item>
          <text:p text:style-name="P380">Faster analytical queries</text:p>
        </text:list-item>
        <text:list-item>
          <text:p text:style-name="P380">Simplified reporting</text:p>
        </text:list-item>
        <text:list-item>
          <text:p text:style-name="P380">Better Power BI performance</text:p>
        </text:list-item>
        <text:list-item>
          <text:p text:style-name="P380">Improved dashboard efficiency</text:p>
        </text:list-item>
        <text:list-item>
          <text:p text:style-name="P380">Easy relationship management</text:p>
        </text:list-item>
        <text:list-item>
          <text:p text:style-name="P381">Better business intelligence architecture</text:p>
        </text:list-item>
      </text:list>
      <text:h text:style-name="P60" text:outline-level="1">6.11 Components of Star Schema</text:h>
      <text:p text:style-name="P280">The major components include:</text:p>
      <text:list text:style-name="L170">
        <text:list-item>
          <text:p text:style-name="P382">Fact table</text:p>
        </text:list-item>
        <text:list-item>
          <text:p text:style-name="P382">Dimension tables</text:p>
        </text:list-item>
        <text:list-item>
          <text:p text:style-name="P382">Primary keys</text:p>
        </text:list-item>
        <text:list-item>
          <text:p text:style-name="P382">Foreign keys</text:p>
        </text:list-item>
        <text:list-item>
          <text:p text:style-name="P383">Relationships</text:p>
        </text:list-item>
      </text:list>
      <text:h text:style-name="P60" text:outline-level="1">6.12 Fact Table</text:h>
      <text:p text:style-name="P280">The fact table stores measurable business metrics.</text:p>
      <text:p text:style-name="P280">The project fact table contains:</text:p>
      <text:list text:style-name="L171">
        <text:list-item>
          <text:p text:style-name="P384">Sales</text:p>
        </text:list-item>
        <text:list-item>
          <text:p text:style-name="P384">Profit</text:p>
        </text:list-item>
        <text:list-item>
          <text:p text:style-name="P384">Quantity</text:p>
        </text:list-item>
        <text:list-item>
          <text:p text:style-name="P384">Discount</text:p>
        </text:list-item>
        <text:list-item>
          <text:p text:style-name="P385">Order information</text:p>
        </text:list-item>
      </text:list>
      <text:p text:style-name="P280">The fact table acts as the central table in the schema.</text:p>
      <text:h text:style-name="P61" text:outline-level="2">6.12.1 Fact Sales Table Structure</text:h>
      <text:p text:style-name="P280">Example Columns:</text:p>
      <text:list text:style-name="L172">
        <text:list-item>
          <text:p text:style-name="P386">Order_ID</text:p>
        </text:list-item>
        <text:list-item>
          <text:p text:style-name="P386">Customer_ID</text:p>
        </text:list-item>
        <text:list-item>
          <text:p text:style-name="P386"><text:soft-page-break/>Product_ID</text:p>
        </text:list-item>
        <text:list-item>
          <text:p text:style-name="P386">Ship_ID</text:p>
        </text:list-item>
        <text:list-item>
          <text:p text:style-name="P386">Date_ID</text:p>
        </text:list-item>
        <text:list-item>
          <text:p text:style-name="P386">Sales</text:p>
        </text:list-item>
        <text:list-item>
          <text:p text:style-name="P386">Profit</text:p>
        </text:list-item>
        <text:list-item>
          <text:p text:style-name="P386">Quantity</text:p>
        </text:list-item>
        <text:list-item>
          <text:p text:style-name="P387">Discount</text:p>
        </text:list-item>
      </text:list>
      <text:p text:style-name="P280">Purpose:</text:p>
      <text:list text:style-name="L173">
        <text:list-item>
          <text:p text:style-name="P388">KPI calculations</text:p>
        </text:list-item>
        <text:list-item>
          <text:p text:style-name="P388">Dashboard reporting</text:p>
        </text:list-item>
        <text:list-item>
          <text:p text:style-name="P389">Sales analysis</text:p>
        </text:list-item>
      </text:list>
      <text:h text:style-name="P60" text:outline-level="1">6.13 Dimension Tables</text:h>
      <text:p text:style-name="P280">Dimension tables store descriptive attributes.</text:p>
      <text:p text:style-name="P280">Dimension tables used in the project include:</text:p>
      <text:list text:style-name="L174">
        <text:list-item>
          <text:p text:style-name="P390">Customer Dimension</text:p>
        </text:list-item>
        <text:list-item>
          <text:p text:style-name="P390">Product Dimension</text:p>
        </text:list-item>
        <text:list-item>
          <text:p text:style-name="P390">Date Dimension</text:p>
        </text:list-item>
        <text:list-item>
          <text:p text:style-name="P390">Shipping Dimension</text:p>
        </text:list-item>
        <text:list-item>
          <text:p text:style-name="P391">Region Dimension</text:p>
        </text:list-item>
      </text:list>
      <text:h text:style-name="P15" text:outline-level="2">6.13.1 Customer Dimension Table</text:h>
      <text:p text:style-name="P307">The customer dimension contains:</text:p>
      <text:list text:style-name="L175">
        <text:list-item>
          <text:p text:style-name="P392">Customer_ID</text:p>
        </text:list-item>
        <text:list-item>
          <text:p text:style-name="P392">Customer_Name</text:p>
        </text:list-item>
        <text:list-item>
          <text:p text:style-name="P392">Segment</text:p>
        </text:list-item>
        <text:list-item>
          <text:p text:style-name="P392">Region</text:p>
        </text:list-item>
        <text:list-item>
          <text:p text:style-name="P392">State</text:p>
        </text:list-item>
        <text:list-item>
          <text:p text:style-name="P393">City</text:p>
        </text:list-item>
      </text:list>
      <text:p text:style-name="P307">Purpose:</text:p>
      <text:list text:style-name="L176">
        <text:list-item>
          <text:p text:style-name="P394">Customer analysis</text:p>
        </text:list-item>
        <text:list-item>
          <text:p text:style-name="P394">Segmentation</text:p>
        </text:list-item>
        <text:list-item>
          <text:p text:style-name="P395">Geographic reporting</text:p>
        </text:list-item>
      </text:list>
      <text:h text:style-name="P61" text:outline-level="2">6.13.2 Product Dimension Table</text:h>
      <text:p text:style-name="P280">The product dimension contains:</text:p>
      <text:list text:style-name="L177">
        <text:list-item>
          <text:p text:style-name="P396">Product_ID</text:p>
        </text:list-item>
        <text:list-item>
          <text:p text:style-name="P396">Product_Name</text:p>
        </text:list-item>
        <text:list-item>
          <text:p text:style-name="P396">Category</text:p>
        </text:list-item>
        <text:list-item>
          <text:p text:style-name="P397">Sub_Category</text:p>
        </text:list-item>
      </text:list>
      <text:p text:style-name="P280"><text:soft-page-break/>Purpose:</text:p>
      <text:list text:style-name="L178">
        <text:list-item>
          <text:p text:style-name="P398">Product analysis</text:p>
        </text:list-item>
        <text:list-item>
          <text:p text:style-name="P398">Category reporting</text:p>
        </text:list-item>
        <text:list-item>
          <text:p text:style-name="P399">Inventory analysis</text:p>
        </text:list-item>
      </text:list>
      <text:h text:style-name="P61" text:outline-level="2">6.13.3 Date Dimension Table</text:h>
      <text:p text:style-name="P280">The date dimension contains:</text:p>
      <text:list text:style-name="L179">
        <text:list-item>
          <text:p text:style-name="P400">Date_ID</text:p>
        </text:list-item>
        <text:list-item>
          <text:p text:style-name="P400">Order_Date</text:p>
        </text:list-item>
        <text:list-item>
          <text:p text:style-name="P400">Year</text:p>
        </text:list-item>
        <text:list-item>
          <text:p text:style-name="P400">Month</text:p>
        </text:list-item>
        <text:list-item>
          <text:p text:style-name="P400">Quarter</text:p>
        </text:list-item>
        <text:list-item>
          <text:p text:style-name="P401">Weekday</text:p>
        </text:list-item>
      </text:list>
      <text:p text:style-name="P280">Purpose:</text:p>
      <text:list text:style-name="L180">
        <text:list-item>
          <text:p text:style-name="P402">Time based reporting</text:p>
        </text:list-item>
        <text:list-item>
          <text:p text:style-name="P402">Trend analysis</text:p>
        </text:list-item>
        <text:list-item>
          <text:p text:style-name="P403">Dashboard filtering</text:p>
        </text:list-item>
      </text:list>
      <text:h text:style-name="P61" text:outline-level="2">6.13.4 Shipping Dimension Table</text:h>
      <text:p text:style-name="P307">The shipping dimension contains:<text:span text:style-name="T16"/></text:p>
      <text:list text:style-name="L181">
        <text:list-item>
          <text:p text:style-name="P404">Ship_ID</text:p>
        </text:list-item>
        <text:list-item>
          <text:p text:style-name="P404">Ship_Mode</text:p>
        </text:list-item>
        <text:list-item>
          <text:p text:style-name="P405">Ship_Date</text:p>
        </text:list-item>
      </text:list>
      <text:p text:style-name="P280">Purpose:</text:p>
      <text:list text:style-name="L182">
        <text:list-item>
          <text:p text:style-name="P406">Delivery analysis</text:p>
        </text:list-item>
        <text:list-item>
          <text:p text:style-name="P407"><text:span text:style-name="T16">Log</text:span>istics reporting</text:p>
        </text:list-item>
      </text:list>
      <text:h text:style-name="P61" text:outline-level="2">6.13.5 Region Dimension Table</text:h>
      <text:p text:style-name="P280">The region dimension contains:</text:p>
      <text:list text:style-name="L183">
        <text:list-item>
          <text:p text:style-name="P408">Region_ID</text:p>
        </text:list-item>
        <text:list-item>
          <text:p text:style-name="P408">Country</text:p>
        </text:list-item>
        <text:list-item>
          <text:p text:style-name="P409">State</text:p>
        </text:list-item>
        <text:list-item>
          <text:p text:style-name="P409">City</text:p>
        </text:list-item>
        <text:list-item>
          <text:p text:style-name="P410">Postal_Code</text:p>
        </text:list-item>
      </text:list>
      <text:p text:style-name="P280">Purpose:</text:p>
      <text:list text:style-name="L184">
        <text:list-item>
          <text:p text:style-name="P411">Geographic analysis</text:p>
        </text:list-item>
        <text:list-item>
          <text:p text:style-name="P412">Regional reporting</text:p>
        </text:list-item>
      </text:list>
      <text:h text:style-name="P60" text:outline-level="1">6.14 Relationship Building</text:h>
      <text:p text:style-name="P280">Relationships connect fact tables and dimension tables.</text:p>
      <text:p text:style-name="P280"><text:soft-page-break/>The project uses:</text:p>
      <text:list text:style-name="L185">
        <text:list-item>
          <text:p text:style-name="P413">One to many relationships</text:p>
        </text:list-item>
        <text:list-item>
          <text:p text:style-name="P413">Primary key relationships</text:p>
        </text:list-item>
        <text:list-item>
          <text:p text:style-name="P414">Foreign key relationships</text:p>
        </text:list-item>
      </text:list>
      <text:p text:style-name="P280">Example:</text:p>
      <text:p text:style-name="P307"><text:span text:style-name="T16">Customer_ID in Customer Dimension connects</text:span> to Customer_ID in Fact Table.</text:p>
      <text:h text:style-name="P60" text:outline-level="1">6.15 Cardinality in Power BI</text:h>
      <text:p text:style-name="P280">Cardinality defines the relationship type between tables.</text:p>
      <text:p text:style-name="P280">Types include:</text:p>
      <text:list text:style-name="L186">
        <text:list-item>
          <text:p text:style-name="P415">One to one</text:p>
        </text:list-item>
        <text:list-item>
          <text:p text:style-name="P416">One to many</text:p>
        </text:list-item>
        <text:list-item>
          <text:p text:style-name="P416">Many to one</text:p>
        </text:list-item>
        <text:list-item>
          <text:p text:style-name="P417">Many to many</text:p>
        </text:list-item>
      </text:list>
      <text:p text:style-name="P307">The project mainly uses one to many relationships.</text:p>
      <text:h text:style-name="P60" text:outline-level="1">6.16 Star Schema Diagram Explanation</text:h>
      <text:p text:style-name="P280">The star schema contains one central fact table connected to multiple dimensions.</text:p>
      <text:p text:style-name="P280">Structure:</text:p>
      <text:p text:style-name="P280">Fact_Sales</text:p>
      <text:p text:style-name="P280">Connected Dimensions:</text:p>
      <text:list text:style-name="L187">
        <text:list-item>
          <text:p text:style-name="P418">Dim_Customer</text:p>
        </text:list-item>
        <text:list-item>
          <text:p text:style-name="P418">Dim_Product</text:p>
        </text:list-item>
        <text:list-item>
          <text:p text:style-name="P418">Dim_Date</text:p>
        </text:list-item>
        <text:list-item>
          <text:p text:style-name="P418">Dim_Shipping</text:p>
        </text:list-item>
        <text:list-item>
          <text:p text:style-name="P419">Dim_Region</text:p>
        </text:list-item>
      </text:list>
      <text:p text:style-name="P280">This structure improves analytical performance.</text:p>
      <text:h text:style-name="P60" text:outline-level="1">6.17 SQL Table Creation for Star Schema</text:h>
      <text:p text:style-name="P74">Example SQL Query:</text:p>
      <text:p text:style-name="P280">CREATE TABLE Dim_Customer ( Customer_ID VARCHAR(50) PRIMARY KEY, Customer_Name VARCHAR(100), Segment VARCHAR(50) );</text:p>
      <text:p text:style-name="P280">Purpose:</text:p>
      <text:p text:style-name="P280">Creates customer dimension table.</text:p>
      <text:h text:style-name="P61" text:outline-level="2">6.17.1 Fact Table Creation</text:h>
      <text:p text:style-name="P74">Example:</text:p>
      <text:p text:style-name="P280"><text:soft-page-break/>CREATE TABLE Fact_Sales ( Order_ID VARCHAR(50), Customer_ID VARCHAR(50), Product_ID VARCHAR(50), Sales FLOAT, Profit FLOAT, Quantity INT );</text:p>
      <text:p text:style-name="P280">Purpose:</text:p>
      <text:p text:style-name="P280">Stores transaction metrics.</text:p>
      <text:h text:style-name="P60" text:outline-level="1">6.18 Benefits of Star Schema in Power BI</text:h>
      <text:p text:style-name="P280">The star schema improves Power BI dashboards.</text:p>
      <text:p text:style-name="P280">Benefits include:</text:p>
      <text:list text:style-name="L188">
        <text:list-item>
          <text:p text:style-name="P420">Faster dashboard loading</text:p>
        </text:list-item>
        <text:list-item>
          <text:p text:style-name="P420">Better DAX calculations</text:p>
        </text:list-item>
        <text:list-item>
          <text:p text:style-name="P420">Improved relationships</text:p>
        </text:list-item>
        <text:list-item>
          <text:p text:style-name="P420">Better slicer performance</text:p>
        </text:list-item>
        <text:list-item>
          <text:p text:style-name="P421">Simplified visualization development</text:p>
        </text:list-item>
      </text:list>
      <text:h text:style-name="P60" text:outline-level="1">6.19 Role of Transformation in RFM Analysis</text:h>
      <text:p text:style-name="P280">Transformation is essential for accurate RFM calculations.</text:p>
      <text:h text:style-name="P141" text:outline-level="2">Recency Transformation</text:h>
      <text:p text:style-name="P280">Order dates are transformed into date format.</text:p>
      <text:h text:style-name="P141" text:outline-level="2">Frequency Transformation</text:h>
      <text:p text:style-name="P280">Order counts are aggregated customer wise.</text:p>
      <text:h text:style-name="P141" text:outline-level="2">Monetary Transformation</text:h>
      <text:p text:style-name="P280">Sales values are aggregated customer wise.</text:p>
      <text:p text:style-name="P280">Transformation ensures accurate segmentation.</text:p>
      <text:h text:style-name="P60" text:outline-level="1">6.20 Creating Customer Analytical Tables</text:h>
      <text:p text:style-name="P280">Customer analytical tables contain summarized customer metrics.</text:p>
      <text:p text:style-name="P280">Example Metrics:</text:p>
      <text:list text:style-name="L189">
        <text:list-item>
          <text:p text:style-name="P422">Total Orders</text:p>
        </text:list-item>
        <text:list-item>
          <text:p text:style-name="P422">Total Sales</text:p>
        </text:list-item>
        <text:list-item>
          <text:p text:style-name="P422">Total Profit</text:p>
        </text:list-item>
        <text:list-item>
          <text:p text:style-name="P422">Last Purchase Date</text:p>
        </text:list-item>
        <text:list-item>
          <text:p text:style-name="P423">Average Order Value</text:p>
        </text:list-item>
      </text:list>
      <text:p text:style-name="P280">These tables support RFM Analysis.</text:p>
      <text:h text:style-name="P61" text:outline-level="2">6.20.1 SQL Query for Customer Summary</text:h>
      <text:p text:style-name="P280">SELECT Customer_ID, COUNT(Order_ID) AS Frequency, SUM(Sales) AS Monetary, MAX(Order_Date) AS Last_Order_Date FROM SuperStore GROUP BY Customer_ID;</text:p>
      <text:p text:style-name="P280">Purpose:</text:p>
      <text:p text:style-name="P280"><text:soft-page-break/>Creates customer analytical summary.</text:p>
      <text:h text:style-name="P60" text:outline-level="1">6.21 Data Validation After Transformation</text:h>
      <text:p text:style-name="P280">Validation ensures transformed data accuracy.</text:p>
      <text:p text:style-name="P280">Validation checks include:</text:p>
      <text:list text:style-name="L190">
        <text:list-item>
          <text:p text:style-name="P424">Relationship verification</text:p>
        </text:list-item>
        <text:list-item>
          <text:p text:style-name="P424">Total sales validation</text:p>
        </text:list-item>
        <text:list-item>
          <text:p text:style-name="P424">Customer count validation</text:p>
        </text:list-item>
        <text:list-item>
          <text:p text:style-name="P424">Duplicate verification</text:p>
        </text:list-item>
        <text:list-item>
          <text:p text:style-name="P425">Null value verification</text:p>
        </text:list-item>
      </text:list>
      <text:p text:style-name="P280">Validation improves reporting reliability.</text:p>
      <text:h text:style-name="P60" text:outline-level="1">6.22 Advantages of Data Transformation</text:h>
      <text:list text:style-name="L191">
        <text:list-item>
          <text:p text:style-name="P426">Improved query performance</text:p>
        </text:list-item>
        <text:list-item>
          <text:p text:style-name="P426">Better dashboard speed</text:p>
        </text:list-item>
        <text:list-item>
          <text:p text:style-name="P426">Simplified data organization</text:p>
        </text:list-item>
        <text:list-item>
          <text:p text:style-name="P426">Better reporting accuracy</text:p>
        </text:list-item>
        <text:list-item>
          <text:p text:style-name="P426">Reduced redundancy</text:p>
        </text:list-item>
        <text:list-item>
          <text:p text:style-name="P426">Improved analytical efficiency</text:p>
        </text:list-item>
        <text:list-item>
          <text:p text:style-name="P427">Better scalability</text:p>
        </text:list-item>
      </text:list>
      <text:h text:style-name="P60" text:outline-level="1">6.23 Challenges in Transformation</text:h>
      <text:p text:style-name="P280">Several challenges occur during transformation.</text:p>
      <text:h text:style-name="P141" text:outline-level="2">Complex Relationships</text:h>
      <text:p text:style-name="P280">Large datasets may contain complicated relationships.</text:p>
      <text:h text:style-name="P141" text:outline-level="2">Duplicate Keys</text:h>
      <text:p text:style-name="P280">Duplicate IDs create relationship issues.</text:p>
      <text:h text:style-name="P141" text:outline-level="2">Incorrect Aggregations</text:h>
      <text:p text:style-name="P280">Improper grouping affects KPIs.</text:p>
      <text:h text:style-name="P141" text:outline-level="2">Data Redundancy</text:h>
      <text:p text:style-name="P280">Repeated information increases storage usage.</text:p>
      <text:p text:style-name="P280">These challenges are resolved through proper modelling.</text:p>
      <text:h text:style-name="P60" text:outline-level="1">6.24 Importance of Star Schema in Business Intelligence</text:h>
      <text:p text:style-name="P280">Star schema is widely used in business intelligence systems.</text:p>
      <text:p text:style-name="P280">It supports:</text:p>
      <text:list text:style-name="L192">
        <text:list-item>
          <text:p text:style-name="P428">Dashboard development</text:p>
        </text:list-item>
        <text:list-item>
          <text:p text:style-name="P428">Data warehousing</text:p>
        </text:list-item>
        <text:list-item>
          <text:p text:style-name="P428">KPI reporting</text:p>
        </text:list-item>
        <text:list-item>
          <text:p text:style-name="P428"><text:soft-page-break/>Data analytics</text:p>
        </text:list-item>
        <text:list-item>
          <text:p text:style-name="P428">Executive reporting</text:p>
        </text:list-item>
        <text:list-item>
          <text:p text:style-name="P429">Interactive visualization</text:p>
        </text:list-item>
      </text:list>
      <text:p text:style-name="P280">Most modern BI systems use star schema architecture.</text:p>
      <text:h text:style-name="P60" text:outline-level="1">6.25 Conclusion</text:h>
      <text:p text:style-name="P280">This chapter explained the data transformation and star schema modelling techniques used in the Customer Segmentation using RFM Analysis project.</text:p>
      <text:p text:style-name="P280">The chapter discussed ETL processes, calculated columns, aggregation techniques, normalisation, fact tables, dimension tables, relationship building, and Power BI modelling.</text:p>
      <text:p text:style-name="P280">The star schema model improves analytical performance, dashboard efficiency, and reporting quality. The transformed dataset becomes suitable for SQL analysis, Python analytics, Power BI visualization, and RFM based customer segmentation.</text:p>
      <text:p text:style-name="P280">The next chapter explains the RFM Analysis process in detail, including Recency, Frequency, Monetary calculations, customer scoring methods, and customer segmentation logic.</text:p>
      <text:h text:style-name="P9" text:outline-level="1"><text:span text:style-name="Strong_20_Emphasis"><text:span text:style-name="T8">CHAPTER 7</text:span></text:span></text:h>
      <text:h text:style-name="P60" text:outline-level="1">RFM ANALYSIS AND CUSTOMER SEGMENTATION</text:h>
      <text:h text:style-name="P61" text:outline-level="2">7.1 Introduction</text:h>
      <text:p text:style-name="P280">Customer segmentation is one of the most important analytical techniques used in modern business organisations. Companies use customer segmentation to understand purchasing behaviour, improve customer retention, increase revenue, and design effective marketing strategies.</text:p>
      <text:p text:style-name="P280">RFM Analysis is a popular customer segmentation method used in business analytics and customer relationship management. RFM stands for:</text:p>
      <text:list text:style-name="L193">
        <text:list-item>
          <text:p text:style-name="P430">Recency</text:p>
        </text:list-item>
        <text:list-item>
          <text:p text:style-name="P430">Frequency</text:p>
        </text:list-item>
        <text:list-item>
          <text:p text:style-name="P431">Monetary Value</text:p>
        </text:list-item>
      </text:list>
      <text:p text:style-name="P280">The RFM model analyses customer transaction history and classifies customers into different groups based on purchasing behaviour.</text:p>
      <text:p text:style-name="P280">In this project, RFM Analysis is performed on the Online Super Store dataset to identify valuable customers, loyal customers, inactive customers, and potential customers.</text:p>
      <text:p text:style-name="P280">The RFM model helps businesses answer important questions such as:</text:p>
      <text:list text:style-name="L194">
        <text:list-item>
          <text:p text:style-name="P432">Which customers purchased recently?</text:p>
        </text:list-item>
        <text:list-item>
          <text:p text:style-name="P432">Which customers purchase frequently?</text:p>
        </text:list-item>
        <text:list-item>
          <text:p text:style-name="P432">Which customers spend more money?</text:p>
        </text:list-item>
        <text:list-item>
          <text:p text:style-name="P432">Which customers are inactive?</text:p>
        </text:list-item>
        <text:list-item>
          <text:p text:style-name="P433">Which customers are most valuable?</text:p>
        </text:list-item>
      </text:list>
      <text:p text:style-name="P280">This chapter explains the complete RFM Analysis process, including calculations, scoring methods, segmentation logic, and business insights.</text:p>
      <text:h text:style-name="P60" text:outline-level="1"><text:soft-page-break/>7.2 Importance of Customer Segmentation</text:h>
      <text:p text:style-name="P280">Customer segmentation helps businesses divide customers into groups based on similar characteristics.</text:p>
      <text:p text:style-name="P280">The importance of customer segmentation includes:</text:p>
      <text:list text:style-name="L195">
        <text:list-item>
          <text:p text:style-name="P434">Improved customer retention</text:p>
        </text:list-item>
        <text:list-item>
          <text:p text:style-name="P434">Better marketing strategies</text:p>
        </text:list-item>
        <text:list-item>
          <text:p text:style-name="P434">Increased customer satisfaction</text:p>
        </text:list-item>
        <text:list-item>
          <text:p text:style-name="P434">Higher sales revenue</text:p>
        </text:list-item>
        <text:list-item>
          <text:p text:style-name="P434">Personalised customer communication</text:p>
        </text:list-item>
        <text:list-item>
          <text:p text:style-name="P434">Better customer understanding</text:p>
        </text:list-item>
        <text:list-item>
          <text:p text:style-name="P434">Improved business decision making</text:p>
        </text:list-item>
        <text:list-item>
          <text:p text:style-name="P435">Efficient resource allocation</text:p>
        </text:list-item>
      </text:list>
      <text:p text:style-name="P280">Customer segmentation allows organisation to focus on profitable customers and improve customer relationships.</text:p>
      <text:h text:style-name="P60" text:outline-level="1">7.3 Introduction to RFM Analysis</text:h>
      <text:p text:style-name="P280">RFM Analysis is a behavioural segmentation technique based on customer transaction history.</text:p>
      <text:p text:style-name="P280">The model uses three important customer metrics:</text:p>
      <text:list text:style-name="L196">
        <text:list-item>
          <text:p text:style-name="P436">Recency</text:p>
        </text:list-item>
        <text:list-item>
          <text:p text:style-name="P436">Frequency</text:p>
        </text:list-item>
        <text:list-item>
          <text:p text:style-name="P437">Monetary Value</text:p>
        </text:list-item>
      </text:list>
      <text:p text:style-name="P280">The assumption behind RFM Analysis is:</text:p>
      <text:p text:style-name="P280">Customers who purchased recently, purchase frequently, and spend more money are more valuable to the business.</text:p>
      <text:h text:style-name="P60" text:outline-level="1">7.4 Components of RFM Analysis</text:h>
      <text:p text:style-name="P74">The RFM model contains three analytical components.</text:p>
      <text:h text:style-name="P15" text:outline-level="2">7.4.1 Recency</text:h>
      <text:p text:style-name="P280">Recency measures how recently a customer made a purchase.</text:p>
      <text:p text:style-name="P280">Customers who purchased recently are more likely to purchase again.</text:p>
      <text:p text:style-name="P280">Formula:</text:p>
      <text:p text:style-name="P280">genui{"math_block_widget_always_prefetch_v2":{"content":"Recency = Current\ Date - Last\ Purchase\ Date"}}</text:p>
      <text:p text:style-name="P280">Lower recency values indicate active customers.</text:p>
      <text:h text:style-name="P23" text:outline-level="3">Importance of Recency</text:h>
      <text:list text:style-name="L197">
        <text:list-item>
          <text:p text:style-name="P438">Identifies active customers</text:p>
        </text:list-item>
        <text:list-item>
          <text:p text:style-name="P438">Measures customer engagement</text:p>
        </text:list-item>
        <text:list-item>
          <text:p text:style-name="P438">Supports retention strategies</text:p>
        </text:list-item>
        <text:list-item>
          <text:p text:style-name="P439"><text:soft-page-break/>Helps identify inactive customers</text:p>
        </text:list-item>
      </text:list>
      <text:h text:style-name="P23" text:outline-level="3">Example of Recency</text:h>
      <text:p text:style-name="P280">If the analysis date is January 1, 2026 and the customer last purchased on December 25, 2025:</text:p>
      <text:p text:style-name="P280">genui{"math_block_widget_always_prefetch_v2":{"content":"Recency = 7\ Days"}}</text:p>
      <text:p text:style-name="P280">This customer is considered recently active.</text:p>
      <text:h text:style-name="P61" text:outline-level="2">7.4.2 Frequency</text:h>
      <text:p text:style-name="P280">Frequency measures how often a customer purchases products.</text:p>
      <text:p text:style-name="P280">Formula:</text:p>
      <text:p text:style-name="P280">genui{"math_block_widget_always_prefetch_v2":{"content":"Frequency = Total\ Number\ of\ Orders"}}</text:p>
      <text:p text:style-name="P280">Higher frequency indicates loyal customers.</text:p>
      <text:h text:style-name="P23" text:outline-level="3">Importance of Frequency</text:h>
      <text:list text:style-name="L198">
        <text:list-item>
          <text:p text:style-name="P440">Identifies loyal customers</text:p>
        </text:list-item>
        <text:list-item>
          <text:p text:style-name="P440">Measures purchase consistency</text:p>
        </text:list-item>
        <text:list-item>
          <text:p text:style-name="P440">Supports loyalty programs</text:p>
        </text:list-item>
        <text:list-item>
          <text:p text:style-name="P441">Helps identify repeat buyers</text:p>
        </text:list-item>
      </text:list>
      <text:h text:style-name="P23" text:outline-level="3">Example of Frequency</text:h>
      <text:p text:style-name="P280">If a customer placed 15 orders:</text:p>
      <text:p text:style-name="P280">genui{"math_block_widget_always_prefetch_v2":{"content":"Frequency = 15"}}</text:p>
      <text:p text:style-name="P280">The customer is considered a frequent buyer.</text:p>
      <text:h text:style-name="P61" text:outline-level="2">7.4.3 Monetary Value</text:h>
      <text:p text:style-name="P280">Monetary value measures total customer spending.</text:p>
      <text:p text:style-name="P280">Formula:</text:p>
      <text:p text:style-name="P280">genui{"math_block_widget_always_prefetch_v2":{"content":"Monetary = Total\ Sales\ Amount"}}</text:p>
      <text:p text:style-name="P280">Higher monetary value indicates premium customers.</text:p>
      <text:h text:style-name="P23" text:outline-level="3">Importance of Monetary Value</text:h>
      <text:list text:style-name="L199">
        <text:list-item>
          <text:p text:style-name="P442">Identifies profitable customers</text:p>
        </text:list-item>
        <text:list-item>
          <text:p text:style-name="P442">Measures customer contribution to revenue</text:p>
        </text:list-item>
        <text:list-item>
          <text:p text:style-name="P442">Supports premium customer targeting</text:p>
        </text:list-item>
        <text:list-item>
          <text:p text:style-name="P443">Improves marketing ROI</text:p>
        </text:list-item>
      </text:list>
      <text:h text:style-name="P23" text:outline-level="3">Example of Monetary Value</text:h>
      <text:p text:style-name="P280">If a customer spent ₹50,000:</text:p>
      <text:p text:style-name="P280">genui{"math_block_widget_always_prefetch_v2":{"content":"Monetary = 50000"}}</text:p>
      <text:p text:style-name="P280"><text:soft-page-break/>The customer is considered high value.</text:p>
      <text:h text:style-name="P165" text:outline-level="1">7.5 RFM Calculation Process</text:h>
      <text:p text:style-name="P280">The RFM calculation process involves multiple stages.</text:p>
      <text:h text:style-name="P141" text:outline-level="2">Step 1</text:h>
      <text:p text:style-name="P280">Identify the analysis date.</text:p>
      <text:h text:style-name="P141" text:outline-level="2">Step 2</text:h>
      <text:p text:style-name="P280">Calculate Recency values.</text:p>
      <text:h text:style-name="P141" text:outline-level="2">Step 3</text:h>
      <text:p text:style-name="P280">Calculate Frequency values.</text:p>
      <text:h text:style-name="P141" text:outline-level="2">Step 4</text:h>
      <text:p text:style-name="P280">Calculate Monetary values.</text:p>
      <text:h text:style-name="P141" text:outline-level="2">Step 5</text:h>
      <text:p text:style-name="P280">Assign scores.</text:p>
      <text:h text:style-name="P141" text:outline-level="2">Step 6</text:h>
      <text:p text:style-name="P280">Create customer segments.</text:p>
      <text:h text:style-name="P141" text:outline-level="2">Step 7</text:h>
      <text:p text:style-name="P280">Generate business insights.</text:p>
      <text:h text:style-name="P60" text:outline-level="1">7.6 SQL Implementation for RFM Analysis</text:h>
      <text:p text:style-name="P74">SQL is used to calculate customer metrics.</text:p>
      <text:h text:style-name="P61" text:outline-level="2">7.6.1 SQL Query for RFM Metrics</text:h>
      <text:p text:style-name="P280">SELECT Customer_ID, DATE DIFF(DAY, MAX(Order_Date), '2026 01 01') AS Recency, COUNT(Order_ID) AS Frequency, SUM(Sales) AS Monetary FROM SuperStore GROUP BY Customer_ID;</text:p>
      <text:p text:style-name="P280">Purpose:</text:p>
      <text:list text:style-name="L200">
        <text:list-item>
          <text:p text:style-name="P444">Calculates Recency</text:p>
        </text:list-item>
        <text:list-item>
          <text:p text:style-name="P444">Calculates Frequency</text:p>
        </text:list-item>
        <text:list-item>
          <text:p text:style-name="P444">Calculates Monetary Value</text:p>
        </text:list-item>
        <text:list-item>
          <text:p text:style-name="P445">Creates customer summary table</text:p>
        </text:list-item>
      </text:list>
      <text:h text:style-name="P60" text:outline-level="1">7.7 Python Implementation for RFM Analysis</text:h>
      <text:p text:style-name="P307"><text:span text:style-name="T15">Python is used for advanced RFM calculations and segmentation.</text:span></text:p>
      <text:h text:style-name="P15" text:outline-level="2">7.7.1 Importing Required Libraries</text:h>
      <text:p text:style-name="P307">Example:</text:p>
      <text:p text:style-name="P280"><text:soft-page-break/>import pandas as pd import numpy as np</text:p>
      <text:h text:style-name="P15" text:outline-level="2">7.7.2 Creating RFM Table</text:h>
      <text:p text:style-name="P307">Example:</text:p>
      <text:p text:style-name="P280">rfm = data.groupby('Customer ID').agg({ 'Order Date': lambda x: (analysis_date - x.max()).days, 'Order ID': 'count', 'Sales': 'sum' })</text:p>
      <text:p text:style-name="P280">Purpose:</text:p>
      <text:list text:style-name="L201">
        <text:list-item>
          <text:p text:style-name="P446">Creates customer summary</text:p>
        </text:list-item>
        <text:list-item>
          <text:p text:style-name="P446">Calculates RFM metrics</text:p>
        </text:list-item>
        <text:list-item>
          <text:p text:style-name="P447">Supports segmentation</text:p>
        </text:list-item>
      </text:list>
      <text:h text:style-name="P60" text:outline-level="1">7.8 RFM Scoring Method</text:h>
      <text:p text:style-name="P280">Customers are assigned scores based on Recency, Frequency, and Monetary values.</text:p>
      <text:p text:style-name="P280">Each metric is divided into ranking groups.</text:p>
      <text:p text:style-name="P280">Example:</text:p>
      <text:p text:style-name="P280">1 = Low 5 = High</text:p>
      <text:h text:style-name="P141" text:outline-level="2">7.8.1 Recency Scoring</text:h>
      <text:p text:style-name="P280">Customers with recent purchases receive higher scores.</text:p>
      <text:p text:style-name="P280">Example:</text:p>
      <text:list text:style-name="L202">
        <text:list-item>
          <text:p text:style-name="P448">Recent customers → Score 5</text:p>
        </text:list-item>
        <text:list-item>
          <text:p text:style-name="P449">Old customers → Score 1</text:p>
        </text:list-item>
      </text:list>
      <text:h text:style-name="P15" text:outline-level="2">7.8.2 Frequency Scoring</text:h>
      <text:p text:style-name="P280">Customers with more orders receive higher scores.</text:p>
      <text:p text:style-name="P280">Example:</text:p>
      <text:list text:style-name="L203">
        <text:list-item>
          <text:p text:style-name="P450">Frequent buyers → Score 5</text:p>
        </text:list-item>
        <text:list-item>
          <text:p text:style-name="P451">Occasional buyers → Score 1</text:p>
        </text:list-item>
      </text:list>
      <text:h text:style-name="P61" text:outline-level="2">7.8.3 Monetary Scoring</text:h>
      <text:p text:style-name="P307"><text:span text:style-name="T15">Customers with higher sp</text:span>ending receive higher scores.</text:p>
      <text:p text:style-name="P280">Example:</text:p>
      <text:list text:style-name="L204">
        <text:list-item>
          <text:p text:style-name="P452">High spending customers → Score 5</text:p>
        </text:list-item>
        <text:list-item>
          <text:p text:style-name="P453">Low spending customers → Score 1</text:p>
        </text:list-item>
      </text:list>
      <text:h text:style-name="P60" text:outline-level="1">7.9 Creating RFM Scores</text:h>
      <text:p text:style-name="P280">Final RFM scores are created by combining individual scores.</text:p>
      <text:p text:style-name="P280">Formula:</text:p>
      <text:p text:style-name="P280">genui{"math_block_widget_always_prefetch_v2":{"content":"RFM\ Score = R + F + M"}}</text:p>
      <text:p text:style-name="P280"><text:soft-page-break/>Example:</text:p>
      <text:p text:style-name="P280">Recency Score = 5 Frequency Score = 4 Monetary Score = 5</text:p>
      <text:p text:style-name="P280">Final RFM Score:</text:p>
      <text:p text:style-name="P280">genui{"math_block_widget_always_prefetch_v2":{"content":"RFM\ Score = 5 + 4 + 5 = 14"}}</text:p>
      <text:p text:style-name="P280">Higher scores indicate valuable customers.</text:p>
      <text:h text:style-name="P60" text:outline-level="1">7.10 Customer Segmentation Logic</text:h>
      <text:p text:style-name="P280">Customers are classified into segments based on RFM scores.</text:p>
      <text:h text:style-name="P141" text:outline-level="2">7.10.1 Loyal Customers</text:h>
      <text:p text:style-name="P280">Characteristics:</text:p>
      <text:list text:style-name="L205">
        <text:list-item>
          <text:p text:style-name="P454">High frequency</text:p>
        </text:list-item>
        <text:list-item>
          <text:p text:style-name="P454">Recent purchases</text:p>
        </text:list-item>
        <text:list-item>
          <text:p text:style-name="P455">Moderate to high spending</text:p>
        </text:list-item>
      </text:list>
      <text:p text:style-name="P280">Business Strategy:</text:p>
      <text:list text:style-name="L206">
        <text:list-item>
          <text:p text:style-name="P456">Loyalty rewards</text:p>
        </text:list-item>
        <text:list-item>
          <text:p text:style-name="P456">Exclusive offers</text:p>
        </text:list-item>
        <text:list-item>
          <text:p text:style-name="P457">Membership programs</text:p>
        </text:list-item>
      </text:list>
      <text:h text:style-name="P61" text:outline-level="2">7.10.2 Premium Customers</text:h>
      <text:p text:style-name="P280">Characteristics:</text:p>
      <text:list text:style-name="L207">
        <text:list-item>
          <text:p text:style-name="P458">High spending</text:p>
        </text:list-item>
        <text:list-item>
          <text:p text:style-name="P458">Frequent purchases</text:p>
        </text:list-item>
        <text:list-item>
          <text:p text:style-name="P459">Very active customers</text:p>
        </text:list-item>
      </text:list>
      <text:p text:style-name="P280">Business Strategy:</text:p>
      <text:list text:style-name="L208">
        <text:list-item>
          <text:p text:style-name="P460">Premium services</text:p>
        </text:list-item>
        <text:list-item>
          <text:p text:style-name="P460">VIP offers</text:p>
        </text:list-item>
        <text:list-item>
          <text:p text:style-name="P461">Personalized marketing</text:p>
        </text:list-item>
      </text:list>
      <text:h text:style-name="P61" text:outline-level="2">7.10.3 Potential Customers</text:h>
      <text:p text:style-name="P280">Characteristics:</text:p>
      <text:list text:style-name="L209">
        <text:list-item>
          <text:p text:style-name="P462">Recent customers</text:p>
        </text:list-item>
        <text:list-item>
          <text:p text:style-name="P462">Moderate spending</text:p>
        </text:list-item>
        <text:list-item>
          <text:p text:style-name="P463">Growth potential</text:p>
        </text:list-item>
      </text:list>
      <text:p text:style-name="P280">Business Strategy:</text:p>
      <text:list text:style-name="L210">
        <text:list-item>
          <text:p text:style-name="P464">Promotional campaigns</text:p>
        </text:list-item>
        <text:list-item>
          <text:p text:style-name="P464">Personalized recommendations</text:p>
        </text:list-item>
        <text:list-item>
          <text:p text:style-name="P465">Engagement programs</text:p>
        </text:list-item>
      </text:list>
      <text:h text:style-name="P61" text:outline-level="2"><text:soft-page-break/>7.10.4 At Risk Customers</text:h>
      <text:p text:style-name="P74">Characteristics:</text:p>
      <text:list text:style-name="L211">
        <text:list-item>
          <text:p text:style-name="P466">Previously active</text:p>
        </text:list-item>
        <text:list-item>
          <text:p text:style-name="P466">No recent purchases</text:p>
        </text:list-item>
        <text:list-item>
          <text:p text:style-name="P467">Declining activity</text:p>
        </text:list-item>
      </text:list>
      <text:p text:style-name="P280">Business Strategy:</text:p>
      <text:list text:style-name="L212">
        <text:list-item>
          <text:p text:style-name="P468">Reactivation campaigns</text:p>
        </text:list-item>
        <text:list-item>
          <text:p text:style-name="P468">Discount offers</text:p>
        </text:list-item>
        <text:list-item>
          <text:p text:style-name="P469">Reminder emails</text:p>
        </text:list-item>
      </text:list>
      <text:h text:style-name="P61" text:outline-level="2">7.10.5 Lost Customers</text:h>
      <text:p text:style-name="P74">Characteristics:</text:p>
      <text:list text:style-name="L213">
        <text:list-item>
          <text:p text:style-name="P470">Old inactive customers</text:p>
        </text:list-item>
        <text:list-item>
          <text:p text:style-name="P470">Low recent activity</text:p>
        </text:list-item>
        <text:list-item>
          <text:p text:style-name="P471">Low engagement</text:p>
        </text:list-item>
      </text:list>
      <text:p text:style-name="P280">Business Strategy:</text:p>
      <text:list text:style-name="L214">
        <text:list-item>
          <text:p text:style-name="P472">Win back campaigns</text:p>
        </text:list-item>
        <text:list-item>
          <text:p text:style-name="P472">Special discounts</text:p>
        </text:list-item>
        <text:list-item>
          <text:p text:style-name="P473">Re engagement programs</text:p>
        </text:list-item>
      </text:list>
      <text:h text:style-name="P60" text:outline-level="1">7.11 Business Importance of RFM Segmentation</text:h>
      <text:p text:style-name="P74">RFM segmentation supports business growth and marketing optimisation.</text:p>
      <text:p text:style-name="P74">Benefits include:</text:p>
      <text:list text:style-name="L215">
        <text:list-item>
          <text:p text:style-name="P474">Better customer targeting</text:p>
        </text:list-item>
        <text:list-item>
          <text:p text:style-name="P474">Improved marketing ROI</text:p>
        </text:list-item>
        <text:list-item>
          <text:p text:style-name="P474">Improved customer retention</text:p>
        </text:list-item>
        <text:list-item>
          <text:p text:style-name="P474">Better customer engagement</text:p>
        </text:list-item>
        <text:list-item>
          <text:p text:style-name="P474">Increased profitability</text:p>
        </text:list-item>
        <text:list-item>
          <text:p text:style-name="P475">Personalized communication</text:p>
        </text:list-item>
      </text:list>
      <text:h text:style-name="P60" text:outline-level="1">7.12 RFM Segmentation Example Table</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76">Customer</text:p>
          </table:table-cell>
          <table:table-cell table:style-name="Table1.A1" office:value-type="string">
            <text:p text:style-name="P476">Recency</text:p>
          </table:table-cell>
          <table:table-cell table:style-name="Table1.A1" office:value-type="string">
            <text:p text:style-name="P476">Frequency</text:p>
          </table:table-cell>
          <table:table-cell table:style-name="Table1.A1" office:value-type="string">
            <text:p text:style-name="P476">Monetary</text:p>
          </table:table-cell>
          <table:table-cell table:style-name="Table1.A1" office:value-type="string">
            <text:p text:style-name="P476">Segment</text:p>
          </table:table-cell>
        </table:table-row>
        <table:table-row>
          <table:table-cell table:style-name="Table1.A1" office:value-type="string">
            <text:p text:style-name="P477">C001</text:p>
          </table:table-cell>
          <table:table-cell table:style-name="Table1.A1" office:value-type="string">
            <text:p text:style-name="P477">5</text:p>
          </table:table-cell>
          <table:table-cell table:style-name="Table1.A1" office:value-type="string">
            <text:p text:style-name="P477">5</text:p>
          </table:table-cell>
          <table:table-cell table:style-name="Table1.A1" office:value-type="string">
            <text:p text:style-name="P477">5</text:p>
          </table:table-cell>
          <table:table-cell table:style-name="Table1.A1" office:value-type="string">
            <text:p text:style-name="P477">Premium Customer</text:p>
          </table:table-cell>
        </table:table-row>
        <table:table-row>
          <table:table-cell table:style-name="Table1.A1" office:value-type="string">
            <text:p text:style-name="P477">C002</text:p>
          </table:table-cell>
          <table:table-cell table:style-name="Table1.A1" office:value-type="string">
            <text:p text:style-name="P477">4</text:p>
          </table:table-cell>
          <table:table-cell table:style-name="Table1.A1" office:value-type="string">
            <text:p text:style-name="P477">4</text:p>
          </table:table-cell>
          <table:table-cell table:style-name="Table1.A1" office:value-type="string">
            <text:p text:style-name="P477">3</text:p>
          </table:table-cell>
          <table:table-cell table:style-name="Table1.A1" office:value-type="string">
            <text:p text:style-name="P477">Loyal Customer</text:p>
          </table:table-cell>
        </table:table-row>
        <table:table-row>
          <table:table-cell table:style-name="Table1.A1" office:value-type="string">
            <text:p text:style-name="P477">C003</text:p>
          </table:table-cell>
          <table:table-cell table:style-name="Table1.A1" office:value-type="string">
            <text:p text:style-name="P477">2</text:p>
          </table:table-cell>
          <table:table-cell table:style-name="Table1.A1" office:value-type="string">
            <text:p text:style-name="P477">1</text:p>
          </table:table-cell>
          <table:table-cell table:style-name="Table1.A1" office:value-type="string">
            <text:p text:style-name="P477">2</text:p>
          </table:table-cell>
          <table:table-cell table:style-name="Table1.A1" office:value-type="string">
            <text:p text:style-name="P477">At Risk Customer</text:p>
          </table:table-cell>
        </table:table-row>
        <table:table-row>
          <table:table-cell table:style-name="Table1.A1" office:value-type="string">
            <text:p text:style-name="P477">C004</text:p>
          </table:table-cell>
          <table:table-cell table:style-name="Table1.A1" office:value-type="string">
            <text:p text:style-name="P477">1</text:p>
          </table:table-cell>
          <table:table-cell table:style-name="Table1.A1" office:value-type="string">
            <text:p text:style-name="P477">1</text:p>
          </table:table-cell>
          <table:table-cell table:style-name="Table1.A1" office:value-type="string">
            <text:p text:style-name="P477">1</text:p>
          </table:table-cell>
          <table:table-cell table:style-name="Table1.A1" office:value-type="string">
            <text:p text:style-name="P477">Lost Customer</text:p>
          </table:table-cell>
        </table:table-row>
      </table:table>
      <text:p text:style-name="P307">This table demonstrates customer classification based on RFM scores.</text:p>
      <text:h text:style-name="P60" text:outline-level="1"><text:soft-page-break/>7.13 Visualization of RFM Analysis</text:h>
      <text:p text:style-name="P307"><text:span text:style-name="T15">Power BI dashboards are used to visua</text:span>lize customer segments.</text:p>
      <text:p text:style-name="P307">Visualizations include:</text:p>
      <text:list text:style-name="L216">
        <text:list-item>
          <text:p text:style-name="P478">KPI cards</text:p>
        </text:list-item>
        <text:list-item>
          <text:p text:style-name="P478">Bar charts</text:p>
        </text:list-item>
        <text:list-item>
          <text:p text:style-name="P478">Pie charts</text:p>
        </text:list-item>
        <text:list-item>
          <text:p text:style-name="P478">Tree-maps</text:p>
        </text:list-item>
        <text:list-item>
          <text:p text:style-name="P478">Scatter charts</text:p>
        </text:list-item>
        <text:list-item>
          <text:p text:style-name="P479">Customer segmentation dashboards</text:p>
        </text:list-item>
      </text:list>
      <text:p text:style-name="P280">These visualizations help management understand customer behavior easily.</text:p>
      <text:h text:style-name="P60" text:outline-level="1">7.14 RFM Dashboard KPIs</text:h>
      <text:p text:style-name="P74">Important KPIs used in dashboards include:</text:p>
      <text:list text:style-name="L217">
        <text:list-item>
          <text:p text:style-name="P480">Total Customers</text:p>
        </text:list-item>
        <text:list-item>
          <text:p text:style-name="P480">Active Customers</text:p>
        </text:list-item>
        <text:list-item>
          <text:p text:style-name="P480">Total Sales</text:p>
        </text:list-item>
        <text:list-item>
          <text:p text:style-name="P480">Total Profit</text:p>
        </text:list-item>
        <text:list-item>
          <text:p text:style-name="P480">Average Recency</text:p>
        </text:list-item>
        <text:list-item>
          <text:p text:style-name="P480">Average Frequency</text:p>
        </text:list-item>
        <text:list-item>
          <text:p text:style-name="P481">Average Monetary Value</text:p>
        </text:list-item>
      </text:list>
      <text:p text:style-name="P280">These KPIs support business decision making.</text:p>
      <text:h text:style-name="P60" text:outline-level="1">7.15 Benefits of RFM Analysis</text:h>
      <text:h text:style-name="P61" text:outline-level="2">Improved Customer Retention</text:h>
      <text:p text:style-name="P280">Businesses can identify inactive customers and improve retention.</text:p>
      <text:h text:style-name="P141" text:outline-level="2">Increased Revenue</text:h>
      <text:p text:style-name="P280">Organizations can focus on high value customers.</text:p>
      <text:h text:style-name="P141" text:outline-level="2">Better Marketing Efficiency</text:h>
      <text:p text:style-name="P280">Targeted campaigns improve marketing performance.</text:p>
      <text:h text:style-name="P141" text:outline-level="2">Personalized Communication</text:h>
      <text:p text:style-name="P280">Customer specific offers improve customer engagement.</text:p>
      <text:h text:style-name="P141" text:outline-level="2">Better Business Intelligence</text:h>
      <text:p text:style-name="P280">RFM metrics provide meaningful analytical insights.</text:p>
      <text:h text:style-name="P60" text:outline-level="1">7.16 Challenges in RFM Analysis</text:h>
      <text:p text:style-name="P280">Several challenges occur during segmentation.</text:p>
      <text:h text:style-name="P141" text:outline-level="2"><text:soft-page-break/>Missing Transaction Data</text:h>
      <text:p text:style-name="P280">Incomplete records affect calculations.</text:p>
      <text:h text:style-name="P141" text:outline-level="2">Incorrect Order Dates</text:h>
      <text:p text:style-name="P280">Date errors affect Recency values.</text:p>
      <text:h text:style-name="P141" text:outline-level="2">Duplicate Transactions</text:h>
      <text:p text:style-name="P280">Duplicates affect Frequency calculations.</text:p>
      <text:h text:style-name="P141" text:outline-level="2">Outliers in Sales Values</text:h>
      <text:p text:style-name="P280">Extreme sales values affect Monetary calculations.</text:p>
      <text:p text:style-name="P280">These issues are resolved through preprocessing.</text:p>
      <text:h text:style-name="P60" text:outline-level="1">7.17 Real World Applications of RFM Analysis</text:h>
      <text:p text:style-name="P74">RFM Analysis is widely used across industries.</text:p>
      <text:h text:style-name="P61" text:outline-level="2">E Commerce</text:h>
      <text:p text:style-name="P280">Online shopping companies use customer segmentation for recommendations.</text:p>
      <text:h text:style-name="P141" text:outline-level="2">Banking</text:h>
      <text:p text:style-name="P280">Banks identify premium customers for financial services.</text:p>
      <text:h text:style-name="P141" text:outline-level="2">Retail</text:h>
      <text:p text:style-name="P280">Retail businesses improve marketing strategies.</text:p>
      <text:h text:style-name="P141" text:outline-level="2">Hospitality</text:h>
      <text:p text:style-name="P280">Hotels identify loyal customers and improve customer experience.</text:p>
      <text:h text:style-name="P141" text:outline-level="2">Telecommunications</text:h>
      <text:p text:style-name="P280">Telecom companies reduce customer churn.</text:p>
      <text:h text:style-name="P482" text:outline-level="1">7.18 Role of RFM Analysis in Decision Making</text:h>
      <text:p text:style-name="P307"><text:span text:style-name="T20">RFM Analysis supports strategic business deci</text:span>sions.</text:p>
      <text:p text:style-name="P280">Management uses segmentation results for:</text:p>
      <text:list text:style-name="L218">
        <text:list-item>
          <text:p text:style-name="P483">Marketing campaigns</text:p>
        </text:list-item>
        <text:list-item>
          <text:p text:style-name="P483">Customer retention strategies</text:p>
        </text:list-item>
        <text:list-item>
          <text:p text:style-name="P483">Product recommendations</text:p>
        </text:list-item>
        <text:list-item>
          <text:p text:style-name="P483">Revenue optimization</text:p>
        </text:list-item>
        <text:list-item>
          <text:p text:style-name="P484">Business planning</text:p>
        </text:list-item>
      </text:list>
      <text:p text:style-name="P280">The analysis improves data driven decision making.</text:p>
      <text:h text:style-name="P60" text:outline-level="1">7.19 Advantages of RFM Analysis</text:h>
      <text:list text:style-name="L219">
        <text:list-item>
          <text:p text:style-name="P485">Simple analytical technique</text:p>
        </text:list-item>
        <text:list-item>
          <text:p text:style-name="P485">Easy implementation</text:p>
        </text:list-item>
        <text:list-item>
          <text:p text:style-name="P485"><text:soft-page-break/>Highly effective segmentation</text:p>
        </text:list-item>
        <text:list-item>
          <text:p text:style-name="P485">Improved customer understanding</text:p>
        </text:list-item>
        <text:list-item>
          <text:p text:style-name="P485">Better marketing performance</text:p>
        </text:list-item>
        <text:list-item>
          <text:p text:style-name="P485">Supports business growth</text:p>
        </text:list-item>
        <text:list-item>
          <text:p text:style-name="P486">Suitable for multiple industries</text:p>
        </text:list-item>
      </text:list>
      <text:h text:style-name="P60" text:outline-level="1">7.20 Limitations of RFM Analysis</text:h>
      <text:list text:style-name="L220">
        <text:list-item>
          <text:p text:style-name="P487">Focuses only on transaction history</text:p>
        </text:list-item>
        <text:list-item>
          <text:p text:style-name="P487">Does not include demographic data</text:p>
        </text:list-item>
        <text:list-item>
          <text:p text:style-name="P487">No predictive analytics</text:p>
        </text:list-item>
        <text:list-item>
          <text:p text:style-name="P487">Requires accurate historical data</text:p>
        </text:list-item>
        <text:list-item>
          <text:p text:style-name="P488">Limited behavioural analysis</text:p>
        </text:list-item>
      </text:list>
      <text:p text:style-name="P280">Despite limitations, RFM remains highly effective for customer segmentation.</text:p>
      <text:h text:style-name="P14" text:outline-level="1">7<text:span text:style-name="T15">.21 Conclusion</text:span></text:h>
      <text:p text:style-name="P280">This chapter explained the RFM Analysis and customer segmentation process used in the Customer Segmentation using RFM Analysis project.</text:p>
      <text:p text:style-name="P280">The chapter discussed Recency, Frequency, Monetary calculations, scoring methods, customer classification logic, SQL implementation, Python implementation, business strategies, dashboard KPIs, and business applications.</text:p>
      <text:p text:style-name="P280">RFM Analysis provides valuable insights into customer purchasing behaviour and helps organisations improve customer retention, increase revenue, and optimise marketing strategies.</text:p>
      <text:p text:style-name="P280">The next chapter explains SQL implementation in detail, including database creation, table operations, SQL queries, joins, aggregation functions, and analytical reporting.</text:p>
      <text:h text:style-name="P489" text:outline-level="1">CHAPTER 8</text:h>
      <text:h text:style-name="P489" text:outline-level="1">SQL IMPLEMENTATION</text:h>
      <text:h text:style-name="P490" text:outline-level="2">8.1 Introduction</text:h>
      <text:p text:style-name="P280">Structured Query Language commonly known as SQL is one of the most important technologies used in data analytics, database management, and business intelligence systems. SQL is used to store, retrieve, manipulate, and analyze structured data stored in relational databases.</text:p>
      <text:p text:style-name="P280">In this project, SQL plays a major role in processing the Online Super Store dataset for Customer Segmentation using RFM Analysis. SQL is used for:</text:p>
      <text:p text:style-name="P1"><text:span text:style-name="Strong_20_Emphasis"><text:span text:style-name="T4">Database creation</text:span></text:span></text:p>
      <text:list text:style-name="L221">
        <text:list-item>
          <text:p text:style-name="P491">Table creation</text:p>
        </text:list-item>
        <text:list-item>
          <text:p text:style-name="P491">Data insertion</text:p>
        </text:list-item>
        <text:list-item>
          <text:p text:style-name="P491">Data cleaning</text:p>
        </text:list-item>
        <text:list-item>
          <text:p text:style-name="P491">Data transformation</text:p>
        </text:list-item>
        <text:list-item>
          <text:p text:style-name="P491">Aggregation operations</text:p>
        </text:list-item>
        <text:list-item>
          <text:p text:style-name="P491">Customer analysis</text:p>
        </text:list-item>
        <text:list-item>
          <text:p text:style-name="P491">RFM calculations</text:p>
        </text:list-item>
        <text:list-item>
          <text:p text:style-name="P491"><text:soft-page-break/>Reporting</text:p>
        </text:list-item>
        <text:list-item>
          <text:p text:style-name="P492">Data validation</text:p>
        </text:list-item>
      </text:list>
      <text:p text:style-name="P66">SQL helps transform raw transaction data into meaningful business insights and analytical reports.</text:p>
      <text:p text:style-name="P66">This chapter explains SQL implementation in detail including database operations, SQL commands, joins, functions, aggregation techniques, and RFM related queries.</text:p>
      <text:h text:style-name="P165" text:outline-level="1">8.2 Importance of SQL in Data Analytics</text:h>
      <text:p text:style-name="P66">SQL is widely used in business analytics because it provides fast and efficient data processing.</text:p>
      <text:p text:style-name="P66">The importance of SQL includes:</text:p>
      <text:list text:style-name="L222">
        <text:list-item>
          <text:p text:style-name="P493">Fast data retrieval</text:p>
        </text:list-item>
        <text:list-item>
          <text:p text:style-name="P493">Efficient handling of large datasets</text:p>
        </text:list-item>
        <text:list-item>
          <text:p text:style-name="P493">Easy data aggregation</text:p>
        </text:list-item>
        <text:list-item>
          <text:p text:style-name="P493">Data transformation support</text:p>
        </text:list-item>
        <text:list-item>
          <text:p text:style-name="P493">Relationship management</text:p>
        </text:list-item>
        <text:list-item>
          <text:p text:style-name="P493">Reporting and analysis</text:p>
        </text:list-item>
        <text:list-item>
          <text:p text:style-name="P493">Integration with Power BI</text:p>
        </text:list-item>
        <text:list-item>
          <text:p text:style-name="P494">Structured data storage</text:p>
        </text:list-item>
      </text:list>
      <text:p text:style-name="P66">Most business intelligence systems depend on SQL databases for reporting and analytics.</text:p>
      <text:h text:style-name="P60" text:outline-level="1">8.3 SQL Environment Used in the Project</text:h>
      <text:p text:style-name="P66">The project uses SQL database systems for storing and processing transactional data.</text:p>
      <text:p text:style-name="P66">The SQL environment supports:</text:p>
      <text:list text:style-name="L223">
        <text:list-item>
          <text:p text:style-name="P495">Table creation</text:p>
        </text:list-item>
        <text:list-item>
          <text:p text:style-name="P495">Query execution</text:p>
        </text:list-item>
        <text:list-item>
          <text:p text:style-name="P495">Data transformation</text:p>
        </text:list-item>
        <text:list-item>
          <text:p text:style-name="P495">Aggregation</text:p>
        </text:list-item>
        <text:list-item>
          <text:p text:style-name="P496">Reporting</text:p>
        </text:list-item>
      </text:list>
      <text:p text:style-name="P66">Common SQL tools include:</text:p>
      <text:list text:style-name="L224">
        <text:list-item>
          <text:p text:style-name="P497">MySQL</text:p>
        </text:list-item>
        <text:list-item>
          <text:p text:style-name="P497">SQL Server</text:p>
        </text:list-item>
        <text:list-item>
          <text:p text:style-name="P497">PostgreSQL</text:p>
        </text:list-item>
        <text:list-item>
          <text:p text:style-name="P498">SQLite</text:p>
        </text:list-item>
      </text:list>
      <text:h text:style-name="P165" text:outline-level="1">8.4 Database Creation</text:h>
      <text:p text:style-name="P66">The first step in SQL implementation is database creation.</text:p>
      <text:h text:style-name="P61" text:outline-level="2">8.4.1 Creating Database</text:h>
      <text:p text:style-name="P120">SQL Query:</text:p>
      <text:p text:style-name="P66">CREATE DATABASE OnlineSuperStore;</text:p>
      <text:p text:style-name="P66">Purpose:</text:p>
      <text:list text:style-name="L225">
        <text:list-item>
          <text:p text:style-name="P499"><text:soft-page-break/>Creates a database for the project</text:p>
        </text:list-item>
        <text:list-item>
          <text:p text:style-name="P499">Stores analytical tables</text:p>
        </text:list-item>
        <text:list-item>
          <text:p text:style-name="P500">Supports reporting operations</text:p>
        </text:list-item>
      </text:list>
      <text:h text:style-name="P141" text:outline-level="2">8.4.2 Using Database</text:h>
      <text:p text:style-name="P66">SQL Query:</text:p>
      <text:p text:style-name="P66">USE OnlineSuperStore;</text:p>
      <text:p text:style-name="P66">Purpose:</text:p>
      <text:p text:style-name="P66">Selects the working database.</text:p>
      <text:h text:style-name="P165" text:outline-level="1">8.5 Table Creation</text:h>
      <text:p text:style-name="P66">Tables are created to store transactional and dimensional data.</text:p>
      <text:h text:style-name="P141" text:outline-level="2">8.5.1 Creating Main Transaction Table</text:h>
      <text:p text:style-name="P66">SQL Query:</text:p>
      <text:p text:style-name="P66">CREATE TABLE SuperStore ( Order_ID VARCHAR(50), Order_Date DATE, Ship_Date DATE, Customer_ID VARCHAR(50), Customer_Name VARCHAR(100), Segment VARCHAR(50), Country VARCHAR(50), City VARCHAR(50), State VARCHAR(50), Postal_Code INT, Region VARCHAR(50), Product_ID VARCHAR(50), Category VARCHAR(50), Sub_Category VARCHAR(50), Product_Name VARCHAR(255), Sales FLOAT, Quantity INT, Discount FLOAT, Profit FLOAT );</text:p>
      <text:p text:style-name="P66">Purpose:</text:p>
      <text:list text:style-name="L226">
        <text:list-item>
          <text:p text:style-name="P501">Stores sales transaction data</text:p>
        </text:list-item>
        <text:list-item>
          <text:p text:style-name="P501">Supports customer analysis</text:p>
        </text:list-item>
        <text:list-item>
          <text:p text:style-name="P502">Supports dashboard reporting</text:p>
        </text:list-item>
      </text:list>
      <text:h text:style-name="P14" text:outline-level="1">8.6 Data Insertion</text:h>
      <text:p text:style-name="P66">After table creation, data is inserted into the database.</text:p>
      <text:h text:style-name="P141" text:outline-level="2">8.6.1 Inserting Data into Table</text:h>
      <text:p text:style-name="P66">SQL Query:</text:p>
      <text:p text:style-name="P66">INSERT INTO SuperStore VALUES ( 'CA 2025 152156', '2025 11 08', '2025 11 11', 'CG 12520', 'Claire Gute', 'Consumer', 'United States', 'Henderson', 'Kentucky', 42420, 'South', 'FUR BO 10001798', 'Furniture', 'Bookcases', 'Bush Somerset Collection Bookcase', 261.96, 2, 0, 41.91 );</text:p>
      <text:p text:style-name="P66">Purpose:</text:p>
      <text:p text:style-name="P66">Adds transaction records into the database.</text:p>
      <text:h text:style-name="P14" text:outline-level="1">8.7 Retrieving Data Using SELECT</text:h>
      <text:p text:style-name="P66">The SELECT statement retrieves data from database tables.</text:p>
      <text:h text:style-name="P141" text:outline-level="2">8.7.1 Retrieving All Records</text:h>
      <text:p text:style-name="P66">SQL Query:</text:p>
      <text:p text:style-name="P66"><text:soft-page-break/>SELECT * FROM SuperStore;</text:p>
      <text:p text:style-name="P66">Purpose:</text:p>
      <text:p text:style-name="P66">Displays all records.</text:p>
      <text:h text:style-name="P61" text:outline-level="2">8.7.2 Retrieving Specific Columns</text:h>
      <text:p text:style-name="P66">SQL Query:</text:p>
      <text:p text:style-name="P66">SELECT Customer_Name, Sales, Profit FROM SuperStore;</text:p>
      <text:p text:style-name="P66">Purpose:</text:p>
      <text:p text:style-name="P66">Displays selected columns.</text:p>
      <text:h text:style-name="P165" text:outline-level="1">8.8 Filtering Data Using WHERE Clause</text:h>
      <text:p text:style-name="P66">The WHERE clause filters records based on conditions.</text:p>
      <text:h text:style-name="P15" text:outline-level="2">8.8.1 Filtering High Sales Transactions</text:h>
      <text:p text:style-name="P66">SQL Query:</text:p>
      <text:p text:style-name="P280">SELECT * FROM SuperStore WHERE Sales &gt; 1000;</text:p>
      <text:p text:style-name="P280">Purpose:</text:p>
      <text:p text:style-name="P66">Identifies high value transactions.</text:p>
      <text:h text:style-name="P15" text:outline-level="2">8.8.2 Filtering by Region</text:h>
      <text:p text:style-name="P66">SQL Query:</text:p>
      <text:p text:style-name="P66">SELECT * FROM SuperStore WHERE Region = 'West';</text:p>
      <text:p text:style-name="P66">Purpose:</text:p>
      <text:p text:style-name="P66">Displays western region sales.</text:p>
      <text:h text:style-name="P14" text:outline-level="1">8.9 Sorting Data Using ORDER BY</text:h>
      <text:p text:style-name="P66">The ORDER BY clause sorts records.</text:p>
      <text:h text:style-name="P141" text:outline-level="2">8.9.1 Sorting Sales in Descending Order</text:h>
      <text:p text:style-name="P66">SQL Query:</text:p>
      <text:p text:style-name="P66">SELECT Customer_Name, Sales FROM SuperStore ORDER BY Sales DESC;</text:p>
      <text:p text:style-name="P66">Purpose:</text:p>
      <text:p text:style-name="P66">Displays highest sales first.</text:p>
      <text:h text:style-name="P14" text:outline-level="1">8.10 Aggregate Functions in SQL</text:h>
      <text:p text:style-name="P66">Aggregate functions perform calculations on groups of data.</text:p>
      <text:p text:style-name="P66">Functions used include:</text:p>
      <text:list text:style-name="L227">
        <text:list-item>
          <text:p text:style-name="P503">SUM()</text:p>
        </text:list-item>
        <text:list-item>
          <text:p text:style-name="P503">COUNT()</text:p>
        </text:list-item>
        <text:list-item>
          <text:p text:style-name="P503"><text:soft-page-break/>AVG()</text:p>
        </text:list-item>
        <text:list-item>
          <text:p text:style-name="P503">MAX()</text:p>
        </text:list-item>
        <text:list-item>
          <text:p text:style-name="P504">MIN()</text:p>
        </text:list-item>
      </text:list>
      <text:h text:style-name="P141" text:outline-level="2"><text:span text:style-name="T12">8.10.1 SUM Functio</text:span>n</text:h>
      <text:p text:style-name="P66">SQL Query:</text:p>
      <text:p text:style-name="P66">SELECT SUM(Sales) AS Total_Sales FROM SuperStore;</text:p>
      <text:p text:style-name="P66">Purpose:</text:p>
      <text:p text:style-name="P66">Calculates total sales.</text:p>
      <text:h text:style-name="P15" text:outline-level="2">8.10.2 COUNT Function</text:h>
      <text:p text:style-name="P66">SQL Query:</text:p>
      <text:p text:style-name="P66">SELECT COUNT(Customer_ID) AS Total_Customers FROM SuperStore;</text:p>
      <text:p text:style-name="P66">Purpose:</text:p>
      <text:p text:style-name="P66">Counts customer records.</text:p>
      <text:h text:style-name="P141" text:outline-level="2">8.10.3 AVG Function</text:h>
      <text:p text:style-name="P66">SQL Query:</text:p>
      <text:p text:style-name="P66">SELECT AVG(Profit) AS Average_Profit FROM SuperStore;</text:p>
      <text:p text:style-name="P66">Purpose:</text:p>
      <text:p text:style-name="P66">Calculates average profit.</text:p>
      <text:h text:style-name="P15" text:outline-level="2">8.10.4 MAX Function</text:h>
      <text:p text:style-name="P66">SQL Query:</text:p>
      <text:p text:style-name="P66">SELECT MAX(Sales) AS Highest_Sales FROM SuperStore;</text:p>
      <text:p text:style-name="P66">Purpose:</text:p>
      <text:p text:style-name="P66">Finds highest sales value.</text:p>
      <text:h text:style-name="P15" text:outline-level="2">8.10.5 MIN Function</text:h>
      <text:p text:style-name="P66">SQL Query:</text:p>
      <text:p text:style-name="P66">SELECT MIN(Sales) AS Lowest_Sales FROM SuperStore;</text:p>
      <text:p text:style-name="P66">Purpose:</text:p>
      <text:p text:style-name="P66">Finds lowest sales value.</text:p>
      <text:h text:style-name="P14" text:outline-level="1">8.11 GROUP BY Clause</text:h>
      <text:p text:style-name="P66">GROUP BY groups records for aggregation.</text:p>
      <text:h text:style-name="P141" text:outline-level="2">8.11.1 Category Wise Sales Analysis</text:h>
      <text:p text:style-name="P66">SQL Query:</text:p>
      <text:p text:style-name="P66"><text:soft-page-break/>SELECT Category, SUM(Sales) AS Total_Sales FROM SuperStore GROUP BY Category;</text:p>
      <text:p text:style-name="P66">Purpose:</text:p>
      <text:p text:style-name="P66">Analyses category wise sales.</text:p>
      <text:h text:style-name="P141" text:outline-level="2">8.11.2 Region Wise Profit Analysis</text:h>
      <text:p text:style-name="P66">SQL Query:</text:p>
      <text:p text:style-name="P66">SELECT Region, SUM(Profit) AS Total_Profit FROM SuperStore GROUP BY Region;</text:p>
      <text:p text:style-name="P66">Purpose:</text:p>
      <text:p text:style-name="P66">Analyses regional profit.</text:p>
      <text:h text:style-name="P165" text:outline-level="1">8.12 HAVING Clause</text:h>
      <text:p text:style-name="P66">HAVING filters grouped data.</text:p>
      <text:h text:style-name="P15" text:outline-level="2">8.12.1 Categories with High Sales</text:h>
      <text:p text:style-name="P66">SQL Query:</text:p>
      <text:p text:style-name="P66">SELECT Category, SUM(Sales) AS Total_Sales FROM SuperStore GROUP BY Category HAVING SUM(Sales) &gt; 50000;</text:p>
      <text:p text:style-name="P66">Purpose:</text:p>
      <text:p text:style-name="P66">Identifies high performing categories.</text:p>
      <text:h text:style-name="P60" text:outline-level="1">8.13 SQL JOIN Operations</text:h>
      <text:p text:style-name="P304">JOIN operations combine data from multiple tables.</text:p>
      <text:p text:style-name="P304">JOIN types used include:</text:p>
      <text:list text:style-name="L228">
        <text:list-item>
          <text:p text:style-name="P505">INNER JOIN</text:p>
        </text:list-item>
        <text:list-item>
          <text:p text:style-name="P505">LEFT JOIN</text:p>
        </text:list-item>
        <text:list-item>
          <text:p text:style-name="P506">RIGHT JOIN</text:p>
        </text:list-item>
      </text:list>
      <text:h text:style-name="P61" text:outline-level="2">8.13.1 INNER JOIN Example</text:h>
      <text:p text:style-name="P66">SQL Query:</text:p>
      <text:p text:style-name="P66">SELECT F.Order_ID, C.Customer_Name, F.Sales FROM Fact_Sales F INNER JOIN Dim_Customer C ON F.Customer_ID = C.Customer_ID;</text:p>
      <text:p text:style-name="P66">Purpose:</text:p>
      <text:p text:style-name="P66">Combines sales and customer data.</text:p>
      <text:h text:style-name="P61" text:outline-level="2">8.13.2 LEFT JOIN Example</text:h>
      <text:p text:style-name="P280">SQL Query:</text:p>
      <text:p text:style-name="P280">SELECT C.Customer_Name, F.Sales FROM Dim_Customer C LEFT JOIN Fact_Sales F ON C.Customer_ID = F.Customer_ID;</text:p>
      <text:p text:style-name="P280">Purpose:</text:p>
      <text:p text:style-name="P66"><text:soft-page-break/>Displays all customers including unmatched records.</text:p>
      <text:h text:style-name="P165" text:outline-level="1">8.14 SQL Functions Used in the Project</text:h>
      <text:p text:style-name="P66">Several SQL functions are used for transformation and analysis.</text:p>
      <text:h text:style-name="P141" text:outline-level="2">8.14.1 Date Functions</text:h>
      <text:p text:style-name="P66">Used for time based analysis.</text:p>
      <text:p text:style-name="P66">Example:</text:p>
      <text:p text:style-name="P66">SELECT YEAR(Order_Date) FROM SuperStore;</text:p>
      <text:p text:style-name="P66">Purpose:</text:p>
      <text:p text:style-name="P66">Extracts year from order date.</text:p>
      <text:h text:style-name="P15" text:outline-level="2">8.14.2 String Functions</text:h>
      <text:p text:style-name="P66">Used for text manipulation.</text:p>
      <text:p text:style-name="P66">Example:</text:p>
      <text:p text:style-name="P66">SELECT UPPER(Customer_Name) FROM SuperStore;</text:p>
      <text:p text:style-name="P66">Purpose:</text:p>
      <text:p text:style-name="P66">Converts names into uppercase.</text:p>
      <text:h text:style-name="P141" text:outline-level="2">8.14.3 Mathematical Functions</text:h>
      <text:p text:style-name="P66">Used for calculations.</text:p>
      <text:p text:style-name="P66">Example:</text:p>
      <text:p text:style-name="P66">SELECT ROUND(AVG(Sales), 2) FROM SuperStore;</text:p>
      <text:p text:style-name="P66">Purpose:</text:p>
      <text:p text:style-name="P66">Rounds average sales values.</text:p>
      <text:h text:style-name="P165" text:outline-level="1">8.15 SQL Queries for Data Cleaning</text:h>
      <text:p text:style-name="P66">SQL is used to clean and preprocess data.</text:p>
      <text:h text:style-name="P15" text:outline-level="2">8.15.1 Removing Null Values</text:h>
      <text:p text:style-name="P66">SQL Query:</text:p>
      <text:p text:style-name="P66">DELETE FROM SuperStore WHERE Customer_ID IS NULL;</text:p>
      <text:p text:style-name="P66">Purpose:</text:p>
      <text:p text:style-name="P66">Removes incomplete records.</text:p>
      <text:h text:style-name="P15" text:outline-level="2">8.15.2 Removing Duplicate Records</text:h>
      <text:p text:style-name="P66">SQL Query:</text:p>
      <text:p text:style-name="P66">SELECT DISTINCT * FROM SuperStore;</text:p>
      <text:p text:style-name="P66"><text:soft-page-break/>Purpose:</text:p>
      <text:p text:style-name="P66">Removes duplicate transactions.</text:p>
      <text:h text:style-name="P165" text:outline-level="1">8.16 SQL Queries for RFM Analysis</text:h>
      <text:p text:style-name="P66">SQL is used to calculate customer segmentation metrics.</text:p>
      <text:h text:style-name="P61" text:outline-level="2">8.16.1 Calculating Recency</text:h>
      <text:p text:style-name="P66">SQL Query:</text:p>
      <text:p text:style-name="P66">SELECT Customer_ID, DATEDIFF(DAY, MAX(Order_Date), '2026 01 01') AS Recency FROM SuperStore GROUP BY Customer_ID;</text:p>
      <text:p text:style-name="P66">Purpose:</text:p>
      <text:p text:style-name="P66">Calculates customer recency.</text:p>
      <text:h text:style-name="P61" text:outline-level="2">8.16.2 Calculating Frequency</text:h>
      <text:p text:style-name="P74">SQL Query:</text:p>
      <text:p text:style-name="P66">SELECT Customer_ID, COUNT(Order_ID) AS Frequency FROM SuperStore GROUP BY Customer_ID;</text:p>
      <text:p text:style-name="P66">Purpose:</text:p>
      <text:p text:style-name="P66">Calculates customer frequency.</text:p>
      <text:h text:style-name="P141" text:outline-level="2">8.16.3 Calculating Monetary Value</text:h>
      <text:p text:style-name="P66">SQL Query:</text:p>
      <text:p text:style-name="P66">SELECT Customer_ID, SUM(Sales) AS Monetary FROM SuperStore GROUP BY Customer_ID;</text:p>
      <text:p text:style-name="P66">Purpose:</text:p>
      <text:p text:style-name="P66">Calculates customer spending.</text:p>
      <text:h text:style-name="P141" text:outline-level="2">8.16.4 Complete RFM Query</text:h>
      <text:p text:style-name="P66">SQL Query:</text:p>
      <text:p text:style-name="P66">SELECT Customer_ID, DATE DIFF(DAY, MAX(Order_Date), '2026 01 01') AS Recency, COUNT(Order_ID) AS Frequency, SUM(Sales) AS Monetary FROM SuperStore GROUP BY Customer_ID;</text:p>
      <text:p text:style-name="P66">Purpose:</text:p>
      <text:p text:style-name="P66">Creates customer segmentation dataset.</text:p>
      <text:h text:style-name="P14" text:outline-level="1">8.17 SQL Views</text:h>
      <text:p text:style-name="P66">Views simplify reporting and analysis.</text:p>
      <text:h text:style-name="P507" text:outline-level="2"><text:span text:style-name="T10">8.17.1 Creating Customer Summary View</text:span></text:h>
      <text:p text:style-name="P66">SQL Query:</text:p>
      <text:p text:style-name="P66"><text:soft-page-break/>CREATE VIEW Customer_Summary AS SELECT Customer_ID, SUM(Sales) AS Total_Sales, SUM(Profit) AS Total_Profit FROM SuperStore GROUP BY Customer_ID;</text:p>
      <text:p text:style-name="P66">Purpose:</text:p>
      <text:p text:style-name="P66">Creates reusable analytical report.</text:p>
      <text:h text:style-name="P165" text:outline-level="1">8.18 SQL Subqueries</text:h>
      <text:p text:style-name="P66">Subqueries are queries inside another query.</text:p>
      <text:h text:style-name="P141" text:outline-level="2">8.18.1 Customers with Above Average Sales</text:h>
      <text:p text:style-name="P66">SQL Query:</text:p>
      <text:p text:style-name="P66">SELECT Customer_Name, Sales FROM SuperStore WHERE Sales &gt; ( SELECT AVG(Sales) FROM SuperStore );</text:p>
      <text:p text:style-name="P66">Purpose:</text:p>
      <text:p text:style-name="P66">Identifies above average customers.</text:p>
      <text:h text:style-name="P14" text:outline-level="1">8.19 Window Functions</text:h>
      <text:p text:style-name="P66">Window functions perform calculations across rows.</text:p>
      <text:h text:style-name="P141" text:outline-level="2">8.19.1 Ranking Customers by Sales</text:h>
      <text:p text:style-name="P66">SQL Query:</text:p>
      <text:p text:style-name="P280">SELECT Customer_ID, SUM(Sales) AS Total_Sales, RANK() OVER (ORDER BY SUM(Sales) DESC) AS Sales_Rank FROM SuperStore GROUP BY Customer_ID;</text:p>
      <text:p text:style-name="P280">Purpose:</text:p>
      <text:p text:style-name="P280">Ranks customers based on sales.</text:p>
      <text:h text:style-name="P14" text:outline-level="1">8.20 SQL Optimization Techniques</text:h>
      <text:p text:style-name="P66">Optimization improves query performance.</text:p>
      <text:p text:style-name="P66">Techniques include:</text:p>
      <text:list text:style-name="L229">
        <text:list-item>
          <text:p text:style-name="P508">Using indexes</text:p>
        </text:list-item>
        <text:list-item>
          <text:p text:style-name="P508">Avoiding unnecessary columns</text:p>
        </text:list-item>
        <text:list-item>
          <text:p text:style-name="P508">Using proper joins</text:p>
        </text:list-item>
        <text:list-item>
          <text:p text:style-name="P508">Using filtered conditions</text:p>
        </text:list-item>
        <text:list-item>
          <text:p text:style-name="P509">Using aggregated tables</text:p>
        </text:list-item>
      </text:list>
      <text:h text:style-name="P15" text:outline-level="2">8.20.1 Creating Indexes</text:h>
      <text:p text:style-name="P66">SQL Query:</text:p>
      <text:p text:style-name="P66">CREATE INDEX idx_customer ON SuperStore(Customer_ID);</text:p>
      <text:p text:style-name="P66">Purpose:</text:p>
      <text:p text:style-name="P66">Improves query speed.</text:p>
      <text:h text:style-name="P14" text:outline-level="1"><text:soft-page-break/>8.21 SQL Reporting Queries</text:h>
      <text:p text:style-name="P66">SQL reporting queries support dashboard development.</text:p>
      <text:h text:style-name="P15" text:outline-level="2">8.21.1 Monthly Sales Report</text:h>
      <text:p text:style-name="P66">SQL Query:</text:p>
      <text:p text:style-name="P66">SELECT MONTH(Order_Date) AS Month_Number, SUM(Sales) AS Monthly_Sales FROM SuperStore GROUP BY MONTH(Order_Date) ORDER BY Month_Number;</text:p>
      <text:p text:style-name="P66">Purpose:</text:p>
      <text:p text:style-name="P66">Generates monthly sales report.</text:p>
      <text:h text:style-name="P15" text:outline-level="2">8.21.2 Top Customers Report</text:h>
      <text:p text:style-name="P307">SQL Query:</text:p>
      <text:p text:style-name="P66">SELECT TOP 10 Customer_Name, SUM(Sales) AS Total_Sales FROM SuperStore GROUP BY Customer_Name ORDER BY Total_Sales DESC;</text:p>
      <text:p text:style-name="P66">Purpose:</text:p>
      <text:p text:style-name="P66">Identifies top customers.</text:p>
      <text:h text:style-name="P14" text:outline-level="1">8.22 SQL Integration with Power BI</text:h>
      <text:p text:style-name="P66">SQL databases are connected with Power BI for dashboard reporting.</text:p>
      <text:p text:style-name="P66">Benefits include:</text:p>
      <text:list text:style-name="L230">
        <text:list-item>
          <text:p text:style-name="P510">Real time reporting</text:p>
        </text:list-item>
        <text:list-item>
          <text:p text:style-name="P510">Faster dashboard loading</text:p>
        </text:list-item>
        <text:list-item>
          <text:p text:style-name="P510">Centralised data storage</text:p>
        </text:list-item>
        <text:list-item>
          <text:p text:style-name="P511">Improved analytical performance</text:p>
        </text:list-item>
      </text:list>
      <text:h text:style-name="P60" text:outline-level="1">8.23 Advantages of SQL in the Project</text:h>
      <text:list text:style-name="L231">
        <text:list-item>
          <text:p text:style-name="P512">Fast data processing</text:p>
        </text:list-item>
        <text:list-item>
          <text:p text:style-name="P513">Structured data management</text:p>
        </text:list-item>
        <text:list-item>
          <text:p text:style-name="P513">Efficient aggregations</text:p>
        </text:list-item>
        <text:list-item>
          <text:p text:style-name="P513">Better reporting</text:p>
        </text:list-item>
        <text:list-item>
          <text:p text:style-name="P513">Supports Power BI integration</text:p>
        </text:list-item>
        <text:list-item>
          <text:p text:style-name="P513">Simplifies RFM calculations</text:p>
        </text:list-item>
        <text:list-item>
          <text:p text:style-name="P514">Handles large datasets efficiently</text:p>
        </text:list-item>
      </text:list>
      <text:h text:style-name="P60" text:outline-level="1">8.24 Challenges Faced During SQL Implementation</text:h>
      <text:p text:style-name="P66">Several challenges occurred during implementation.</text:p>
      <text:h text:style-name="P141" text:outline-level="2">Large Dataset Processing</text:h>
      <text:p text:style-name="P66">Large transaction tables required optimization.</text:p>
      <text:h text:style-name="P141" text:outline-level="2"><text:soft-page-break/>Duplicate Records</text:h>
      <text:p text:style-name="P66">Duplicate records affected calculations.</text:p>
      <text:h text:style-name="P141" text:outline-level="2">Null Values</text:h>
      <text:p text:style-name="P66">Missing values affected aggregations.</text:p>
      <text:h text:style-name="P141" text:outline-level="2">Complex Queries</text:h>
      <text:p text:style-name="P66">RFM calculations required advanced SQL logic.</text:p>
      <text:p text:style-name="P66">These challenges were resolved using SQL preprocessing and optimization techniques.</text:p>
      <text:h text:style-name="P60" text:outline-level="1">8.25 Conclusion</text:h>
      <text:p text:style-name="P66">This chapter explained SQL implementation used in the Customer Segmentation using RFM Analysis project.</text:p>
      <text:p text:style-name="P66">The chapter discussed database creation, table creation, data insertion, SELECT queries, filtering, aggregation functions, joins, views, subqueries, window functions, optimization techniques, and RFM related SQL calculations.</text:p>
      <text:p text:style-name="P66">SQL plays an important role in transforming raw transaction data into analytical information used for customer segmentation, reporting, and dashboard visualization.</text:p>
      <text:p text:style-name="P66">The next chapter explains Python implementation in detail including data preprocessing, exploratory data analysis, visualization, and customer segmentation using Python libraries.</text:p>
      <text:h text:style-name="P59" text:outline-level="1">CHAPTER 9</text:h>
      <text:h text:style-name="P59" text:outline-level="1">PYTHON IMPLEMENTATION</text:h>
      <text:h text:style-name="P515" text:outline-level="2">9.1 Introduction</text:h>
      <text:p text:style-name="P12">Python is one of the most popular programming languages used in data analytics, machine learning, artificial intelligence, and business intelligence systems. Python provides simple syntax, powerful analytical libraries, automation capabilities, and strong support for data processing.</text:p>
      <text:p text:style-name="P12">In this project, Python is used extensively for:</text:p>
      <text:list text:style-name="L232">
        <text:list-item>
          <text:p text:style-name="P516">Data importing</text:p>
        </text:list-item>
        <text:list-item>
          <text:p text:style-name="P516">Data cleaning</text:p>
        </text:list-item>
        <text:list-item>
          <text:p text:style-name="P516">Data preprocessing</text:p>
        </text:list-item>
        <text:list-item>
          <text:p text:style-name="P516">Exploratory Data Analysis</text:p>
        </text:list-item>
        <text:list-item>
          <text:p text:style-name="P516">RFM calculations</text:p>
        </text:list-item>
        <text:list-item>
          <text:p text:style-name="P516">Customer segmentation</text:p>
        </text:list-item>
        <text:list-item>
          <text:p text:style-name="P516">Data visualization</text:p>
        </text:list-item>
        <text:list-item>
          <text:p text:style-name="P517">Exporting transformed datasets</text:p>
        </text:list-item>
      </text:list>
      <text:p text:style-name="P1"><text:span text:style-name="Strong_20_Emphasis"><text:span text:style-name="T4">Python helps transform raw Online Super Store transaction data into meaningful analytical insights. The integration of Python with SQL and Power BI creates a complete end to end analytics workflow.</text:span></text:span></text:p>
      <text:p text:style-name="P66"><text:soft-page-break/>This chapter explains Python implementation in detail including libraries, preprocessing techniques, analytical operations, visualization methods, and RFM segmentation.</text:p>
      <text:h text:style-name="P60" text:outline-level="1">9.2 Importance of Python in Data Analytics</text:h>
      <text:p text:style-name="P66">Python is widely used in analytics because it is simple, flexible, and powerful.</text:p>
      <text:p text:style-name="P66">The importance of Python includes:</text:p>
      <text:list text:style-name="L233">
        <text:list-item>
          <text:p text:style-name="P518">Easy programming syntax</text:p>
        </text:list-item>
        <text:list-item>
          <text:p text:style-name="P518">Powerful data analysis libraries</text:p>
        </text:list-item>
        <text:list-item>
          <text:p text:style-name="P518">Fast preprocessing capabilities</text:p>
        </text:list-item>
        <text:list-item>
          <text:p text:style-name="P518">Advanced visualization support</text:p>
        </text:list-item>
        <text:list-item>
          <text:p text:style-name="P518">Automation support</text:p>
        </text:list-item>
        <text:list-item>
          <text:p text:style-name="P518">Machine learning integration</text:p>
        </text:list-item>
        <text:list-item>
          <text:p text:style-name="P518">Large community support</text:p>
        </text:list-item>
        <text:list-item>
          <text:p text:style-name="P519">Open source availability</text:p>
        </text:list-item>
      </text:list>
      <text:p text:style-name="P66">Python allows analysts to perform complex operations with fewer lines of code.</text:p>
      <text:h text:style-name="P165" text:outline-level="1">9.3 Python Environment Used in the Project</text:h>
      <text:p text:style-name="P66">The project uses Python programming environment for data analysis.</text:p>
      <text:p text:style-name="P66">Common environments include:</text:p>
      <text:list text:style-name="L234">
        <text:list-item>
          <text:p text:style-name="P520">Jupyter Notebook</text:p>
        </text:list-item>
        <text:list-item>
          <text:p text:style-name="P520">Google Colab</text:p>
        </text:list-item>
        <text:list-item>
          <text:p text:style-name="P520">VS Code</text:p>
        </text:list-item>
        <text:list-item>
          <text:p text:style-name="P521">Anaconda Navigator</text:p>
        </text:list-item>
      </text:list>
      <text:p text:style-name="P66">These environments support:</text:p>
      <text:list text:style-name="L235">
        <text:list-item>
          <text:p text:style-name="P522">Python coding</text:p>
        </text:list-item>
        <text:list-item>
          <text:p text:style-name="P522">Visualization</text:p>
        </text:list-item>
        <text:list-item>
          <text:p text:style-name="P522">Data analysis</text:p>
        </text:list-item>
        <text:list-item>
          <text:p text:style-name="P523">Reporting</text:p>
        </text:list-item>
      </text:list>
      <text:h text:style-name="P60" text:outline-level="1">9.4 Python Libraries Used</text:h>
      <text:p text:style-name="P66">Several Python libraries are used in the project.</text:p>
      <text:h text:style-name="P141" text:outline-level="2">9.4.1 Pandas</text:h>
      <text:p text:style-name="P66">Pandas is one of the most important Python libraries for data manipulation.</text:p>
      <text:p text:style-name="P66">Pandas is used for:</text:p>
      <text:list text:style-name="L236">
        <text:list-item>
          <text:p text:style-name="P524">Reading datasets</text:p>
        </text:list-item>
        <text:list-item>
          <text:p text:style-name="P524">Data cleaning</text:p>
        </text:list-item>
        <text:list-item>
          <text:p text:style-name="P524">Data transformation</text:p>
        </text:list-item>
        <text:list-item>
          <text:p text:style-name="P524">Aggregation</text:p>
        </text:list-item>
        <text:list-item>
          <text:p text:style-name="P525">Data analysis</text:p>
        </text:list-item>
      </text:list>
      <text:p text:style-name="P66">Import Statement:</text:p>
      <text:p text:style-name="P526"><text:soft-page-break/>import pandas as pd</text:p>
      <text:h text:style-name="P61" text:outline-level="2">9.4.2 NumPy</text:h>
      <text:p text:style-name="P66">NumPy is used for numerical calculations and array operations.</text:p>
      <text:p text:style-name="P66">Features include:</text:p>
      <text:list text:style-name="L237">
        <text:list-item>
          <text:p text:style-name="P527">Numerical processing</text:p>
        </text:list-item>
        <text:list-item>
          <text:p text:style-name="P527">Mathematical operations</text:p>
        </text:list-item>
        <text:list-item>
          <text:p text:style-name="P528">Statistical calculations</text:p>
        </text:list-item>
      </text:list>
      <text:p text:style-name="P66">Import Statement:</text:p>
      <text:p text:style-name="P526">import numpy as np</text:p>
      <text:h text:style-name="P61" text:outline-level="2">9.4.3 Matplotlib</text:h>
      <text:p text:style-name="P66">Matplotlib is used for data visualization.</text:p>
      <text:p text:style-name="P66">Features include:</text:p>
      <text:list text:style-name="L238">
        <text:list-item>
          <text:p text:style-name="P529">Bar charts</text:p>
        </text:list-item>
        <text:list-item>
          <text:p text:style-name="P529">Line charts</text:p>
        </text:list-item>
        <text:list-item>
          <text:p text:style-name="P529">Scatter plots</text:p>
        </text:list-item>
        <text:list-item>
          <text:p text:style-name="P529">Histograms</text:p>
        </text:list-item>
        <text:list-item>
          <text:p text:style-name="P530">Pie charts</text:p>
        </text:list-item>
      </text:list>
      <text:p text:style-name="P66">Import Statement:</text:p>
      <text:p text:style-name="P526">import matplotlib.pyplot as plt</text:p>
      <text:h text:style-name="P61" text:outline-level="2">9.4.4 Seaborn</text:h>
      <text:p text:style-name="P66"><text:span text:style-name="T12">Seaborn is used fo</text:span>r statistical visualization.</text:p>
      <text:p text:style-name="P66">Features include:</text:p>
      <text:list text:style-name="L239">
        <text:list-item>
          <text:p text:style-name="P531">Heatmaps</text:p>
        </text:list-item>
        <text:list-item>
          <text:p text:style-name="P531">Distribution plots</text:p>
        </text:list-item>
        <text:list-item>
          <text:p text:style-name="P532">Advanced statistical charts</text:p>
        </text:list-item>
      </text:list>
      <text:p text:style-name="P66">Import Statement:</text:p>
      <text:p text:style-name="P526">import seaborn as sns</text:p>
      <text:h text:style-name="P60" text:outline-level="1">9.5 Importing the Dataset Using Python</text:h>
      <text:p text:style-name="P66">The Online Super Store dataset is imported into Python using Pandas.</text:p>
      <text:h text:style-name="P141" text:outline-level="2">9.5.1 Reading CSV File</text:h>
      <text:p text:style-name="P66">Python Code:</text:p>
      <text:p text:style-name="P526">import pandas as pd</text:p>
      <text:p text:style-name="P526"/>
      <text:p text:style-name="P526">data = pd.read_csv('SuperStore.csv')</text:p>
      <text:p text:style-name="P66">print(data.head())</text:p>
      <text:p text:style-name="P66">Explanation:</text:p>
      <text:list text:style-name="L240">
        <text:list-item>
          <text:p text:style-name="P533"><text:soft-page-break/>Imports Pandas library</text:p>
        </text:list-item>
        <text:list-item>
          <text:p text:style-name="P533">Reads CSV dataset</text:p>
        </text:list-item>
        <text:list-item>
          <text:p text:style-name="P534">Displays first five records</text:p>
        </text:list-item>
      </text:list>
      <text:h text:style-name="P61" text:outline-level="2">9.5.2 Reading Excel File</text:h>
      <text:p text:style-name="P120">Python Code:</text:p>
      <text:p text:style-name="P526">data = pd.read_excel('SuperStore.xlsx')</text:p>
      <text:p text:style-name="P66">print(data.head())</text:p>
      <text:p text:style-name="P66">Purpose:</text:p>
      <text:p text:style-name="P66">Reads Excel datasets.</text:p>
      <text:h text:style-name="P60" text:outline-level="1">9.6 Understanding Dataset Structure</text:h>
      <text:p text:style-name="P66">Understanding dataset structure is important before preprocessing.</text:p>
      <text:h text:style-name="P141" text:outline-level="2">9.6.1 Viewing Dataset Information</text:h>
      <text:p text:style-name="P66">Python Code:</text:p>
      <text:p text:style-name="P66">print(data.info())</text:p>
      <text:p text:style-name="P66">Purpose:</text:p>
      <text:list text:style-name="L241">
        <text:list-item>
          <text:p text:style-name="P535">Displays columns</text:p>
        </text:list-item>
        <text:list-item>
          <text:p text:style-name="P535">Displays data types</text:p>
        </text:list-item>
        <text:list-item>
          <text:p text:style-name="P536">Displays missing values</text:p>
        </text:list-item>
      </text:list>
      <text:h text:style-name="P61" text:outline-level="2">9.6.2 Viewing Statistical Summary</text:h>
      <text:p text:style-name="P66">Python Code:</text:p>
      <text:p text:style-name="P66">print(data.describe())</text:p>
      <text:p text:style-name="P66">Purpose:</text:p>
      <text:list text:style-name="L242">
        <text:list-item>
          <text:p text:style-name="P537">Displays averages</text:p>
        </text:list-item>
        <text:list-item>
          <text:p text:style-name="P537">Displays maximum values</text:p>
        </text:list-item>
        <text:list-item>
          <text:p text:style-name="P537">Displays minimum values</text:p>
        </text:list-item>
        <text:list-item>
          <text:p text:style-name="P538">Displays statistical information</text:p>
        </text:list-item>
      </text:list>
      <text:h text:style-name="P60" text:outline-level="1">9.7 Data Cleaning Using Python</text:h>
      <text:p text:style-name="P66">Python is used for cleaning and preprocessing the dataset.</text:p>
      <text:h text:style-name="P141" text:outline-level="2">9.7.1 Identifying Missing Values</text:h>
      <text:p text:style-name="P66">Python Code:</text:p>
      <text:p text:style-name="P66">print(data.isnull().sum())</text:p>
      <text:p text:style-name="P66">Purpose:</text:p>
      <text:p text:style-name="P66">Counts missing values in each column.</text:p>
      <text:h text:style-name="P61" text:outline-level="2"><text:soft-page-break/>9.7.2 Removing Missing Values</text:h>
      <text:p text:style-name="P66">Python Code:</text:p>
      <text:p text:style-name="P66">data = data.dropna()</text:p>
      <text:p text:style-name="P66">Purpose:</text:p>
      <text:p text:style-name="P66">Removes records containing null values.</text:p>
      <text:h text:style-name="P61" text:outline-level="2">9.7.3 Filling Missing Values</text:h>
      <text:p text:style-name="P66">Python Code:</text:p>
      <text:p text:style-name="P66">data['Profit'] = data['Profit'].fillna(0)</text:p>
      <text:p text:style-name="P66">Purpose:</text:p>
      <text:p text:style-name="P66">Replaces null profit values.</text:p>
      <text:h text:style-name="P61" text:outline-level="2">9.7.4 Removing Duplicate Records</text:h>
      <text:p text:style-name="P66">Python Code:</text:p>
      <text:p text:style-name="P66">data = data.drop_duplicates()</text:p>
      <text:p text:style-name="P66">Purpose:</text:p>
      <text:p text:style-name="P66">Removes duplicate transaction records.</text:p>
      <text:h text:style-name="P61" text:outline-level="2">9.7.5 Converting Date Columns</text:h>
      <text:p text:style-name="P120">Python Code:</text:p>
      <text:p text:style-name="P66">data['Order Date'] = pd.to_datetime(data['Order Date'])</text:p>
      <text:p text:style-name="P66">Purpose:</text:p>
      <text:p text:style-name="P66">Converts text into date format.</text:p>
      <text:h text:style-name="P60" text:outline-level="1">9.8 Exploratory Data Analysis</text:h>
      <text:p text:style-name="P66">Exploratory Data Analysis commonly known as EDA helps analysts understand patterns, trends, and relationships in the dataset.</text:p>
      <text:p text:style-name="P66">EDA helps:</text:p>
      <text:list text:style-name="L243">
        <text:list-item>
          <text:p text:style-name="P539">Understand customer behavior</text:p>
        </text:list-item>
        <text:list-item>
          <text:p text:style-name="P539">Identify trends</text:p>
        </text:list-item>
        <text:list-item>
          <text:p text:style-name="P539">Detect outliers</text:p>
        </text:list-item>
        <text:list-item>
          <text:p text:style-name="P539">Understand distributions</text:p>
        </text:list-item>
        <text:list-item>
          <text:p text:style-name="P540">Generate business insights</text:p>
        </text:list-item>
      </text:list>
      <text:h text:style-name="P61" text:outline-level="2">9.8.1 Checking Total Sales</text:h>
      <text:p text:style-name="P120">Python Code:</text:p>
      <text:p text:style-name="P66">print(data['Sales'].sum())</text:p>
      <text:p text:style-name="P66">Purpose:</text:p>
      <text:p text:style-name="P66"><text:soft-page-break/>Calculates total sales.</text:p>
      <text:h text:style-name="P61" text:outline-level="2">9.8.2 Checking Total Profit</text:h>
      <text:p text:style-name="P66">Python Code:</text:p>
      <text:p text:style-name="P66">print(data['Profit'].sum())</text:p>
      <text:p text:style-name="P66">Purpose:</text:p>
      <text:p text:style-name="P66">Calculates total profit.</text:p>
      <text:h text:style-name="P61" text:outline-level="2">9.8.3 Checking Total Customers</text:h>
      <text:p text:style-name="P74">Python Code:</text:p>
      <text:p text:style-name="P66">print(data['Customer ID'].nunique())</text:p>
      <text:p text:style-name="P66">Purpose:</text:p>
      <text:p text:style-name="P66">Counts unique customers.</text:p>
      <text:h text:style-name="P165" text:outline-level="1">9.9 Data Visualization Using Python</text:h>
      <text:p text:style-name="P66">Visualization helps represent analytical information graphically.</text:p>
      <text:h text:style-name="P61" text:outline-level="2">9.9.1 Bar Chart for Category Sales</text:h>
      <text:p text:style-name="P66">Python Code:</text:p>
      <text:p text:style-name="P526">category_sales = data.groupby('Category')['Sales'].sum()</text:p>
      <text:p text:style-name="P526">category_sales.plot(kind='bar')</text:p>
      <text:p text:style-name="P526">plt.title('Category Wise Sales')</text:p>
      <text:p text:style-name="P526">plt.xlabel('Category')</text:p>
      <text:p text:style-name="P526">plt.ylabel('Sales')</text:p>
      <text:p text:style-name="P66">plt.show()</text:p>
      <text:p text:style-name="P66">Purpose:</text:p>
      <text:p text:style-name="P66">Displays category wise sales performance.</text:p>
      <text:h text:style-name="P61" text:outline-level="2">9.9.2 Line Chart for Monthly Sales</text:h>
      <text:p text:style-name="P74">Python Code:</text:p>
      <text:p text:style-name="P526">monthly_sales = data.groupby('Month')['Sales'].sum()</text:p>
      <text:p text:style-name="P526">monthly_sales.plot(kind='line')</text:p>
      <text:p text:style-name="P526">plt.title('Monthly Sales Trend')</text:p>
      <text:p text:style-name="P66">plt.show()</text:p>
      <text:p text:style-name="P66">Purpose:</text:p>
      <text:p text:style-name="P66">Displays monthly sales trends.</text:p>
      <text:h text:style-name="P61" text:outline-level="2">9.9.3 Pie Chart for Regional Sales</text:h>
      <text:p text:style-name="P66">Python Code:</text:p>
      <text:p text:style-name="P526"><text:soft-page-break/>regionalises = data.groupby('Region')['Sales'].sum()</text:p>
      <text:p text:style-name="P526">region_sales.plot(kind='pie', autopct='%1.1f%%')</text:p>
      <text:p text:style-name="P526">plt.title('Region Wise Sales')</text:p>
      <text:p text:style-name="P66">plt.show()</text:p>
      <text:p text:style-name="P66">Purpose:</text:p>
      <text:p text:style-name="P66">Displays regional sales distribution.</text:p>
      <text:h text:style-name="P61" text:outline-level="2">9.9.4 Histogram for Sales Distribution</text:h>
      <text:p text:style-name="P66">Python Code:</text:p>
      <text:p text:style-name="P526">plt.hist(data['Sales'])</text:p>
      <text:p text:style-name="P526">plt.title('Sales Distribution')</text:p>
      <text:p text:style-name="P66">plt.show()</text:p>
      <text:p text:style-name="P66">Purpose:</text:p>
      <text:p text:style-name="P66">Analyses sales distribution.</text:p>
      <text:h text:style-name="P60" text:outline-level="1">9.10 RFM Analysis Using Python</text:h>
      <text:p text:style-name="P66">Python is used to calculate customer segmentation metrics.</text:p>
      <text:h text:style-name="P141" text:outline-level="2">9.10.1 Creating Analysis Date</text:h>
      <text:p text:style-name="P66">Python Code:</text:p>
      <text:p text:style-name="P66">analysis_date = data['Order Date'].max()</text:p>
      <text:p text:style-name="P66">Purpose:</text:p>
      <text:p text:style-name="P66">Defines reference date for Recency calculation.</text:p>
      <text:h text:style-name="P61" text:outline-level="2">9.10.2 Creating RFM Table</text:h>
      <text:p text:style-name="P120">Python Code:</text:p>
      <text:p text:style-name="P526">rfm = data.groupby('Customer ID').agg({</text:p>
      <text:p text:style-name="P526">'Order Date': lambda x: (analysis_date - x.max()).days,</text:p>
      <text:p text:style-name="P526">'Order ID': 'count',</text:p>
      <text:p text:style-name="P526">'Sales': 'sum'</text:p>
      <text:p text:style-name="P66">})</text:p>
      <text:p text:style-name="P66">Purpose:</text:p>
      <text:p text:style-name="P66">Calculates Recency, Frequency, and Monetary values.</text:p>
      <text:h text:style-name="P61" text:outline-level="2">9.10.3 Renaming Columns</text:h>
      <text:p text:style-name="P120">Python Code:</text:p>
      <text:p text:style-name="P66">rfm.columns = ['Recency', 'Frequency', 'Monetary']</text:p>
      <text:p text:style-name="P66">Purpose:</text:p>
      <text:p text:style-name="P66">Assigns proper metric names.</text:p>
      <text:h text:style-name="P113" text:outline-level="1"><text:soft-page-break/>9<text:span text:style-name="T12">.11 RFM Scoring Using Python</text:span></text:h>
      <text:p text:style-name="P66">RFM scores classify customers into ranking groups.</text:p>
      <text:h text:style-name="P141" text:outline-level="2">9.11.1 Recency Scoring</text:h>
      <text:p text:style-name="P66">Python Code:</text:p>
      <text:p text:style-name="P66">rfm['R_Score'] = pd.qcut(rfm['Recency'], 5, labels=[5,4,3,2,1])</text:p>
      <text:p text:style-name="P66">Purpose:</text:p>
      <text:p text:style-name="P66">Assigns Recency scores.</text:p>
      <text:h text:style-name="P141" text:outline-level="2">9.11.2 Frequency Scoring</text:h>
      <text:p text:style-name="P66">Python Code:</text:p>
      <text:p text:style-name="P66">rfm['F_Score'] = pd.qcut(rfm['Frequency'].rank(method='first'), 5, labels=[1,2,3,4,5])</text:p>
      <text:p text:style-name="P66">Purpose:</text:p>
      <text:p text:style-name="P66">Assigns Frequency scores.</text:p>
      <text:h text:style-name="P61" text:outline-level="2">9.11.3 Monetary Scoring</text:h>
      <text:p text:style-name="P66">Python Code:</text:p>
      <text:p text:style-name="P66">rfm['M_Score'] = pd.qcut(rfm['Monetary'], 5, labels=[1,2,3,4,5])</text:p>
      <text:p text:style-name="P66">Purpose:</text:p>
      <text:p text:style-name="P66">Assigns Monetary scores.</text:p>
      <text:h text:style-name="P60" text:outline-level="1">9.12 Creating Final RFM Score</text:h>
      <text:p text:style-name="P66">Final RFM score is generated by combining scores.</text:p>
      <text:p text:style-name="P66">Formula:</text:p>
      <text:p text:style-name="P66">genui{"math_block_widget_always_prefetch_v2":{"content":"RFM\ Score = R + F + M"}}</text:p>
      <text:h text:style-name="P141" text:outline-level="2">9.12.1 Python Code for Final Score</text:h>
      <text:p text:style-name="P526">rfm['RFM_Score'] = rfm['R_Score'].astype(str) + \</text:p>
      <text:p text:style-name="P526">rfm['F_Score'].astype(str) + \</text:p>
      <text:p text:style-name="P66">rfm['M_Score'].astype(str)</text:p>
      <text:p text:style-name="P66">Purpose:</text:p>
      <text:p text:style-name="P66">Creates final segmentation score.</text:p>
      <text:h text:style-name="P60" text:outline-level="1">9.13 Customer Segmentation Using Python</text:h>
      <text:p text:style-name="P66">Customers are segmented based on RFM scores.</text:p>
      <text:h text:style-name="P141" text:outline-level="2">9.13.1 Premium Customers</text:h>
      <text:p text:style-name="P66">Characteristics:</text:p>
      <text:list text:style-name="L244">
        <text:list-item>
          <text:p text:style-name="P541">High Recency score</text:p>
        </text:list-item>
        <text:list-item>
          <text:p text:style-name="P541"><text:soft-page-break/>High Frequency score</text:p>
        </text:list-item>
        <text:list-item>
          <text:p text:style-name="P542">High Monetary score</text:p>
        </text:list-item>
      </text:list>
      <text:h text:style-name="P61" text:outline-level="2">9.13.2 Loyal Customers</text:h>
      <text:p text:style-name="P66">Characteristics:</text:p>
      <text:list text:style-name="L245">
        <text:list-item>
          <text:p text:style-name="P543">Frequent purchases</text:p>
        </text:list-item>
        <text:list-item>
          <text:p text:style-name="P544">Moderate to high spending</text:p>
        </text:list-item>
      </text:list>
      <text:h text:style-name="P141" text:outline-level="2">9.13.3 At Risk Customers</text:h>
      <text:p text:style-name="P66">Characteristics:</text:p>
      <text:list text:style-name="L246">
        <text:list-item>
          <text:p text:style-name="P545">No recent purchases</text:p>
        </text:list-item>
        <text:list-item>
          <text:p text:style-name="P546">Reduced activity</text:p>
        </text:list-item>
      </text:list>
      <text:h text:style-name="P141" text:outline-level="2">9.13.4 Lost Customers</text:h>
      <text:p text:style-name="P66">Characteristics:</text:p>
      <text:list text:style-name="L247">
        <text:list-item>
          <text:p text:style-name="P547">Inactive customers</text:p>
        </text:list-item>
        <text:list-item>
          <text:p text:style-name="P548">Low engagement</text:p>
        </text:list-item>
      </text:list>
      <text:h text:style-name="P60" text:outline-level="1">9.14 Creating Customer Segments Using Conditions</text:h>
      <text:p text:style-name="P74">Python Code:</text:p>
      <text:p text:style-name="P526">def customer_segment(df):</text:p>
      <text:p text:style-name="P526">if df['RFM_Score'] == '555':</text:p>
      <text:p text:style-name="P526">return 'Premium Customer'</text:p>
      <text:p text:style-name="P526">elif df['F_Score'] == 5:</text:p>
      <text:p text:style-name="P526">return 'Loyal Customer'</text:p>
      <text:p text:style-name="P526">else:</text:p>
      <text:p text:style-name="P66">return 'Regular Customer'</text:p>
      <text:p text:style-name="P66">Purpose:</text:p>
      <text:p text:style-name="P66">Classifies customers into segments.</text:p>
      <text:h text:style-name="P60" text:outline-level="1">9.15 Exporting RFM Dataset</text:h>
      <text:p text:style-name="P66">The transformed RFM dataset is exported for dashboard development.</text:p>
      <text:h text:style-name="P141" text:outline-level="2">9.15.1 Exporting CSV File</text:h>
      <text:p text:style-name="P66">Python Code:</text:p>
      <text:p text:style-name="P66">rfm.to_csv('RFM_Customers.csv')</text:p>
      <text:p text:style-name="P66">Purpose:</text:p>
      <text:p text:style-name="P66">Exports customer segmentation dataset.</text:p>
      <text:h text:style-name="P165" text:outline-level="1">9.16 Python Integration with Power BI</text:h>
      <text:p text:style-name="P66">Python outputs are imported into Power BI dashboards.</text:p>
      <text:p text:style-name="P66"><text:soft-page-break/>Benefits include:</text:p>
      <text:list text:style-name="L248">
        <text:list-item>
          <text:p text:style-name="P549">Faster visualization</text:p>
        </text:list-item>
        <text:list-item>
          <text:p text:style-name="P549">Better preprocessing</text:p>
        </text:list-item>
        <text:list-item>
          <text:p text:style-name="P549">Automated calculations</text:p>
        </text:list-item>
        <text:list-item>
          <text:p text:style-name="P550">Advanced analytics</text:p>
        </text:list-item>
      </text:list>
      <text:h text:style-name="P60" text:outline-level="1">9.17 Advantages of Python in the Project</text:h>
      <text:list text:style-name="L249">
        <text:list-item>
          <text:p text:style-name="P551">Easy data preprocessing</text:p>
        </text:list-item>
        <text:list-item>
          <text:p text:style-name="P551">Powerful analytical capabilities</text:p>
        </text:list-item>
        <text:list-item>
          <text:p text:style-name="P551">Advanced visualization support</text:p>
        </text:list-item>
        <text:list-item>
          <text:p text:style-name="P551">Automation capabilities</text:p>
        </text:list-item>
        <text:list-item>
          <text:p text:style-name="P551">Open source environment</text:p>
        </text:list-item>
        <text:list-item>
          <text:p text:style-name="P551">Supports large datasets</text:p>
        </text:list-item>
        <text:list-item>
          <text:p text:style-name="P552">Flexible programming structure</text:p>
        </text:list-item>
      </text:list>
      <text:h text:style-name="P113" text:outline-level="1"><text:span text:style-name="T12">9.18 Challenges Faced During Python Implementatio</text:span>n</text:h>
      <text:p text:style-name="P66">Several challenges occurred during implementation.</text:p>
      <text:h text:style-name="P141" text:outline-level="2">Missing Values</text:h>
      <text:p text:style-name="P66">Null records affected calculations.</text:p>
      <text:h text:style-name="P141" text:outline-level="2">Incorrect Data Types</text:h>
      <text:p text:style-name="P66">Date formatting issues caused errors.</text:p>
      <text:h text:style-name="P141" text:outline-level="2">Duplicate Records</text:h>
      <text:p text:style-name="P66">Duplicates affected customer counts.</text:p>
      <text:h text:style-name="P141" text:outline-level="2">Large Dataset Processing</text:h>
      <text:p text:style-name="P66">Large datasets required optimization.</text:p>
      <text:p text:style-name="P66">These challenges were solved using preprocessing techniques.</text:p>
      <text:h text:style-name="P60" text:outline-level="1">9.19 Business Insights Generated Using Python</text:h>
      <text:p text:style-name="P66">Python analysis generated several insights.</text:p>
      <text:p text:style-name="P66">Insights include:</text:p>
      <text:list text:style-name="L250">
        <text:list-item>
          <text:p text:style-name="P553">Top customers</text:p>
        </text:list-item>
        <text:list-item>
          <text:p text:style-name="P553">High profit categories</text:p>
        </text:list-item>
        <text:list-item>
          <text:p text:style-name="P553">Regional sales performance</text:p>
        </text:list-item>
        <text:list-item>
          <text:p text:style-name="P553">Customer purchase trends</text:p>
        </text:list-item>
        <text:list-item>
          <text:p text:style-name="P553">Sales distribution</text:p>
        </text:list-item>
        <text:list-item>
          <text:p text:style-name="P554">Customer segments</text:p>
        </text:list-item>
      </text:list>
      <text:p text:style-name="P66">These insights support business decision making.</text:p>
      <text:h text:style-name="P60" text:outline-level="1">9.20 Role of Python in RFM Analysis</text:h>
      <text:p text:style-name="P66">Python provides strong support for customer segmentation.</text:p>
      <text:p text:style-name="P66"><text:soft-page-break/>Python helps:</text:p>
      <text:list text:style-name="L251">
        <text:list-item>
          <text:p text:style-name="P555">Calculate RFM metrics</text:p>
        </text:list-item>
        <text:list-item>
          <text:p text:style-name="P555">Automate segmentation</text:p>
        </text:list-item>
        <text:list-item>
          <text:p text:style-name="P555">Generate visualizations</text:p>
        </text:list-item>
        <text:list-item>
          <text:p text:style-name="P555">Create analytical reports</text:p>
        </text:list-item>
        <text:list-item>
          <text:p text:style-name="P556">Export transformed datasets</text:p>
        </text:list-item>
      </text:list>
      <text:p text:style-name="P66">Python improves analytical flexibility and automation.</text:p>
      <text:h text:style-name="P60" text:outline-level="1">9.21 Future Scope of Python Analytics</text:h>
      <text:p text:style-name="P66">Python can be extended for advanced analytics.</text:p>
      <text:p text:style-name="P66">Future improvements include:</text:p>
      <text:list text:style-name="L252">
        <text:list-item>
          <text:p text:style-name="P557">Machine learning models</text:p>
        </text:list-item>
        <text:list-item>
          <text:p text:style-name="P557">Customer churn prediction</text:p>
        </text:list-item>
        <text:list-item>
          <text:p text:style-name="P557">Sales forecasting</text:p>
        </text:list-item>
        <text:list-item>
          <text:p text:style-name="P557">Recommendation systems</text:p>
        </text:list-item>
        <text:list-item>
          <text:p text:style-name="P558">Real time analytics</text:p>
        </text:list-item>
      </text:list>
      <text:h text:style-name="P60" text:outline-level="1">9.22 Conclusion</text:h>
      <text:p text:style-name="P66"><text:span text:style-name="T13">This chapter explaine</text:span><text:span text:style-name="T15">d</text:span> Python implementation used in the Customer Segmentation using RFM Analysis project.</text:p>
      <text:p text:style-name="P66">The chapter discussed Python libraries, data importing, preprocessing, exploratory data analysis, visualization, RFM calculations, customer segmentation, and exporting datasets.</text:p>
      <text:p text:style-name="P66">Python provides powerful analytical capabilities that improve customer analysis, automation, visualization, and business intelligence reporting.</text:p>
      <text:p text:style-name="P66">The next chapter explains Power BI dashboard implementation including data modeling, DAX formulas, KPI cards, charts, filters, and dashboard visualization techniques.</text:p>
      <text:h text:style-name="P59" text:outline-level="1">CHAPTER 10</text:h>
      <text:h text:style-name="P59" text:outline-level="1">POWER BI DASHBOARD IMPLEMENTATION</text:h>
      <text:h text:style-name="P515" text:outline-level="2">10.1 Introduction</text:h>
      <text:p text:style-name="P66">Power BI is a powerful business intelligence and data visualization tool developed by Microsoft. It is widely used by organisations for dashboard development, KPI reporting, business analytics, and interactive visualization.</text:p>
      <text:p text:style-name="P66">In this project, Power BI is used to create interactive dashboards for Customer Segmentation using RFM Analysis on the Online Super Store dataset. Power BI transforms analytical data into visual insights that help management understand customer behavior, sales performance, profit trends, and customer segments.</text:p>
      <text:p text:style-name="P66">The dashboards created in this project provide:</text:p>
      <text:list text:style-name="L253">
        <text:list-item>
          <text:p text:style-name="P559">Sales analysis</text:p>
        </text:list-item>
        <text:list-item>
          <text:p text:style-name="P559"><text:soft-page-break/>Profit analysis</text:p>
        </text:list-item>
        <text:list-item>
          <text:p text:style-name="P559">Customer segmentation analysis</text:p>
        </text:list-item>
        <text:list-item>
          <text:p text:style-name="P559">Regional performance analysis</text:p>
        </text:list-item>
        <text:list-item>
          <text:p text:style-name="P559">Product category analysis</text:p>
        </text:list-item>
        <text:list-item>
          <text:p text:style-name="P559">KPI monitoring</text:p>
        </text:list-item>
        <text:list-item>
          <text:p text:style-name="P560">Trend analysis</text:p>
        </text:list-item>
      </text:list>
      <text:p text:style-name="P66">Power BI helps organizations make better business decisions using interactive reports and visual storytelling.</text:p>
      <text:p text:style-name="P66">This chapter explains the complete Power BI implementation process including data import, data modelling, DAX calculations, dashboard creation, visualizations, KPI cards, slicers, and analytical reporting.</text:p>
      <text:p text:style-name="P217"/>
      <text:h text:style-name="P165" text:outline-level="1">10.2 Importance of Power BI in Business Analytics</text:h>
      <text:p text:style-name="P66">Business organizations generate large amounts of transactional data daily. Raw data is difficult to understand without proper visualization.</text:p>
      <text:p text:style-name="P66">Power BI provides:</text:p>
      <text:list text:style-name="L254">
        <text:list-item>
          <text:p text:style-name="P561">Interactive dashboards</text:p>
        </text:list-item>
        <text:list-item>
          <text:p text:style-name="P561">Real time reporting</text:p>
        </text:list-item>
        <text:list-item>
          <text:p text:style-name="P561">Data visualization</text:p>
        </text:list-item>
        <text:list-item>
          <text:p text:style-name="P561">KPI monitoring</text:p>
        </text:list-item>
        <text:list-item>
          <text:p text:style-name="P561">Business intelligence reporting</text:p>
        </text:list-item>
        <text:list-item>
          <text:p text:style-name="P561">Easy data analysis</text:p>
        </text:list-item>
        <text:list-item>
          <text:p text:style-name="P561">Executive decision support</text:p>
        </text:list-item>
        <text:list-item>
          <text:p text:style-name="P562">Advanced analytical capabilities</text:p>
        </text:list-item>
      </text:list>
      <text:p text:style-name="P66">Power BI converts complex data into easy to understand visual reports.</text:p>
      <text:p text:style-name="P217"/>
      <text:h text:style-name="P60" text:outline-level="1">10.3 Features of Power BI</text:h>
      <text:p text:style-name="P280">Power BI provides several important features.</text:p>
      <text:h text:style-name="P141" text:outline-level="2">Interactive Visualizations</text:h>
      <text:p text:style-name="P280">Users can interact with charts and reports.</text:p>
      <text:h text:style-name="P141" text:outline-level="2">Real Time Dashboards</text:h>
      <text:p text:style-name="P280">Reports can display live business data.</text:p>
      <text:h text:style-name="P141" text:outline-level="2">DAX Calculations</text:h>
      <text:p text:style-name="P280">Power BI supports advanced calculations.</text:p>
      <text:h text:style-name="P141" text:outline-level="2">Data Modelling</text:h>
      <text:p text:style-name="P66"><text:span text:style-name="T21">Relationships can be created between table</text:span>s.</text:p>
      <text:h text:style-name="P141" text:outline-level="2"><text:soft-page-break/>Data Transformation</text:h>
      <text:p text:style-name="P66">Power Query supports preprocessing.</text:p>
      <text:h text:style-name="P141" text:outline-level="2">Cloud Integration</text:h>
      <text:p text:style-name="P66">Supports online reporting and sharing.</text:p>
      <text:h text:style-name="P165" text:outline-level="1">1<text:span text:style-name="T13">0.4 Power BI Workflow in the Project</text:span></text:h>
      <text:p text:style-name="P66">The workflow used in the project includes:</text:p>
      <text:h text:style-name="P141" text:outline-level="2">Step 1</text:h>
      <text:p text:style-name="P66">Importing transformed datasets.</text:p>
      <text:h text:style-name="P141" text:outline-level="2">Step 2</text:h>
      <text:p text:style-name="P66">Creating relationships.</text:p>
      <text:h text:style-name="P141" text:outline-level="2">Step 3</text:h>
      <text:p text:style-name="P66">Building star schema model.</text:p>
      <text:h text:style-name="P141" text:outline-level="2">Step 4</text:h>
      <text:p text:style-name="P66">Creating DAX measures.</text:p>
      <text:h text:style-name="P141" text:outline-level="2">Step 5</text:h>
      <text:p text:style-name="P66">Designing dashboards.</text:p>
      <text:h text:style-name="P141" text:outline-level="2">Step 6</text:h>
      <text:p text:style-name="P66">Adding visualizations.</text:p>
      <text:h text:style-name="P141" text:outline-level="2">Step 7</text:h>
      <text:p text:style-name="P66">Creating slicers and filters.</text:p>
      <text:h text:style-name="P141" text:outline-level="2">Step 8</text:h>
      <text:p text:style-name="P66">Generating business insights.</text:p>
      <text:h text:style-name="P60" text:outline-level="1">10.5 Importing Data into Power BI</text:h>
      <text:p text:style-name="P66">The transformed datasets are imported into Power BI.</text:p>
      <text:p text:style-name="P66">Supported formats include:</text:p>
      <text:list text:style-name="L255">
        <text:list-item>
          <text:p text:style-name="P563">CSV files</text:p>
        </text:list-item>
        <text:list-item>
          <text:p text:style-name="P563">Excel files</text:p>
        </text:list-item>
        <text:list-item>
          <text:p text:style-name="P564">SQL databases</text:p>
        </text:list-item>
      </text:list>
      <text:h text:style-name="P141" text:outline-level="2">10.5.1 Importing CSV Dataset</text:h>
      <text:p text:style-name="P66">Steps:</text:p>
      <text:list text:style-name="L256">
        <text:list-item>
          <text:p text:style-name="P565">Open Power BI Desktop</text:p>
        </text:list-item>
        <text:list-item>
          <text:p text:style-name="P565">Click Get Data</text:p>
        </text:list-item>
        <text:list-item>
          <text:p text:style-name="P565">Select CSV</text:p>
        </text:list-item>
        <text:list-item>
          <text:p text:style-name="P565"><text:soft-page-break/>Choose dataset file</text:p>
        </text:list-item>
        <text:list-item>
          <text:p text:style-name="P566">Load data</text:p>
        </text:list-item>
      </text:list>
      <text:p text:style-name="P66">Purpose:</text:p>
      <text:p text:style-name="P66">Imports transformed analytical datasets.</text:p>
      <text:h text:style-name="P61" text:outline-level="2">10.5.2 Importing SQL Database</text:h>
      <text:p text:style-name="P74">Steps:</text:p>
      <text:list text:style-name="L257">
        <text:list-item>
          <text:p text:style-name="P567">Click Get Data</text:p>
        </text:list-item>
        <text:list-item>
          <text:p text:style-name="P567">Select SQL Server</text:p>
        </text:list-item>
        <text:list-item>
          <text:p text:style-name="P567">Enter server details</text:p>
        </text:list-item>
        <text:list-item>
          <text:p text:style-name="P568">Load tables</text:p>
        </text:list-item>
      </text:list>
      <text:p text:style-name="P66">Purpose:</text:p>
      <text:p text:style-name="P66">Connects SQL database with Power BI.</text:p>
      <text:h text:style-name="P165" text:outline-level="1">10.6 Power Query Editor</text:h>
      <text:p text:style-name="P66">Power Query Editor is used for data transformation inside Power BI.</text:p>
      <text:p text:style-name="P66">Features include:</text:p>
      <text:list text:style-name="L258">
        <text:list-item>
          <text:p text:style-name="P569">Removing null values</text:p>
        </text:list-item>
        <text:list-item>
          <text:p text:style-name="P569">Splitting columns</text:p>
        </text:list-item>
        <text:list-item>
          <text:p text:style-name="P569">Merging tables</text:p>
        </text:list-item>
        <text:list-item>
          <text:p text:style-name="P569">Changing data types</text:p>
        </text:list-item>
        <text:list-item>
          <text:p text:style-name="P569">Filtering records</text:p>
        </text:list-item>
        <text:list-item>
          <text:p text:style-name="P570">Creating calculated columns</text:p>
        </text:list-item>
      </text:list>
      <text:h text:style-name="P571" text:outline-level="2"><text:span text:style-name="T12">10.6.1 Changing Data Ty</text:span>pes</text:h>
      <text:p text:style-name="P120">Examples:</text:p>
      <text:list text:style-name="L259">
        <text:list-item>
          <text:p text:style-name="P572">Converting dates</text:p>
        </text:list-item>
        <text:list-item>
          <text:p text:style-name="P572">Converting sales into decimal values</text:p>
        </text:list-item>
        <text:list-item>
          <text:p text:style-name="P573">Formatting text columns</text:p>
        </text:list-item>
      </text:list>
      <text:p text:style-name="P66">Purpose:</text:p>
      <text:p text:style-name="P66">Improves analytical accuracy.</text:p>
      <text:h text:style-name="P141" text:outline-level="2">10.6.2 Removing Unwanted Columns</text:h>
      <text:p text:style-name="P66">Purpose:</text:p>
      <text:list text:style-name="L260">
        <text:list-item>
          <text:p text:style-name="P574">Reduces memory usage</text:p>
        </text:list-item>
        <text:list-item>
          <text:p text:style-name="P574">Improves dashboard performance</text:p>
        </text:list-item>
        <text:list-item>
          <text:p text:style-name="P575">Simplifies reporting</text:p>
        </text:list-item>
      </text:list>
      <text:h text:style-name="P165" text:outline-level="1">10.7 Data Modelling in Power BI</text:h>
      <text:p text:style-name="P66">Data modelling organises datasets into relationships.</text:p>
      <text:p text:style-name="P66"><text:soft-page-break/>The project uses star schema modelling.</text:p>
      <text:p text:style-name="P66">The model contains:</text:p>
      <text:list text:style-name="L261">
        <text:list-item>
          <text:p text:style-name="P576">Fact table</text:p>
        </text:list-item>
        <text:list-item>
          <text:p text:style-name="P576">Customer dimension</text:p>
        </text:list-item>
        <text:list-item>
          <text:p text:style-name="P576">Product dimension</text:p>
        </text:list-item>
        <text:list-item>
          <text:p text:style-name="P576">Date dimension</text:p>
        </text:list-item>
        <text:list-item>
          <text:p text:style-name="P576">Region dimension</text:p>
        </text:list-item>
        <text:list-item>
          <text:p text:style-name="P577">Shipping dimension</text:p>
        </text:list-item>
      </text:list>
      <text:h text:style-name="P61" text:outline-level="2">10.7.1 Building Relationships</text:h>
      <text:p text:style-name="P66">Relationships are created using:</text:p>
      <text:list text:style-name="L262">
        <text:list-item>
          <text:p text:style-name="P578">Primary keys</text:p>
        </text:list-item>
      </text:list>
      <text:p text:style-name="P1"><text:span text:style-name="Strong_20_Emphasis"><text:span text:style-name="T4">Primary keys</text:span></text:span></text:p>
      <text:list text:style-name="L263">
        <text:list-item>
          <text:p text:style-name="P579">Foreign keys</text:p>
        </text:list-item>
      </text:list>
      <text:p text:style-name="P66">Example:</text:p>
      <text:p text:style-name="P66">Customer_ID connects Fact_Sales and Dim_Customer.</text:p>
      <text:h text:style-name="P61" text:outline-level="2">10.7.2 Relationship Types</text:h>
      <text:p text:style-name="P66">Types include:</text:p>
      <text:list text:style-name="L264">
        <text:list-item>
          <text:p text:style-name="P580">One to many</text:p>
        </text:list-item>
        <text:list-item>
          <text:p text:style-name="P580">Many to one</text:p>
        </text:list-item>
        <text:list-item>
          <text:p text:style-name="P581">One to one</text:p>
        </text:list-item>
      </text:list>
      <text:p text:style-name="P66">The project mainly uses one to many relationships.</text:p>
      <text:h text:style-name="P60" text:outline-level="1">10.8 DAX in Power BI</text:h>
      <text:p text:style-name="P66">DAX stands for Data Analysis Expressions.</text:p>
      <text:p text:style-name="P66">DAX is used for:</text:p>
      <text:list text:style-name="L265">
        <text:list-item>
          <text:p text:style-name="P582">Calculated measures</text:p>
        </text:list-item>
        <text:list-item>
          <text:p text:style-name="P582">KPI calculations</text:p>
        </text:list-item>
        <text:list-item>
          <text:p text:style-name="P582">Aggregations</text:p>
        </text:list-item>
        <text:list-item>
          <text:p text:style-name="P582">Time intelligence</text:p>
        </text:list-item>
        <text:list-item>
          <text:p text:style-name="P583">Conditional calculations</text:p>
        </text:list-item>
      </text:list>
      <text:h text:style-name="P60" text:outline-level="1">10.9 DAX Measures Used in the Project</text:h>
      <text:p text:style-name="P66">Several DAX formulas are used in the dashboard.</text:p>
      <text:h text:style-name="P141" text:outline-level="2">10.9.1 Total Sales Measure</text:h>
      <text:p text:style-name="P66">DAX Formula:</text:p>
      <text:p text:style-name="P66">Total Sales = SUM(Fact_Sales[Sales])</text:p>
      <text:p text:style-name="P66">Purpose:</text:p>
      <text:p text:style-name="P66"><text:soft-page-break/>Calculates total revenue.</text:p>
      <text:h text:style-name="P61" text:outline-level="2">10.9.2 Total Profit Measure</text:h>
      <text:p text:style-name="P66">DAX Formula:</text:p>
      <text:p text:style-name="P66">Total Profit = SUM(Fact_Sales[Profit])</text:p>
      <text:p text:style-name="P66">Purpose:</text:p>
      <text:p text:style-name="P66">Calculates total profit.</text:p>
      <text:h text:style-name="P61" text:outline-level="2">10.9.3 Total Customers Measure</text:h>
      <text:p text:style-name="P66">DAX Formula:</text:p>
      <text:p text:style-name="P66">Total Customers = DISTINCTCOUNT(Fact_Sales[Customer_ID])</text:p>
      <text:p text:style-name="P66">Purpose:</text:p>
      <text:p text:style-name="P66">Counts unique customers.</text:p>
      <text:h text:style-name="P61" text:outline-level="2">10.9.4 Average Sales Measure</text:h>
      <text:p text:style-name="P66">DAX Formula:</text:p>
      <text:p text:style-name="P66">Average Sales = AVERAGE(Fact_Sales[Sales])</text:p>
      <text:p text:style-name="P66">Purpose:</text:p>
      <text:p text:style-name="P66">Calculates average sales.</text:p>
      <text:h text:style-name="P141" text:outline-level="2">10.9.5 Profit Margin Measure</text:h>
      <text:p text:style-name="P66">Formula:</text:p>
      <text:p text:style-name="P66">genui{"math_block_widget_always_prefetch_v2":{"content":"Profit\ Margin = </text:p>
      <text:p text:style-name="P584">rac{Profit}{Sales} imes 100"}}</text:p>
      <text:p text:style-name="P66">DAX Formula:</text:p>
      <text:p text:style-name="P66">Profit Margin = DIVIDE([Total Profit], [Total Sales]) * 100</text:p>
      <text:p text:style-name="P66">Purpose:</text:p>
      <text:p text:style-name="P66">Measures business profitability.</text:p>
      <text:h text:style-name="P60" text:outline-level="1">10.10 KPI Cards in Dashboard</text:h>
      <text:p text:style-name="P66">KPI cards display important business metrics.</text:p>
      <text:p text:style-name="P66">The project uses KPI cards for:</text:p>
      <text:list text:style-name="L266">
        <text:list-item>
          <text:p text:style-name="P585">Total Sales</text:p>
        </text:list-item>
        <text:list-item>
          <text:p text:style-name="P585">Total Profit</text:p>
        </text:list-item>
        <text:list-item>
          <text:p text:style-name="P585">Total Customers</text:p>
        </text:list-item>
        <text:list-item>
          <text:p text:style-name="P585">Average Sales</text:p>
        </text:list-item>
        <text:list-item>
          <text:p text:style-name="P585">Average Profit</text:p>
        </text:list-item>
        <text:list-item>
          <text:p text:style-name="P586">Total Orders</text:p>
        </text:list-item>
      </text:list>
      <text:p text:style-name="P66">KPI cards provide quick business summaries.</text:p>
      <text:h text:style-name="P60" text:outline-level="1">10.11 Charts Used in the Dashboard</text:h>
      <text:p text:style-name="P66">Several charts are used to visualize business insights.</text:p>
      <text:h text:style-name="P61" text:outline-level="2">10.11.1 Bar Chart</text:h>
      <text:p text:style-name="P66">Purpose:</text:p>
      <text:list text:style-name="L267">
        <text:list-item>
          <text:p text:style-name="P587">Category wise sales analysis</text:p>
        </text:list-item>
        <text:list-item>
          <text:p text:style-name="P587">Product comparison</text:p>
        </text:list-item>
        <text:list-item>
          <text:p text:style-name="P588">Customer comparison</text:p>
        </text:list-item>
      </text:list>
      <text:p text:style-name="P66">Example:</text:p>
      <text:p text:style-name="P66">Sales by Category.</text:p>
      <text:h text:style-name="P571" text:outline-level="2">10.11.2 Line Chart</text:h>
      <text:p text:style-name="P120">Purpose:</text:p>
      <text:list text:style-name="L268">
        <text:list-item>
          <text:p text:style-name="P589">Monthly sales trends</text:p>
        </text:list-item>
        <text:list-item>
          <text:p text:style-name="P589">Yearly trends</text:p>
        </text:list-item>
        <text:list-item>
          <text:p text:style-name="P590">Time based analysis</text:p>
        </text:list-item>
      </text:list>
      <text:p text:style-name="P66">Example:</text:p>
      <text:p text:style-name="P66">Monthly Sales Trend.</text:p>
      <text:h text:style-name="P141" text:outline-level="2">10.11.3 Pie Chart</text:h>
      <text:p text:style-name="P66">Purpose:</text:p>
      <text:list text:style-name="L269">
        <text:list-item>
          <text:p text:style-name="P591">Regional sales distribution</text:p>
        </text:list-item>
        <text:list-item>
          <text:p text:style-name="P592"><text:soft-page-break/>Customer segment analysis</text:p>
        </text:list-item>
      </text:list>
      <text:p text:style-name="P66">Example:</text:p>
      <text:p text:style-name="P66">Region Wise Sales.</text:p>
      <text:h text:style-name="P141" text:outline-level="2">10.11.4 Scatter Chart</text:h>
      <text:p text:style-name="P66">Purpose:</text:p>
      <text:list text:style-name="L270">
        <text:list-item>
          <text:p text:style-name="P593">Customer segmentation analysis</text:p>
        </text:list-item>
        <text:list-item>
          <text:p text:style-name="P594">Sales versus profit analysis</text:p>
        </text:list-item>
      </text:list>
      <text:p text:style-name="P66">Example:</text:p>
      <text:p text:style-name="P66">Frequency versus Monetary Value.</text:p>
      <text:h text:style-name="P15" text:outline-level="2">10.11.5 Tree-map</text:h>
      <text:p text:style-name="P66">Purpose:</text:p>
      <text:list text:style-name="L271">
        <text:list-item>
          <text:p text:style-name="P595">Product category analysis</text:p>
        </text:list-item>
        <text:list-item>
          <text:p text:style-name="P596">Sales contribution analysis</text:p>
        </text:list-item>
      </text:list>
      <text:p text:style-name="P66">Example:</text:p>
      <text:p text:style-name="P66">Sales Contribution by Sub Category.</text:p>
      <text:h text:style-name="P61" text:outline-level="2">10.11.6 Donut Chart</text:h>
      <text:p text:style-name="P66">Purpose:</text:p>
      <text:p text:style-name="P66">Displays percentage contribution.</text:p>
      <text:p text:style-name="P66">Example:</text:p>
      <text:p text:style-name="P66">Customer Segment Distribution.</text:p>
      <text:h text:style-name="P60" text:outline-level="1">10.12 RFM Dashboard Implementation</text:h>
      <text:p text:style-name="P66">The RFM dashboard visualizes customer segmentation.</text:p>
      <text:p text:style-name="P66">The dashboard contains:</text:p>
      <text:list text:style-name="L272">
        <text:list-item>
          <text:p text:style-name="P597">RFM customer segments</text:p>
        </text:list-item>
        <text:list-item>
          <text:p text:style-name="P597">Customer counts</text:p>
        </text:list-item>
        <text:list-item>
          <text:p text:style-name="P597">Customer profitability</text:p>
        </text:list-item>
        <text:list-item>
          <text:p text:style-name="P597">Customer contribution</text:p>
        </text:list-item>
        <text:list-item>
          <text:p text:style-name="P597">High value customers</text:p>
        </text:list-item>
        <text:list-item>
          <text:p text:style-name="P598">At risk customers</text:p>
        </text:list-item>
      </text:list>
      <text:h text:style-name="P61" text:outline-level="2">10.12.1 Customer Segment Visualization</text:h>
      <text:p text:style-name="P66">Segments displayed include:</text:p>
      <text:list text:style-name="L273">
        <text:list-item>
          <text:p text:style-name="P599">Premium Customers</text:p>
        </text:list-item>
        <text:list-item>
          <text:p text:style-name="P599">Loyal Customers</text:p>
        </text:list-item>
        <text:list-item>
          <text:p text:style-name="P599">Potential Customers</text:p>
        </text:list-item>
        <text:list-item>
          <text:p text:style-name="P599"><text:soft-page-break/>At Risk Customers</text:p>
        </text:list-item>
        <text:list-item>
          <text:p text:style-name="P600">Lost Customers</text:p>
        </text:list-item>
      </text:list>
      <text:p text:style-name="P66">Purpose:</text:p>
      <text:p text:style-name="P66">Improves customer analysis.</text:p>
      <text:h text:style-name="P14" text:outline-level="1">10.13 Slicers and Filters</text:h>
      <text:p text:style-name="P66">Slicers improve dashboard interactivity.</text:p>
      <text:p text:style-name="P66">Slicers used include:</text:p>
      <text:list text:style-name="L274">
        <text:list-item>
          <text:p text:style-name="P601">Region slicer</text:p>
        </text:list-item>
        <text:list-item>
          <text:p text:style-name="P601">Category slicer</text:p>
        </text:list-item>
        <text:list-item>
          <text:p text:style-name="P601">Segment slicer</text:p>
        </text:list-item>
        <text:list-item>
          <text:p text:style-name="P602">Date slicer</text:p>
        </text:list-item>
      </text:list>
      <text:p text:style-name="P66">Benefits:</text:p>
      <text:list text:style-name="L275">
        <text:list-item>
          <text:p text:style-name="P603">Dynamic filtering</text:p>
        </text:list-item>
        <text:list-item>
          <text:p text:style-name="P603">Interactive analysis</text:p>
        </text:list-item>
        <text:list-item>
          <text:p text:style-name="P604">Better reporting experience</text:p>
        </text:list-item>
      </text:list>
      <text:h text:style-name="P60" text:outline-level="1">10.14 Drill Through Features</text:h>
      <text:p text:style-name="P66">Drill through allows users to view detailed information.</text:p>
      <text:p text:style-name="P66">Examples:</text:p>
      <text:list text:style-name="L276">
        <text:list-item>
          <text:p text:style-name="P605">Product level analysis</text:p>
        </text:list-item>
        <text:list-item>
          <text:p text:style-name="P605">Customer level analysis</text:p>
        </text:list-item>
        <text:list-item>
          <text:p text:style-name="P606">Region level reporting</text:p>
        </text:list-item>
      </text:list>
      <text:p text:style-name="P66">Purpose:</text:p>
      <text:p text:style-name="P66">Supports detailed business investigation.</text:p>
      <text:h text:style-name="P60" text:outline-level="1">10.15 Conditional Formatting</text:h>
      <text:p text:style-name="P66">Conditional formatting highlights important business metrics.</text:p>
      <text:p text:style-name="P66">Examples:</text:p>
      <text:list text:style-name="L277">
        <text:list-item>
          <text:p text:style-name="P607">High profit values</text:p>
        </text:list-item>
        <text:list-item>
          <text:p text:style-name="P607">Low sales values</text:p>
        </text:list-item>
        <text:list-item>
          <text:p text:style-name="P608">Negative profit indicators</text:p>
        </text:list-item>
      </text:list>
      <text:p text:style-name="P66">Purpose:</text:p>
      <text:p text:style-name="P66">Improves dashboard readability.</text:p>
      <text:h text:style-name="P60" text:outline-level="1">10.16 Dashboard Design Principles</text:h>
      <text:p text:style-name="P66">Professional dashboard design improves user experience.</text:p>
      <text:p text:style-name="P66">Principles include:</text:p>
      <text:list text:style-name="L278">
        <text:list-item>
          <text:p text:style-name="P609"><text:soft-page-break/>Clear layout</text:p>
        </text:list-item>
        <text:list-item>
          <text:p text:style-name="P609">Proper spacing</text:p>
        </text:list-item>
        <text:list-item>
          <text:p text:style-name="P609">Consistent formatting</text:p>
        </text:list-item>
        <text:list-item>
          <text:p text:style-name="P609">Minimal clutter</text:p>
        </text:list-item>
        <text:list-item>
          <text:p text:style-name="P609">Proper color usage</text:p>
        </text:list-item>
        <text:list-item>
          <text:p text:style-name="P610">Logical chart arrangement</text:p>
        </text:list-item>
      </text:list>
      <text:h text:style-name="P60" text:outline-level="1">10.17 Sales Dashboard</text:h>
      <text:p text:style-name="P66">The sales dashboard analyzes business revenue.</text:p>
      <text:p text:style-name="P66">Metrics include:</text:p>
      <text:list text:style-name="L279">
        <text:list-item>
          <text:p text:style-name="P611">Total Sales</text:p>
        </text:list-item>
        <text:list-item>
          <text:p text:style-name="P611">Monthly Sales</text:p>
        </text:list-item>
        <text:list-item>
          <text:p text:style-name="P611">Category Sales</text:p>
        </text:list-item>
        <text:list-item>
          <text:p text:style-name="P611">Regional Sales</text:p>
        </text:list-item>
        <text:list-item>
          <text:p text:style-name="P612">Top Products</text:p>
        </text:list-item>
      </text:list>
      <text:p text:style-name="P66">Purpose:</text:p>
      <text:p text:style-name="P66">Improves sales analysis.</text:p>
      <text:h text:style-name="P113" text:outline-level="1">1<text:span text:style-name="T12">0.18 Profit Dashboard</text:span></text:h>
      <text:p text:style-name="P66">The profit dashboard analyzes profitability.</text:p>
      <text:p text:style-name="P66">Metrics include:</text:p>
      <text:list text:style-name="L280">
        <text:list-item>
          <text:p text:style-name="P613">Total Profit</text:p>
        </text:list-item>
        <text:list-item>
          <text:p text:style-name="P613">Profit Margin</text:p>
        </text:list-item>
        <text:list-item>
          <text:p text:style-name="P613">Category Profit</text:p>
        </text:list-item>
        <text:list-item>
          <text:p text:style-name="P613">Regional Profit</text:p>
        </text:list-item>
        <text:list-item>
          <text:p text:style-name="P614">Product Profitability</text:p>
        </text:list-item>
      </text:list>
      <text:p text:style-name="P66">Purpose:</text:p>
      <text:p text:style-name="P66">Improves financial analysis.</text:p>
      <text:h text:style-name="P60" text:outline-level="1">10.19 Customer Dashboard</text:h>
      <text:p text:style-name="P66">The customer dashboard focuses on customer behavior.</text:p>
      <text:p text:style-name="P66">Metrics include:</text:p>
      <text:list text:style-name="L281">
        <text:list-item>
          <text:p text:style-name="P615">Customer Segments</text:p>
        </text:list-item>
        <text:list-item>
          <text:p text:style-name="P615">Customer Spending</text:p>
        </text:list-item>
        <text:list-item>
          <text:p text:style-name="P615">Customer Frequency</text:p>
        </text:list-item>
        <text:list-item>
          <text:p text:style-name="P615">Active Customers</text:p>
        </text:list-item>
        <text:list-item>
          <text:p text:style-name="P616">Loyal Customers</text:p>
        </text:list-item>
      </text:list>
      <text:p text:style-name="P66">Purpose:</text:p>
      <text:p text:style-name="P66">Supports customer relationship management.</text:p>
      <text:h text:style-name="P60" text:outline-level="1"><text:soft-page-break/>10.20 Business Insights Generated from Dashboard</text:h>
      <text:p text:style-name="P66">The dashboard provides several insights.</text:p>
      <text:p text:style-name="P66">Insights include:</text:p>
      <text:list text:style-name="L282">
        <text:list-item>
          <text:p text:style-name="P617">Top performing regions</text:p>
        </text:list-item>
        <text:list-item>
          <text:p text:style-name="P617">High value customers</text:p>
        </text:list-item>
        <text:list-item>
          <text:p text:style-name="P617">Most profitable categories</text:p>
        </text:list-item>
        <text:list-item>
          <text:p text:style-name="P617">Low performing products</text:p>
        </text:list-item>
        <text:list-item>
          <text:p text:style-name="P617">Customer retention trends</text:p>
        </text:list-item>
        <text:list-item>
          <text:p text:style-name="P618">Seasonal sales patterns</text:p>
        </text:list-item>
      </text:list>
      <text:p text:style-name="P66">These insights improve strategic decision making.</text:p>
      <text:h text:style-name="P60" text:outline-level="1">10.21 Advantages of Power BI in the Project</text:h>
      <text:list text:style-name="L283">
        <text:list-item>
          <text:p text:style-name="P619">Interactive visualization</text:p>
        </text:list-item>
        <text:list-item>
          <text:p text:style-name="P619">Real time reporting</text:p>
        </text:list-item>
        <text:list-item>
          <text:p text:style-name="P619">Better business insights</text:p>
        </text:list-item>
        <text:list-item>
          <text:p text:style-name="P619">User friendly interface</text:p>
        </text:list-item>
        <text:list-item>
          <text:p text:style-name="P619">Strong DAX support</text:p>
        </text:list-item>
        <text:list-item>
          <text:p text:style-name="P619">Easy SQL integration</text:p>
        </text:list-item>
        <text:list-item>
          <text:p text:style-name="P619">Faster reporting</text:p>
        </text:list-item>
        <text:list-item>
          <text:p text:style-name="P620">Professional dashboards</text:p>
        </text:list-item>
      </text:list>
      <text:h text:style-name="P60" text:outline-level="1">10.22 Challenges Faced During Dashboard Development</text:h>
      <text:p text:style-name="P66">Several challenges occurred during dashboard creation.</text:p>
      <text:h text:style-name="P141" text:outline-level="2">Data Relationship Issues</text:h>
      <text:p text:style-name="P66">Incorrect relationships affected visualizations.</text:p>
      <text:h text:style-name="P141" text:outline-level="2">Large Dataset Performance</text:h>
      <text:p text:style-name="P66">Large datasets slowed dashboard loading.</text:p>
      <text:h text:style-name="P141" text:outline-level="2">Incorrect DAX Calculations</text:h>
      <text:p text:style-name="P66">Improper formulas affected KPIs.</text:p>
      <text:h text:style-name="P141" text:outline-level="2">Visual Clutter</text:h>
      <text:p text:style-name="P66">Too many visuals reduced dashboard readability.</text:p>
      <text:p text:style-name="P66">These challenges were solved using optimised modelling and proper dashboard design.</text:p>
      <text:h text:style-name="P60" text:outline-level="1">10.23 Best Practices Followed in Dashboard Design</text:h>
      <text:list text:style-name="L284">
        <text:list-item>
          <text:p text:style-name="P621">Star schema modelling</text:p>
        </text:list-item>
        <text:list-item>
          <text:p text:style-name="P621">Optimised DAX formulas</text:p>
        </text:list-item>
        <text:list-item>
          <text:p text:style-name="P621">Minimal dashboard clutter</text:p>
        </text:list-item>
        <text:list-item>
          <text:p text:style-name="P621">Proper KPI arrangement</text:p>
        </text:list-item>
        <text:list-item>
          <text:p text:style-name="P621">Interactive slicers</text:p>
        </text:list-item>
        <text:list-item>
          <text:p text:style-name="P621">Consistent formatting</text:p>
        </text:list-item>
        <text:list-item>
          <text:p text:style-name="P622"><text:soft-page-break/>Efficient visual selection</text:p>
        </text:list-item>
      </text:list>
      <text:p text:style-name="P66">These practices improved dashboard performance.</text:p>
      <text:h text:style-name="P60" text:outline-level="1">10.24 Future Enhancements in Power BI</text:h>
      <text:p text:style-name="P66">Future improvements may include:</text:p>
      <text:list text:style-name="L285">
        <text:list-item>
          <text:p text:style-name="P623">Real time dashboards</text:p>
        </text:list-item>
        <text:list-item>
          <text:p text:style-name="P623">AI visualizations</text:p>
        </text:list-item>
        <text:list-item>
          <text:p text:style-name="P623">Predictive analytics</text:p>
        </text:list-item>
        <text:list-item>
          <text:p text:style-name="P623">Cloud integration</text:p>
        </text:list-item>
        <text:list-item>
          <text:p text:style-name="P623">Mobile dashboards</text:p>
        </text:list-item>
        <text:list-item>
          <text:p text:style-name="P624">Automated alerts</text:p>
        </text:list-item>
      </text:list>
      <text:p text:style-name="P66">These enhancements improve analytical capabilities.</text:p>
      <text:h text:style-name="P60" text:outline-level="1">10.25 Conclusion</text:h>
      <text:p text:style-name="P66">This chapter explained Power BI dashboard implementation used in the Customer Segmentation using RFM Analysis project.</text:p>
      <text:p text:style-name="P66">The chapter discussed data import, Power Query transformation, data modeling, DAX calculations, KPI cards, charts, slicers, dashboard development, and business insights.</text:p>
      <text:p text:style-name="P66">Power BI provides interactive visualization and business intelligence capabilities that improve customer analysis, sales reporting, and strategic decision making.</text:p>
      <text:p text:style-name="P66">The next chapter explains data analysis and business insights generated from the project including customer behavior analysis, sales trends, profitability analysis, and customer segmentation insights.</text:p>
      <text:h text:style-name="P59" text:outline-level="1">CHAPTER 11</text:h>
      <text:h text:style-name="P59" text:outline-level="1">DATA ANALYSIS AND BUSINESS INSIGHTS</text:h>
      <text:h text:style-name="P571" text:outline-level="2">1<text:span text:style-name="T12">1.1 Introduction</text:span></text:h>
      <text:p text:style-name="P66">Data analysis is the process of examining, organizing, transforming, and interpreting data to generate meaningful insights for business decision making. In modern organizations, data analysis plays a critical role in understanding customer behavior, improving operational efficiency, increasing profitability, and optimizing marketing strategies.</text:p>
      <text:p text:style-name="P66">In this project, data analysis is performed on the Online Super Store dataset using SQL, Python, and Power BI. The analysis focuses on customer behavior, sales performance, profitability, regional analysis, product performance, customer segmentation, and RFM insights.</text:p>
      <text:p text:style-name="P66">The insights generated from the project help businesses understand purchasing patterns and identify valuable customers.</text:p>
      <text:h text:style-name="P60" text:outline-level="1">11.2 Objectives of Data Analysis</text:h>
      <text:p text:style-name="P66">The major objectives of analysis include:</text:p>
      <text:list text:style-name="L286">
        <text:list-item>
          <text:p text:style-name="P625">Understanding customer purchasing behavior</text:p>
        </text:list-item>
        <text:list-item>
          <text:p text:style-name="P625">Identifying profitable customers</text:p>
        </text:list-item>
        <text:list-item>
          <text:p text:style-name="P625"><text:soft-page-break/>Identifying top selling products</text:p>
        </text:list-item>
        <text:list-item>
          <text:p text:style-name="P625">Understanding regional performance</text:p>
        </text:list-item>
        <text:list-item>
          <text:p text:style-name="P625">Improving customer retention</text:p>
        </text:list-item>
        <text:list-item>
          <text:p text:style-name="P625">Supporting business decision making</text:p>
        </text:list-item>
        <text:list-item>
          <text:p text:style-name="P625">Improving marketing efficiency</text:p>
        </text:list-item>
        <text:list-item>
          <text:p text:style-name="P626">Increasing business profitability</text:p>
        </text:list-item>
      </text:list>
      <text:h text:style-name="P60" text:outline-level="1">11.3 Sales Performance Analysis</text:h>
      <text:p text:style-name="P66">Sales analysis helps organizations understand business revenue and transaction performance.</text:p>
      <text:p text:style-name="P66">The project analyzes:</text:p>
      <text:list text:style-name="L287">
        <text:list-item>
          <text:p text:style-name="P627">Total sales</text:p>
        </text:list-item>
        <text:list-item>
          <text:p text:style-name="P627">Monthly sales</text:p>
        </text:list-item>
        <text:list-item>
          <text:p text:style-name="P627">Yearly sales</text:p>
        </text:list-item>
        <text:list-item>
          <text:p text:style-name="P627">Category wise sales</text:p>
        </text:list-item>
        <text:list-item>
          <text:p text:style-name="P627">Regional sales</text:p>
        </text:list-item>
        <text:list-item>
          <text:p text:style-name="P628">Customer sales contribution</text:p>
        </text:list-item>
      </text:list>
      <text:h text:style-name="P61" text:outline-level="2">11.3.1 Total Sales Analysis</text:h>
      <text:p text:style-name="P66">Total sales represent overall business revenue generated from transactions.</text:p>
      <text:p text:style-name="P66">Formula:</text:p>
      <text:p text:style-name="P66">Total Sales = Sum of Sales</text:p>
      <text:p text:style-name="P66">Insights:</text:p>
      <text:list text:style-name="L288">
        <text:list-item>
          <text:p text:style-name="P629">Technology and Office Supplies generated high sales</text:p>
        </text:list-item>
        <text:list-item>
          <text:p text:style-name="P629">Repeat customers contributed significantly to revenue</text:p>
        </text:list-item>
        <text:list-item>
          <text:p text:style-name="P630">Sales performance increased gradually over time</text:p>
        </text:list-item>
      </text:list>
      <text:p text:style-name="P66">Business Benefit:</text:p>
      <text:p text:style-name="P66">Supports financial planning and growth analysis.</text:p>
      <text:h text:style-name="P61" text:outline-level="2">11.3.2 Monthly Sales Trend Analysis</text:h>
      <text:p text:style-name="P66"><text:span text:style-name="T15">Monthly analysis helps identify seasonal pat</text:span>terns and sales fluctuations.</text:p>
      <text:p text:style-name="P66">Important observations include:</text:p>
      <text:list text:style-name="L289">
        <text:list-item>
          <text:p text:style-name="P631">Sales increased during festive periods</text:p>
        </text:list-item>
        <text:list-item>
          <text:p text:style-name="P631">Certain months showed higher customer activity</text:p>
        </text:list-item>
        <text:list-item>
          <text:p text:style-name="P632">Seasonal trends affected demand patterns</text:p>
        </text:list-item>
      </text:list>
      <text:p text:style-name="P66">Business Benefit:</text:p>
      <text:p text:style-name="P66">Supports inventory planning and marketing campaigns.</text:p>
      <text:h text:style-name="P61" text:outline-level="2">11.3.3 Yearly Sales Analysis</text:h>
      <text:p text:style-name="P66">Yearly analysis measures long term business growth.</text:p>
      <text:p text:style-name="P66">Insights:</text:p>
      <text:list text:style-name="L290">
        <text:list-item>
          <text:p text:style-name="P633"><text:soft-page-break/>Business revenue improved year by year</text:p>
        </text:list-item>
        <text:list-item>
          <text:p text:style-name="P633">Customer engagement increased gradually</text:p>
        </text:list-item>
        <text:list-item>
          <text:p text:style-name="P634">Loyal customers contributed to growth</text:p>
        </text:list-item>
      </text:list>
      <text:p text:style-name="P66">Business Benefit:</text:p>
      <text:p text:style-name="P66">Supports strategic planning and forecasting.</text:p>
      <text:h text:style-name="P60" text:outline-level="1">11.4 Profit Analysis</text:h>
      <text:p text:style-name="P66">Profit analysis helps organizations evaluate profitability and operational performance.</text:p>
      <text:p text:style-name="P66">The project analyzes:</text:p>
      <text:list text:style-name="L291">
        <text:list-item>
          <text:p text:style-name="P635">Total profit</text:p>
        </text:list-item>
        <text:list-item>
          <text:p text:style-name="P635">Profit margin</text:p>
        </text:list-item>
        <text:list-item>
          <text:p text:style-name="P635">Regional profit</text:p>
        </text:list-item>
        <text:list-item>
          <text:p text:style-name="P635">Product profitability</text:p>
        </text:list-item>
        <text:list-item>
          <text:p text:style-name="P636">Category profitability</text:p>
        </text:list-item>
      </text:list>
      <text:h text:style-name="P61" text:outline-level="2">11.4.1 Profit Margin Analysis</text:h>
      <text:p text:style-name="P66">Profit margin measures profitability percentage.</text:p>
      <text:p text:style-name="P66">Formula:</text:p>
      <text:p text:style-name="P66">Profit Margin = Profit / Sales × 100</text:p>
      <text:p text:style-name="P66">Insights:</text:p>
      <text:list text:style-name="L292">
        <text:list-item>
          <text:p text:style-name="P637">Technology products generated higher profits</text:p>
        </text:list-item>
        <text:list-item>
          <text:p text:style-name="P637">Heavy discounts reduced profitability in some categories</text:p>
        </text:list-item>
        <text:list-item>
          <text:p text:style-name="P638">High sales did not always result in high profit</text:p>
        </text:list-item>
      </text:list>
      <text:p text:style-name="P66">Business Benefit:</text:p>
      <text:p text:style-name="P66">Improves pricing and discount strategies.</text:p>
      <text:h text:style-name="P113" text:outline-level="1">1.5 Customer Behavior A1nalysis</text:h>
      <text:p text:style-name="P66">Customer behavior analysis helps understand purchasing patterns and engagement.</text:p>
      <text:p text:style-name="P66">The project analyzes:</text:p>
      <text:list text:style-name="L293">
        <text:list-item>
          <text:p text:style-name="P639">Customer frequency</text:p>
        </text:list-item>
        <text:list-item>
          <text:p text:style-name="P639">Customer spending</text:p>
        </text:list-item>
        <text:list-item>
          <text:p text:style-name="P639">Customer activity</text:p>
        </text:list-item>
        <text:list-item>
          <text:p text:style-name="P639">Purchase trends</text:p>
        </text:list-item>
        <text:list-item>
          <text:p text:style-name="P640">Repeat customers</text:p>
        </text:list-item>
      </text:list>
      <text:h text:style-name="P61" text:outline-level="2">11.5.1 Customer Purchase Frequency</text:h>
      <text:p text:style-name="P66">Frequency analysis identifies repeat customers.</text:p>
      <text:p text:style-name="P66">Insights:</text:p>
      <text:list text:style-name="L294">
        <text:list-item>
          <text:p text:style-name="P641">Loyal customers generated repeated purchases</text:p>
        </text:list-item>
        <text:list-item>
          <text:p text:style-name="P641"><text:soft-page-break/>Frequent buyers contributed higher revenue</text:p>
        </text:list-item>
        <text:list-item>
          <text:p text:style-name="P642">Repeat customers improved business stability</text:p>
        </text:list-item>
      </text:list>
      <text:p text:style-name="P66">Business Benefit:</text:p>
      <text:p text:style-name="P66">Supports loyalty programs and customer retention.</text:p>
      <text:h text:style-name="P61" text:outline-level="2">11.5.2 Customer Spending Analysis</text:h>
      <text:p text:style-name="P66">Monetary analysis identifies high value customers.</text:p>
      <text:p text:style-name="P66">Insights:</text:p>
      <text:list text:style-name="L295">
        <text:list-item>
          <text:p text:style-name="P643">Premium customers generated significant revenue</text:p>
        </text:list-item>
        <text:list-item>
          <text:p text:style-name="P643">High spending customers improved profitability</text:p>
        </text:list-item>
        <text:list-item>
          <text:p text:style-name="P644">Small customer groups contributed major sales</text:p>
        </text:list-item>
      </text:list>
      <text:p text:style-name="P66">Business Benefit:</text:p>
      <text:p text:style-name="P66">Supports premium customer targeting.</text:p>
      <text:h text:style-name="P60" text:outline-level="1">11.6 RFM Customer Segmentation Insights</text:h>
      <text:p text:style-name="P66">RFM Analysis generated multiple customer segments.</text:p>
      <text:p text:style-name="P66">The project identified:</text:p>
      <text:list text:style-name="L296">
        <text:list-item>
          <text:p text:style-name="P645">Premium Customers</text:p>
        </text:list-item>
        <text:list-item>
          <text:p text:style-name="P645">Loyal Customers</text:p>
        </text:list-item>
        <text:list-item>
          <text:p text:style-name="P645">Potential Customers</text:p>
        </text:list-item>
        <text:list-item>
          <text:p text:style-name="P645">At Risk Customers</text:p>
        </text:list-item>
        <text:list-item>
          <text:p text:style-name="P646">Lost Customers</text:p>
        </text:list-item>
      </text:list>
      <text:h text:style-name="P61" text:outline-level="2">11.6.1 Premium Customers</text:h>
      <text:p text:style-name="P66">Characteristics:</text:p>
      <text:list text:style-name="L297">
        <text:list-item>
          <text:p text:style-name="P647">High Recency</text:p>
        </text:list-item>
        <text:list-item>
          <text:p text:style-name="P647">High Frequency</text:p>
        </text:list-item>
        <text:list-item>
          <text:p text:style-name="P648">High Monetary Value</text:p>
        </text:list-item>
      </text:list>
      <text:p text:style-name="P66">Insights:</text:p>
      <text:list text:style-name="L298">
        <text:list-item>
          <text:p text:style-name="P649">Premium customers contributed major revenue</text:p>
        </text:list-item>
        <text:list-item>
          <text:p text:style-name="P649">Premium customers purchased frequently</text:p>
        </text:list-item>
        <text:list-item>
          <text:p text:style-name="P650">Premium customers required personalized services</text:p>
        </text:list-item>
      </text:list>
      <text:p text:style-name="P66">Business Strategy:</text:p>
      <text:list text:style-name="L299">
        <text:list-item>
          <text:p text:style-name="P651">VIP rewards</text:p>
        </text:list-item>
        <text:list-item>
          <text:p text:style-name="P651">Personalized recommendations</text:p>
        </text:list-item>
        <text:list-item>
          <text:p text:style-name="P652">Exclusive offers</text:p>
        </text:list-item>
      </text:list>
      <text:h text:style-name="P571" text:outline-level="2">1<text:span text:style-name="T12">1.6.2 Loyal Customers</text:span></text:h>
      <text:p text:style-name="P66">Characteristics:</text:p>
      <text:list text:style-name="L300">
        <text:list-item>
          <text:p text:style-name="P653"><text:soft-page-break/>Frequent purchases</text:p>
        </text:list-item>
        <text:list-item>
          <text:p text:style-name="P653">Moderate to high spending</text:p>
        </text:list-item>
        <text:list-item>
          <text:p text:style-name="P654">Strong engagement</text:p>
        </text:list-item>
      </text:list>
      <text:p text:style-name="P66">Insights:</text:p>
      <text:list text:style-name="L301">
        <text:list-item>
          <text:p text:style-name="P655">Loyal customers improved retention rates</text:p>
        </text:list-item>
        <text:list-item>
          <text:p text:style-name="P655">Repeat buyers supported consistent revenue</text:p>
        </text:list-item>
        <text:list-item>
          <text:p text:style-name="P656">Loyalty programs improved engagement</text:p>
        </text:list-item>
      </text:list>
      <text:p text:style-name="P66">Business Strategy:</text:p>
      <text:list text:style-name="L302">
        <text:list-item>
          <text:p text:style-name="P657">Membership benefits</text:p>
        </text:list-item>
        <text:list-item>
          <text:p text:style-name="P657">Reward points</text:p>
        </text:list-item>
        <text:list-item>
          <text:p text:style-name="P658">Appreciation campaigns</text:p>
        </text:list-item>
      </text:list>
      <text:h text:style-name="P61" text:outline-level="2">11.6.3 At Risk Customers</text:h>
      <text:p text:style-name="P66">Characteristics:</text:p>
      <text:list text:style-name="L303">
        <text:list-item>
          <text:p text:style-name="P659">Reduced activity</text:p>
        </text:list-item>
        <text:list-item>
          <text:p text:style-name="P659">No recent purchases</text:p>
        </text:list-item>
        <text:list-item>
          <text:p text:style-name="P660">Declining engagement</text:p>
        </text:list-item>
      </text:list>
      <text:p text:style-name="P66">Insights:</text:p>
      <text:list text:style-name="L304">
        <text:list-item>
          <text:p text:style-name="P661">Customer inactivity reduced retention</text:p>
        </text:list-item>
        <text:list-item>
          <text:p text:style-name="P662">Reactivation campaigns are necessary</text:p>
        </text:list-item>
      </text:list>
      <text:p text:style-name="P66">Business Strategy:</text:p>
      <text:list text:style-name="L305">
        <text:list-item>
          <text:p text:style-name="P663">Discount campaigns</text:p>
        </text:list-item>
        <text:list-item>
          <text:p text:style-name="P663">Reminder notifications</text:p>
        </text:list-item>
        <text:list-item>
          <text:p text:style-name="P664">Re engagement offers</text:p>
        </text:list-item>
      </text:list>
      <text:h text:style-name="P60" text:outline-level="1">11.7 Regional Analysis</text:h>
      <text:p text:style-name="P66">Regional analysis helps understand geographic performance.</text:p>
      <text:p text:style-name="P66">Insights:</text:p>
      <text:list text:style-name="L306">
        <text:list-item>
          <text:p text:style-name="P665">Western region generated high sales</text:p>
        </text:list-item>
        <text:list-item>
          <text:p text:style-name="P665">Certain regions showed lower customer activity</text:p>
        </text:list-item>
        <text:list-item>
          <text:p text:style-name="P666">Regional trends affected profitability</text:p>
        </text:list-item>
      </text:list>
      <text:p text:style-name="P66">Business Benefit:</text:p>
      <text:p text:style-name="P66">Supports regional marketing strategies.</text:p>
      <text:h text:style-name="P60" text:outline-level="1">11.8 Product Category Analysis</text:h>
      <text:p text:style-name="P66">Category analysis helps identify top performing products.</text:p>
      <text:p text:style-name="P66">Insights:</text:p>
      <text:list text:style-name="L307">
        <text:list-item>
          <text:p text:style-name="P667">Technology category generated high profit</text:p>
        </text:list-item>
        <text:list-item>
          <text:p text:style-name="P667">Office Supplies generated stable sales</text:p>
        </text:list-item>
        <text:list-item>
          <text:p text:style-name="P668"><text:soft-page-break/>Furniture category was affected by discounts</text:p>
        </text:list-item>
      </text:list>
      <text:p text:style-name="P66">Business Benefit:</text:p>
      <text:p text:style-name="P66">Supports product investment and pricing decisions.</text:p>
      <text:h text:style-name="P60" text:outline-level="1">11.9 Customer Segment Contribution Analysis</text:h>
      <text:p text:style-name="P66">This analysis measures the contribution of customer groups.</text:p>
      <text:p text:style-name="P66">Insights:</text:p>
      <text:list text:style-name="L308">
        <text:list-item>
          <text:p text:style-name="P669">Premium customers generated large revenue</text:p>
        </text:list-item>
        <text:list-item>
          <text:p text:style-name="P669">Loyal customers improved repeat purchases</text:p>
        </text:list-item>
        <text:list-item>
          <text:p text:style-name="P670">Lost customers reduced long term growth</text:p>
        </text:list-item>
      </text:list>
      <text:p text:style-name="P66">Business Benefit:</text:p>
      <text:p text:style-name="P66">Supports targeted customer strategies.</text:p>
      <text:h text:style-name="P60" text:outline-level="1">11.10 Sales Trend Analysis</text:h>
      <text:p text:style-name="P66">Trend analysis helps identify changes over time.</text:p>
      <text:p text:style-name="P66">Insights:</text:p>
      <text:list text:style-name="L309">
        <text:list-item>
          <text:p text:style-name="P671">Seasonal demand patterns were observed</text:p>
        </text:list-item>
        <text:list-item>
          <text:p text:style-name="P671">Monthly sales fluctuations affected inventory planning</text:p>
        </text:list-item>
        <text:list-item>
          <text:p text:style-name="P672">Year end sales increased significantly</text:p>
        </text:list-item>
      </text:list>
      <text:p text:style-name="P66">Business Benefit:</text:p>
      <text:p text:style-name="P66">Improves forecasting and planning.</text:p>
      <text:h text:style-name="P113" text:outline-level="1">1<text:span text:style-name="T12">1.11 Discount Analysis</text:span></text:h>
      <text:p text:style-name="P66">Discount analysis evaluates the impact of discounts on sales and profit.</text:p>
      <text:p text:style-name="P66">Insights:</text:p>
      <text:list text:style-name="L310">
        <text:list-item>
          <text:p text:style-name="P673">High discounts increased sales volume</text:p>
        </text:list-item>
        <text:list-item>
          <text:p text:style-name="P673">Excessive discounts reduced profitability</text:p>
        </text:list-item>
        <text:list-item>
          <text:p text:style-name="P674">Some categories were highly discount sensitive</text:p>
        </text:list-item>
      </text:list>
      <text:p text:style-name="P66">Business Benefit:</text:p>
      <text:p text:style-name="P66">Improves discount management strategies.</text:p>
      <text:h text:style-name="P60" text:outline-level="1">11.12 Shipping Analysis</text:h>
      <text:p text:style-name="P66">Shipping analysis evaluates delivery performance.</text:p>
      <text:p text:style-name="P66">Insights:</text:p>
      <text:list text:style-name="L311">
        <text:list-item>
          <text:p text:style-name="P675">Standard shipping was most commonly used</text:p>
        </text:list-item>
        <text:list-item>
          <text:p text:style-name="P675">Faster delivery improved customer satisfaction</text:p>
        </text:list-item>
        <text:list-item>
          <text:p text:style-name="P676">Shipping methods affected operational costs</text:p>
        </text:list-item>
      </text:list>
      <text:p text:style-name="P66">Business Benefit:</text:p>
      <text:p text:style-name="P66"><text:soft-page-break/>Supports logistics optimization.</text:p>
      <text:h text:style-name="P60" text:outline-level="1">11.13 Dashboard Based Insights</text:h>
      <text:p text:style-name="P66">Power BI dashboards provided visual insights.</text:p>
      <text:p text:style-name="P66">Important findings include:</text:p>
      <text:list text:style-name="L312">
        <text:list-item>
          <text:p text:style-name="P677">Top customers generated significant revenue</text:p>
        </text:list-item>
        <text:list-item>
          <text:p text:style-name="P677">Technology category dominated profitability</text:p>
        </text:list-item>
        <text:list-item>
          <text:p text:style-name="P677">Regional variations affected sales performance</text:p>
        </text:list-item>
        <text:list-item>
          <text:p text:style-name="P678">Customer segments influenced business growth</text:p>
        </text:list-item>
      </text:list>
      <text:p text:style-name="P66">Dashboard visualization improved decision making.</text:p>
      <text:h text:style-name="P60" text:outline-level="1">11.14 Key Performance Indicators Analyzed</text:h>
      <text:p text:style-name="P66">The project analysed several KPIs.</text:p>
      <text:p text:style-name="P66">Important KPIs include:</text:p>
      <text:list text:style-name="L313">
        <text:list-item>
          <text:p text:style-name="P679">Total Sales</text:p>
        </text:list-item>
        <text:list-item>
          <text:p text:style-name="P679">Total Profit</text:p>
        </text:list-item>
        <text:list-item>
          <text:p text:style-name="P679">Profit Margin</text:p>
        </text:list-item>
        <text:list-item>
          <text:p text:style-name="P679">Customer Count</text:p>
        </text:list-item>
        <text:list-item>
          <text:p text:style-name="P679">Average Sales</text:p>
        </text:list-item>
        <text:list-item>
          <text:p text:style-name="P679">Average Profit</text:p>
        </text:list-item>
        <text:list-item>
          <text:p text:style-name="P679">Frequency Score</text:p>
        </text:list-item>
        <text:list-item>
          <text:p text:style-name="P679">Monetary Value</text:p>
        </text:list-item>
        <text:list-item>
          <text:p text:style-name="P680">Customer Retention Rate</text:p>
        </text:list-item>
      </text:list>
      <text:p text:style-name="P66">These KPIs support strategic business decisions.</text:p>
      <text:h text:style-name="P60" text:outline-level="1">11.15 Business Recommendations</text:h>
      <text:p text:style-name="P66">Several recommendations are generated from the analysis.</text:p>
      <text:list text:style-name="L314">
        <text:list-item>
          <text:p text:style-name="P681">Focus on premium customers using personalized services</text:p>
        </text:list-item>
        <text:list-item>
          <text:p text:style-name="P681">Improve loyalty programs for frequent buyers</text:p>
        </text:list-item>
        <text:list-item>
          <text:p text:style-name="P681">Reduce excessive discounts on low profit products</text:p>
        </text:list-item>
        <text:list-item>
          <text:p text:style-name="P681">Improve campaigns for at risk customers</text:p>
        </text:list-item>
        <text:list-item>
          <text:p text:style-name="P681">Increase investment in profitable categories</text:p>
        </text:list-item>
        <text:list-item>
          <text:p text:style-name="P682">Optimize regional marketing strategies</text:p>
        </text:list-item>
      </text:list>
      <text:p text:style-name="P66">These recommendations improve business performance.</text:p>
      <text:h text:style-name="P165" text:outline-level="1"><text:span text:style-name="T13">11.16 Benefits of Data Analysis in the Proje</text:span>ct</text:h>
      <text:list text:style-name="L315">
        <text:list-item>
          <text:p text:style-name="P683">Improved customer understanding</text:p>
        </text:list-item>
        <text:list-item>
          <text:p text:style-name="P683">Better marketing strategies</text:p>
        </text:list-item>
        <text:list-item>
          <text:p text:style-name="P683">Increased profitability</text:p>
        </text:list-item>
        <text:list-item>
          <text:p text:style-name="P683">Better customer retention</text:p>
        </text:list-item>
        <text:list-item>
          <text:p text:style-name="P683">Improved dashboard reporting</text:p>
        </text:list-item>
        <text:list-item>
          <text:p text:style-name="P683">Better decision making</text:p>
        </text:list-item>
        <text:list-item>
          <text:p text:style-name="P684"><text:soft-page-break/>Improved sales forecasting</text:p>
        </text:list-item>
      </text:list>
      <text:h text:style-name="P60" text:outline-level="1">11.17 Challenges Faced During Analysis</text:h>
      <text:p text:style-name="P66">Several challenges occurred during analysis.</text:p>
      <text:list text:style-name="L316">
        <text:list-item>
          <text:p text:style-name="P685">Data quality issues</text:p>
        </text:list-item>
        <text:list-item>
          <text:p text:style-name="P685">Large dataset processing</text:p>
        </text:list-item>
        <text:list-item>
          <text:p text:style-name="P685">Customer segmentation complexity</text:p>
        </text:list-item>
        <text:list-item>
          <text:p text:style-name="P686">Profitability variations due to discounts</text:p>
        </text:list-item>
      </text:list>
      <text:p text:style-name="P66">These challenges were resolved through preprocessing and validation.</text:p>
      <text:h text:style-name="P60" text:outline-level="1">11.18 Role of Data Analysis in Business Intelligence</text:h>
      <text:p text:style-name="P66">Data analysis is an important component of business intelligence systems.</text:p>
      <text:p text:style-name="P66">It supports:</text:p>
      <text:list text:style-name="L317">
        <text:list-item>
          <text:p text:style-name="P687">Strategic planning</text:p>
        </text:list-item>
        <text:list-item>
          <text:p text:style-name="P687">Revenue optimization</text:p>
        </text:list-item>
        <text:list-item>
          <text:p text:style-name="P687">Customer relationship management</text:p>
        </text:list-item>
        <text:list-item>
          <text:p text:style-name="P687">Performance monitoring</text:p>
        </text:list-item>
        <text:list-item>
          <text:p text:style-name="P688">Operational improvement</text:p>
        </text:list-item>
      </text:list>
      <text:p text:style-name="P66">Business intelligence helps organizations gain competitive advantage.</text:p>
      <text:h text:style-name="P60" text:outline-level="1">11.19 Future Scope of Analytical Insights</text:h>
      <text:p text:style-name="P120">Future enhancements may include:</text:p>
      <text:list text:style-name="L318">
        <text:list-item>
          <text:p text:style-name="P689">Predictive analytics</text:p>
        </text:list-item>
        <text:list-item>
          <text:p text:style-name="P689">Customer churn prediction</text:p>
        </text:list-item>
        <text:list-item>
          <text:p text:style-name="P689">AI based recommendation systems</text:p>
        </text:list-item>
        <text:list-item>
          <text:p text:style-name="P689">Real time customer analytics</text:p>
        </text:list-item>
        <text:list-item>
          <text:p text:style-name="P690">Automated marketing systems</text:p>
        </text:list-item>
      </text:list>
      <text:p text:style-name="P66">These technologies improve analytical capabilities.</text:p>
      <text:h text:style-name="P60" text:outline-level="1">11.20 Conclusion</text:h>
      <text:p text:style-name="P66"><text:span text:style-name="T15">This chapter explained the d</text:span>ata analysis and business insights generated from the Customer Segmentation using RFM Analysis project.</text:p>
      <text:p text:style-name="P66">The chapter discussed sales analysis, profit analysis, customer behavior analysis, regional analysis, product category analysis, RFM customer segmentation insights, dashboard findings, KPIs, and business recommendations.</text:p>
      <text:p text:style-name="P66">The analysis demonstrated how customer transaction data can be transformed into meaningful business intelligence that supports customer retention, marketing optimization, profitability improvement, and strategic decision making.</text:p>
      <text:p text:style-name="P66">The next chapter explains the conclusion and future scope of the project including project summary, achievements, business impact, and future enhancements.</text:p>
      <text:h text:style-name="P59" text:outline-level="1"><text:soft-page-break/>CHAPTER 12</text:h>
      <text:h text:style-name="P59" text:outline-level="1">CONCLUSION AND FUTURE SCOPE</text:h>
      <text:h text:style-name="P515" text:outline-level="2">12.1 Introduction</text:h>
      <text:p text:style-name="P66">Customer segmentation is one of the most important analytical techniques used in modern business organizations. Understanding customer behavior helps companies improve customer satisfaction, increase profitability, optimize marketing strategies, and strengthen customer relationships.</text:p>
      <text:p text:style-name="P66">In this project, Customer Segmentation using RFM Analysis was successfully implemented using the Online Super Store dataset. The project combined SQL, Python, and Power BI technologies to build a complete business analytics solution.</text:p>
      <text:h text:style-name="P9" text:outline-level="1"><text:span text:style-name="Strong_20_Emphasis"><text:span text:style-name="T22">12.2 Project Summary</text:span></text:span></text:h>
      <text:p text:style-name="P66"><text:span text:style-name="T13">The project focused on ana</text:span>lyzing customer transaction data from the Online Super Store dataset using RFM Analysis.</text:p>
      <text:p text:style-name="P66">The project workflow included:</text:p>
      <text:list text:style-name="L319">
        <text:list-item>
          <text:p text:style-name="P691">Collecting the raw dataset</text:p>
        </text:list-item>
        <text:list-item>
          <text:p text:style-name="P691">Cleaning and preprocessing the data</text:p>
        </text:list-item>
        <text:list-item>
          <text:p text:style-name="P691">Transforming data into analytical format</text:p>
        </text:list-item>
        <text:list-item>
          <text:p text:style-name="P691">Creating star schema model</text:p>
        </text:list-item>
        <text:list-item>
          <text:p text:style-name="P691">Performing SQL based analysis</text:p>
        </text:list-item>
        <text:list-item>
          <text:p text:style-name="P691">Implementing Python analytics</text:p>
        </text:list-item>
        <text:list-item>
          <text:p text:style-name="P691">Creating Power BI dashboards</text:p>
        </text:list-item>
        <text:list-item>
          <text:p text:style-name="P691">Performing RFM customer segmentation</text:p>
        </text:list-item>
        <text:list-item>
          <text:p text:style-name="P692">Generating business insights</text:p>
        </text:list-item>
      </text:list>
      <text:p text:style-name="P66">The project successfully identified valuable customers, loyal customers, inactive customers, and customer purchasing patterns.</text:p>
      <text:h text:style-name="P165" text:outline-level="1">12.3 Achievement of Project Objectives</text:h>
      <text:p text:style-name="P66">The project successfully achieved all major objectives.</text:p>
      <text:h text:style-name="P61" text:outline-level="2">12.3.1 Customer Segmentation Achievement</text:h>
      <text:p text:style-name="P66">The project successfully segmented customers into:</text:p>
      <text:list text:style-name="L320">
        <text:list-item>
          <text:p text:style-name="P693">Premium Customers</text:p>
        </text:list-item>
        <text:list-item>
          <text:p text:style-name="P693">Loyal Customers</text:p>
        </text:list-item>
        <text:list-item>
          <text:p text:style-name="P693">Potential Customers</text:p>
        </text:list-item>
        <text:list-item>
          <text:p text:style-name="P693">At Risk Customers</text:p>
        </text:list-item>
        <text:list-item>
          <text:p text:style-name="P694">Lost Customers</text:p>
        </text:list-item>
      </text:list>
      <text:p text:style-name="P66">These segments improved understanding of customer behavior.</text:p>
      <text:h text:style-name="P61" text:outline-level="2">12.3.2 Technical Achievement</text:h>
      <text:p text:style-name="P66">The project successfully implemented:</text:p>
      <text:list text:style-name="L321">
        <text:list-item>
          <text:p text:style-name="P695"><text:soft-page-break/>SQL queries</text:p>
        </text:list-item>
        <text:list-item>
          <text:p text:style-name="P695">Python preprocessing</text:p>
        </text:list-item>
        <text:list-item>
          <text:p text:style-name="P695">Power BI dashboards</text:p>
        </text:list-item>
        <text:list-item>
          <text:p text:style-name="P695">Star schema modeling</text:p>
        </text:list-item>
        <text:list-item>
          <text:p text:style-name="P696">RFM calculations</text:p>
        </text:list-item>
      </text:list>
      <text:p text:style-name="P66">The integration of technologies improved analytical efficiency.</text:p>
      <text:h text:style-name="P61" text:outline-level="2">12.3.3 Analytical Achievement</text:h>
      <text:p text:style-name="P66">The project successfully generated:</text:p>
      <text:list text:style-name="L322">
        <text:list-item>
          <text:p text:style-name="P697">Sales analysis</text:p>
        </text:list-item>
        <text:list-item>
          <text:p text:style-name="P697">Profit analysis</text:p>
        </text:list-item>
        <text:list-item>
          <text:p text:style-name="P697">Customer behavior analysis</text:p>
        </text:list-item>
        <text:list-item>
          <text:p text:style-name="P697">Regional analysis</text:p>
        </text:list-item>
        <text:list-item>
          <text:p text:style-name="P697">Product category analysis</text:p>
        </text:list-item>
        <text:list-item>
          <text:p text:style-name="P698">KPI reporting</text:p>
        </text:list-item>
      </text:list>
      <text:p text:style-name="P66">These insights supported business decision making.</text:p>
      <text:h text:style-name="P165" text:outline-level="1">12.4 Key Findings of the Project</text:h>
      <text:p text:style-name="P66">Several important findings were generated from the analysis.</text:p>
      <text:h text:style-name="P61" text:outline-level="2">12.4.1 Customer Insights</text:h>
      <text:list text:style-name="L323">
        <text:list-item>
          <text:p text:style-name="P699">Premium customers generated major revenue</text:p>
        </text:list-item>
        <text:list-item>
          <text:p text:style-name="P699">Loyal customers improved retention rates</text:p>
        </text:list-item>
        <text:list-item>
          <text:p text:style-name="P699">Repeat customers contributed significantly to sales</text:p>
        </text:list-item>
        <text:list-item>
          <text:p text:style-name="P700">At risk customers required re engagement strategies</text:p>
        </text:list-item>
      </text:list>
      <text:h text:style-name="P61" text:outline-level="2">12.4.2 Sales Insights</text:h>
      <text:list text:style-name="L324">
        <text:list-item>
          <text:p text:style-name="P701">Technology products generated high sales</text:p>
        </text:list-item>
        <text:list-item>
          <text:p text:style-name="P701">Office Supplies maintained stable demand</text:p>
        </text:list-item>
        <text:list-item>
          <text:p text:style-name="P701">Seasonal sales patterns affected revenue</text:p>
        </text:list-item>
        <text:list-item>
          <text:p text:style-name="P702">Regional performance varied significantly</text:p>
        </text:list-item>
      </text:list>
      <text:h text:style-name="P61" text:outline-level="2">12.4.3 Profit Insights</text:h>
      <text:list text:style-name="L325">
        <text:list-item>
          <text:p text:style-name="P703">High sales did not always generate high profit</text:p>
        </text:list-item>
        <text:list-item>
          <text:p text:style-name="P703">Discounts reduced profitability in some categories</text:p>
        </text:list-item>
        <text:list-item>
          <text:p text:style-name="P704">Technology category produced better profit margins</text:p>
        </text:list-item>
      </text:list>
      <text:h text:style-name="P61" text:outline-level="2">12.4.4 Dashboard Insights</text:h>
      <text:list text:style-name="L326">
        <text:list-item>
          <text:p text:style-name="P705">Power BI dashboards improved reporting efficiency</text:p>
        </text:list-item>
        <text:list-item>
          <text:p text:style-name="P705">KPI cards provided quick business summaries</text:p>
        </text:list-item>
        <text:list-item>
          <text:p text:style-name="P706">Interactive visualizations improved decision making</text:p>
        </text:list-item>
      </text:list>
      <text:h text:style-name="P60" text:outline-level="1">12.5 Business Impact of the Project</text:h>
      <text:p text:style-name="P66">The project provides several business benefits.</text:p>
      <text:h text:style-name="P141" text:outline-level="2"><text:soft-page-break/>Improved Customer Retention</text:h>
      <text:p text:style-name="P66">RFM Analysis helps identify loyal and inactive customers.</text:p>
      <text:p text:style-name="P66">Businesses can improve retention using personalized strategies.</text:p>
      <text:h text:style-name="P141" text:outline-level="2">Better Marketing Strategies</text:h>
      <text:p text:style-name="P66">Customer segmentation supports targeted marketing campaigns.</text:p>
      <text:p text:style-name="P66">Businesses can focus on high value customers.</text:p>
      <text:h text:style-name="P141" text:outline-level="2">Increased Profitability</text:h>
      <text:p text:style-name="P66">The project helps organizations identify profitable products and customers.</text:p>
      <text:p text:style-name="P66">This improves revenue optimization.</text:p>
      <text:h text:style-name="P141" text:outline-level="2">Improved Business Intelligence</text:h>
      <text:p text:style-name="P66">Power BI dashboards provide interactive business reporting.</text:p>
      <text:p text:style-name="P66">This improves strategic decision making.</text:p>
      <text:h text:style-name="P60" text:outline-level="1">12.6 Learning Outcomes</text:h>
      <text:p text:style-name="P66">The project provided practical knowledge in multiple analytical areas.</text:p>
      <text:h text:style-name="P141" text:outline-level="2">SQL Learning Outcomes</text:h>
      <text:list text:style-name="L327">
        <text:list-item>
          <text:p text:style-name="P707">Database creation</text:p>
        </text:list-item>
        <text:list-item>
          <text:p text:style-name="P707">Table creation</text:p>
        </text:list-item>
        <text:list-item>
          <text:p text:style-name="P707">SQL queries</text:p>
        </text:list-item>
        <text:list-item>
          <text:p text:style-name="P707">Aggregation functions</text:p>
        </text:list-item>
        <text:list-item>
          <text:p text:style-name="P707">JOIN operations</text:p>
        </text:list-item>
        <text:list-item>
          <text:p text:style-name="P707">Window functions</text:p>
        </text:list-item>
        <text:list-item>
          <text:p text:style-name="P708">Analytical reporting</text:p>
        </text:list-item>
      </text:list>
      <text:h text:style-name="P141" text:outline-level="2">Python Learning Outcomes</text:h>
      <text:list text:style-name="L328">
        <text:list-item>
          <text:p text:style-name="P709">Data preprocessing</text:p>
        </text:list-item>
        <text:list-item>
          <text:p text:style-name="P709">Data cleaning</text:p>
        </text:list-item>
        <text:list-item>
          <text:p text:style-name="P709">Exploratory Data Analysis</text:p>
        </text:list-item>
        <text:list-item>
          <text:p text:style-name="P709">Data visualization</text:p>
        </text:list-item>
        <text:list-item>
          <text:p text:style-name="P709">RFM calculatio</text:p>
        </text:list-item>
        <text:list-item>
          <text:p text:style-name="P710">Customer segmentation</text:p>
        </text:list-item>
      </text:list>
      <text:h text:style-name="P141" text:outline-level="2">Power BI Learning Outcomes</text:h>
      <text:list text:style-name="L329">
        <text:list-item>
          <text:p text:style-name="P711">Data modelling</text:p>
        </text:list-item>
        <text:list-item>
          <text:p text:style-name="P711">DAX calculations</text:p>
        </text:list-item>
        <text:list-item>
          <text:p text:style-name="P711">KPI dashboards</text:p>
        </text:list-item>
        <text:list-item>
          <text:p text:style-name="P711">Interactive visualization</text:p>
        </text:list-item>
        <text:list-item>
          <text:p text:style-name="P711">Dashboard design</text:p>
        </text:list-item>
        <text:list-item>
          <text:p text:style-name="P712">Business intelligence reporting</text:p>
        </text:list-item>
      </text:list>
      <text:h text:style-name="P141" text:outline-level="2"><text:soft-page-break/>Business Analytics Learning Outcomes</text:h>
      <text:list text:style-name="L330">
        <text:list-item>
          <text:p text:style-name="P713">Customer behavior analysis</text:p>
        </text:list-item>
        <text:list-item>
          <text:p text:style-name="P713">Sales analysis</text:p>
        </text:list-item>
        <text:list-item>
          <text:p text:style-name="P713">Profitability analysis</text:p>
        </text:list-item>
        <text:list-item>
          <text:p text:style-name="P713">Customer segmentation</text:p>
        </text:list-item>
        <text:list-item>
          <text:p text:style-name="P714">Business intelligence concepts</text:p>
        </text:list-item>
      </text:list>
      <text:h text:style-name="P60" text:outline-level="1">12.7 Advantages of the Project</text:h>
      <text:p text:style-name="P66">The project provides several advantages.</text:p>
      <text:list text:style-name="L331">
        <text:list-item>
          <text:p text:style-name="P715">Complete end to end analytics workflow</text:p>
        </text:list-item>
        <text:list-item>
          <text:p text:style-name="P715">Practical exposure to real world business data</text:p>
        </text:list-item>
        <text:list-item>
          <text:p text:style-name="P715">Improved technical skills</text:p>
        </text:list-item>
        <text:list-item>
          <text:p text:style-name="P715">Better understanding of customer analytics</text:p>
        </text:list-item>
        <text:list-item>
          <text:p text:style-name="P715">Improved dashboard development skills</text:p>
        </text:list-item>
        <text:list-item>
          <text:p text:style-name="P715">Enhanced business intelligence knowledge</text:p>
        </text:list-item>
        <text:list-item>
          <text:p text:style-name="P716">Better analytical thinking</text:p>
        </text:list-item>
      </text:list>
      <text:h text:style-name="P60" text:outline-level="1">12.8 Limitations of the Project</text:h>
      <text:p text:style-name="P66">Every analytical project has certain limitations.</text:p>
      <text:h text:style-name="P141" text:outline-level="2">Limited Dataset</text:h>
      <text:p text:style-name="P66">The project uses a sample dataset.</text:p>
      <text:p text:style-name="P66">Real world business environments may contain larger and more complex data.</text:p>
      <text:h text:style-name="P141" text:outline-level="2">Historical Data Analysis</text:h>
      <text:p text:style-name="P66">The project focuses mainly on historical transaction data.</text:p>
      <text:p text:style-name="P66">Real time analytics is not included.</text:p>
      <text:h text:style-name="P141" text:outline-level="2">No Machine Learning Models</text:h>
      <text:p text:style-name="P66">The project focuses on descriptive analytics and segmentation.</text:p>
      <text:p text:style-name="P66">Predictive analytics models are not implemented.</text:p>
      <text:h text:style-name="P141" text:outline-level="2">Limited Customer Attributes</text:h>
      <text:p text:style-name="P66">The dataset does not contain demographic or behavioural attributes such as age, income, or customer preferences.</text:p>
      <text:h text:style-name="P60" text:outline-level="1">12.9 Future Scope of the Project</text:h>
      <text:p text:style-name="P66">The project can be extended using advanced analytical technologies.</text:p>
      <text:h text:style-name="P141" text:outline-level="2">12.9.1 Machine Learning Integration</text:h>
      <text:p text:style-name="P66">Future projects can include:</text:p>
      <text:list text:style-name="L332">
        <text:list-item>
          <text:p text:style-name="P717">Customer churn prediction</text:p>
        </text:list-item>
        <text:list-item>
          <text:p text:style-name="P717">Sales forecasting</text:p>
        </text:list-item>
        <text:list-item>
          <text:p text:style-name="P717"><text:soft-page-break/>Product recommendation systems</text:p>
        </text:list-item>
        <text:list-item>
          <text:p text:style-name="P718">Customer lifetime value prediction</text:p>
        </text:list-item>
      </text:list>
      <text:p text:style-name="P66">Machine learning improves predictive analytics.</text:p>
      <text:h text:style-name="P61" text:outline-level="2">12.9.2 Artificial Intelligence Integration</text:h>
      <text:p text:style-name="P74">AI based systems can improve:</text:p>
      <text:list text:style-name="L333">
        <text:list-item>
          <text:p text:style-name="P719">Customer recommendations</text:p>
        </text:list-item>
        <text:list-item>
          <text:p text:style-name="P719">Personalized marketing</text:p>
        </text:list-item>
        <text:list-item>
          <text:p text:style-name="P719">Automated customer interaction</text:p>
        </text:list-item>
        <text:list-item>
          <text:p text:style-name="P720">Smart business insights</text:p>
        </text:list-item>
      </text:list>
      <text:h text:style-name="P141" text:outline-level="2"><text:span text:style-name="T13">12.9.3 Real Time Analytic</text:span>s</text:h>
      <text:p text:style-name="P66">Future systems can support:</text:p>
      <text:list text:style-name="L334">
        <text:list-item>
          <text:p text:style-name="P721">Live dashboard reporting</text:p>
        </text:list-item>
        <text:list-item>
          <text:p text:style-name="P721">Real time customer tracking</text:p>
        </text:list-item>
        <text:list-item>
          <text:p text:style-name="P721">Real time sales monitoring</text:p>
        </text:list-item>
        <text:list-item>
          <text:p text:style-name="P722">Instant alerts and notifications</text:p>
        </text:list-item>
      </text:list>
      <text:h text:style-name="P61" text:outline-level="2"><text:span text:style-name="T23">12</text:span>.9.4 Cloud Integration</text:h>
      <text:p text:style-name="P66">Cloud technologies can improve:</text:p>
      <text:list text:style-name="L335">
        <text:list-item>
          <text:p text:style-name="P723">Data storage</text:p>
        </text:list-item>
        <text:list-item>
          <text:p text:style-name="P723">Data scalability</text:p>
        </text:list-item>
        <text:list-item>
          <text:p text:style-name="P723">Online dashboard sharing</text:p>
        </text:list-item>
        <text:list-item>
          <text:p text:style-name="P724">Distributed analytics</text:p>
        </text:list-item>
      </text:list>
      <text:p text:style-name="P66">Examples:</text:p>
      <text:list text:style-name="L336">
        <text:list-item>
          <text:p text:style-name="P725">Azure</text:p>
        </text:list-item>
        <text:list-item>
          <text:p text:style-name="P725">AWS</text:p>
        </text:list-item>
        <text:list-item>
          <text:p text:style-name="P726">Google Cloud</text:p>
        </text:list-item>
      </text:list>
      <text:h text:style-name="P61" text:outline-level="2">12.9.5 Mobile Dashboard Development</text:h>
      <text:p text:style-name="P66">Future dashboards can be optimized for:</text:p>
      <text:list text:style-name="L337">
        <text:list-item>
          <text:p text:style-name="P727">Mobile devices</text:p>
        </text:list-item>
        <text:list-item>
          <text:p text:style-name="P727">Tablets</text:p>
        </text:list-item>
        <text:list-item>
          <text:p text:style-name="P728">Cloud applications</text:p>
        </text:list-item>
      </text:list>
      <text:p text:style-name="P66">This improves accessibility and reporting flexibility.</text:p>
      <text:h text:style-name="P61" text:outline-level="2">12.9.6 Advanced Visualization</text:h>
      <text:p text:style-name="P66">Future projects can use:</text:p>
      <text:list text:style-name="L338">
        <text:list-item>
          <text:p text:style-name="P729">AI visualizations</text:p>
        </text:list-item>
        <text:list-item>
          <text:p text:style-name="P729">Dynamic dashboards</text:p>
        </text:list-item>
        <text:list-item>
          <text:p text:style-name="P729">Predictive charts</text:p>
        </text:list-item>
        <text:list-item>
          <text:p text:style-name="P730"><text:soft-page-break/>Interactive storytelling dashboards</text:p>
        </text:list-item>
      </text:list>
      <text:h text:style-name="P60" text:outline-level="1">12.10 Real World Applications of the Project</text:h>
      <text:p text:style-name="P66">The project concepts are applicable in multiple industries.</text:p>
      <text:h text:style-name="P141" text:outline-level="2">E Commerce Industry</text:h>
      <text:p text:style-name="P66">Online shopping companies use customer segmentation for personalized recommendations.</text:p>
      <text:h text:style-name="P141" text:outline-level="2">Banking Industry</text:h>
      <text:p text:style-name="P66">Banks use customer segmentation for premium services.</text:p>
      <text:h text:style-name="P141" text:outline-level="2">Retail Industry</text:h>
      <text:p text:style-name="P66">Retail companies use RFM Analysis for customer retention.</text:p>
      <text:h text:style-name="P141" text:outline-level="2">Telecommunications Industry</text:h>
      <text:p text:style-name="P66">Telecom companies use analytics to reduce customer churn.</text:p>
      <text:h text:style-name="P141" text:outline-level="2">Hospitality Industry</text:h>
      <text:p text:style-name="P66">Hotels use customer segmentation to improve customer experience.</text:p>
      <text:h text:style-name="P60" text:outline-level="1">12.11 Overall Project Evaluation</text:h>
      <text:p text:style-name="P66">The project successfully demonstrated:</text:p>
      <text:list text:style-name="L339">
        <text:list-item>
          <text:p text:style-name="P731">Data analytics workflow</text:p>
        </text:list-item>
        <text:list-item>
          <text:p text:style-name="P731">Customer segmentation process</text:p>
        </text:list-item>
        <text:list-item>
          <text:p text:style-name="P731">Business intelligence implementation</text:p>
        </text:list-item>
        <text:list-item>
          <text:p text:style-name="P731">Dashboard development</text:p>
        </text:list-item>
        <text:list-item>
          <text:p text:style-name="P731">RFM Analysis methodology</text:p>
        </text:list-item>
        <text:list-item>
          <text:p text:style-name="P731">SQL and Python integration</text:p>
        </text:list-item>
        <text:list-item>
          <text:p text:style-name="P732">Power BI reporting</text:p>
        </text:list-item>
      </text:list>
      <text:p text:style-name="P66">The project provided practical business analytics experience.</text:p>
      <text:h text:style-name="P60" text:outline-level="1">12.12 Conclusion</text:h>
      <text:p text:style-name="P66">The Customer Segmentation using RFM Analysis project successfully demonstrated how customer transaction data can be transformed into meaningful business intelligence.</text:p>
      <text:p text:style-name="P66">The project combined SQL, Python, and Power BI technologies to perform customer analysis, sales analysis, profitability analysis, and customer segmentation.</text:p>
      <text:p text:style-name="P66">RFM Analysis helped identify premium customers, loyal customers, inactive customers, and purchasing behavior patterns. Power BI dashboards improved visualization and decision making through interactive reporting.</text:p>
      <text:p text:style-name="P66">The project provided strong practical knowledge in data analytics, business intelligence, SQL querying, Python programming, dashboard development, and customer analytics.</text:p>
      <text:p text:style-name="P66">The analytical techniques used in the project can help organizations improve customer retention, optimize marketing strategies, increase profitability, and support strategic business decision making.</text:p>
      <text:p text:style-name="P66"><text:soft-page-break/>The project also provides a strong foundation for future advanced analytics projects involving machine learning, artificial intelligence, predictive analytics, and real time business intelligence systems.</text:p>
      <text:h text:style-name="P9" text:outline-level="1"><text:span text:style-name="Strong_20_Emphasis"><text:span text:style-name="T4">REFERENCES</text:span></text:span></text:h>
      <text:h text:style-name="P141" text:outline-level="2">Books</text:h>
      <text:list text:style-name="L340">
        <text:list-item>
          <text:p text:style-name="P733">Han, J., Kamber, M., and Pei, J. Data Mining Concepts and Techniques.</text:p>
        </text:list-item>
        <text:list-item>
          <text:p text:style-name="P733">Kimball, R. The Data Warehouse Toolkit.</text:p>
        </text:list-item>
        <text:list-item>
          <text:p text:style-name="P733">McKinney, W. Python for Data Analysis.</text:p>
        </text:list-item>
        <text:list-item>
          <text:p text:style-name="P733">Russo, M., and Ferrari, A. The Definitive Guide to DAX.</text:p>
        </text:list-item>
        <text:list-item>
          <text:p text:style-name="P734">Few, S. Information Dashboard Design.</text:p>
        </text:list-item>
      </text:list>
      <text:h text:style-name="P141" text:outline-level="2">Online Documentation</text:h>
      <text:list text:style-name="L341">
        <text:list-item>
          <text:p text:style-name="P735">Microsoft Power BI Documentation</text:p>
        </text:list-item>
        <text:list-item>
          <text:p text:style-name="P735">Python Official Documentation</text:p>
        </text:list-item>
        <text:list-item>
          <text:p text:style-name="P735">Pandas Documentation</text:p>
        </text:list-item>
        <text:list-item>
          <text:p text:style-name="P735">NumPy Documentation</text:p>
        </text:list-item>
        <text:list-item>
          <text:p text:style-name="P736">SQL Documentation</text:p>
        </text:list-item>
      </text:list>
      <text:h text:style-name="P141" text:outline-level="2">Research Articles</text:h>
      <text:list text:style-name="L342">
        <text:list-item>
          <text:p text:style-name="P737">Customer Segmentation Techniques using RFM Analysis</text:p>
        </text:list-item>
        <text:list-item>
          <text:p text:style-name="P737">Business Intelligence and Data Analytics Research Papers</text:p>
        </text:list-item>
        <text:list-item>
          <text:p text:style-name="P737">Customer Relationship Management Studies</text:p>
        </text:list-item>
        <text:list-item>
          <text:p text:style-name="P738">Retail Analytics Research Articles</text:p>
        </text:list-item>
      </text:list>
      <text:h text:style-name="P61" text:outline-level="2">Dataset References</text:h>
      <text:list text:style-name="L343">
        <text:list-item>
          <text:p text:style-name="P739">Online Super Store Dataset</text:p>
        </text:list-item>
        <text:list-item>
          <text:p text:style-name="P739">Public Retail Transaction Datasets</text:p>
        </text:list-item>
        <text:list-item>
          <text:p text:style-name="P740">Kaggle Retail Datasets</text:p>
        </text:list-item>
      </text:list>
      <text:h text:style-name="P61" text:outline-level="2">Software Tools Used</text:h>
      <text:list text:style-name="L344">
        <text:list-item>
          <text:p text:style-name="P741">Microsoft Power BI</text:p>
        </text:list-item>
        <text:list-item>
          <text:p text:style-name="P741">Python</text:p>
        </text:list-item>
        <text:list-item>
          <text:p text:style-name="P741">SQL Server</text:p>
        </text:list-item>
        <text:list-item>
          <text:p text:style-name="P741">Microsoft Excel</text:p>
        </text:list-item>
        <text:list-item>
          <text:p text:style-name="P742">Jupyter Notebook</text:p>
        </text:list-item>
      </text:list>
      <text:h text:style-name="P9" text:outline-level="1"><text:span text:style-name="Strong_20_Emphasis"><text:span text:style-name="T4">CHAPTER 13</text:span></text:span></text:h>
      <text:h text:style-name="P165" text:outline-level="1">DATA ANALYSIS AND INSIGHTS</text:h>
      <text:h text:style-name="P141" text:outline-level="2">13.1 Introduction</text:h>
      <text:p text:style-name="P66">Data analysis is the process of examining, organizing, interpreting, and visualizing data to generate meaningful business insights. In modern organizations, data analysis helps management understand customer behavior, improve operational efficiency, increase profitability, and support strategic decision making.</text:p>
      <text:p text:style-name="P66"><text:soft-page-break/>In this project, data analysis is performed using the Online Super Store dataset after completing data cleaning, transformation, SQL implementation, Python preprocessing, and Power BI dashboard development. The analysis mainly focuses on customer behavior, purchasing patterns, customer segmentation, sales performance, profit trends, and revenue contribution.</text:p>
      <text:p text:style-name="P66">RFM Analysis helps identify valuable customers and classify them into different business categories. The generated insights help organizations improve marketing strategies, customer retention, sales growth, and customer satisfaction.</text:p>
      <text:p text:style-name="P66">This chapter explains detailed analytical insights generated from the project using SQL queries, Python analysis, and Power BI dashboards.</text:p>
      <text:h text:style-name="P165" text:outline-level="1">13.2 Sales Performance Analysis</text:h>
      <text:p text:style-name="P66">Sales analysis is one of the most important components of business analytics. It helps organizations evaluate business growth, revenue generation, and sales trends.</text:p>
      <text:p text:style-name="P66">The project analyzes:</text:p>
      <text:list text:style-name="L345">
        <text:list-item>
          <text:p text:style-name="P743">Total Sales </text:p>
        </text:list-item>
        <text:list-item>
          <text:p text:style-name="P743">Monthly Sales </text:p>
        </text:list-item>
        <text:list-item>
          <text:p text:style-name="P743">Yearly Sales </text:p>
        </text:list-item>
        <text:list-item>
          <text:p text:style-name="P743">Category Wise Sales </text:p>
        </text:list-item>
        <text:list-item>
          <text:p text:style-name="P743">Regional Sales </text:p>
        </text:list-item>
        <text:list-item>
          <text:p text:style-name="P744">Customer Contribution </text:p>
        </text:list-item>
      </text:list>
      <text:h text:style-name="P141" text:outline-level="2">13.2.1 Total Sales Analysis</text:h>
      <text:p text:style-name="P66">Total sales represent the complete revenue generated from customer transactions.</text:p>
      <text:p text:style-name="P66">Formula:</text:p>
      <text:h text:style-name="P23" text:outline-level="3">Observations</text:h>
      <text:list text:style-name="L346">
        <text:list-item>
          <text:p text:style-name="P745">The business generated strong revenue from repeat customers. </text:p>
        </text:list-item>
        <text:list-item>
          <text:p text:style-name="P745">Technology products contributed significantly to sales. </text:p>
        </text:list-item>
        <text:list-item>
          <text:p text:style-name="P745">Premium customers generated high transaction values. </text:p>
        </text:list-item>
        <text:list-item>
          <text:p text:style-name="P746">Sales performance improved over time. </text:p>
        </text:list-item>
      </text:list>
      <text:h text:style-name="P23" text:outline-level="3">Business Importance</text:h>
      <text:list text:style-name="L347">
        <text:list-item>
          <text:p text:style-name="P747">Measures business growth </text:p>
        </text:list-item>
        <text:list-item>
          <text:p text:style-name="P747">Supports financial planning </text:p>
        </text:list-item>
        <text:list-item>
          <text:p text:style-name="P747">Helps management evaluate performance </text:p>
        </text:list-item>
        <text:list-item>
          <text:p text:style-name="P748">Supports revenue forecasting </text:p>
        </text:list-item>
      </text:list>
      <text:h text:style-name="P141" text:outline-level="2">13.2.2 Monthly Sales Trend Analysis</text:h>
      <text:p text:style-name="P66">Monthly sales analysis helps identify seasonal trends and customer purchasing patterns.</text:p>
      <text:h text:style-name="P23" text:outline-level="3">Observations</text:h>
      <text:list text:style-name="L348">
        <text:list-item>
          <text:p text:style-name="P749">Certain months generated higher sales due to festive shopping. </text:p>
        </text:list-item>
        <text:list-item>
          <text:p text:style-name="P749">Sales fluctuations occurred during seasonal periods. </text:p>
        </text:list-item>
        <text:list-item>
          <text:p text:style-name="P749">End of year sales showed increased customer activity. </text:p>
        </text:list-item>
        <text:list-item>
          <text:p text:style-name="P750"><text:soft-page-break/>Promotional campaigns improved monthly revenue. </text:p>
        </text:list-item>
      </text:list>
      <text:h text:style-name="P23" text:outline-level="3">Business Benefits</text:h>
      <text:list text:style-name="L349">
        <text:list-item>
          <text:p text:style-name="P751">Supports inventory planning </text:p>
        </text:list-item>
        <text:list-item>
          <text:p text:style-name="P751">Helps forecast demand </text:p>
        </text:list-item>
        <text:list-item>
          <text:p text:style-name="P751">Improves marketing timing </text:p>
        </text:list-item>
        <text:list-item>
          <text:p text:style-name="P752">Supports operational planning </text:p>
        </text:list-item>
      </text:list>
      <text:h text:style-name="P141" text:outline-level="2">13.2.3 Category Wise Sales Analysis</text:h>
      <text:p text:style-name="P66">Category analysis evaluates sales performance across product categories.</text:p>
      <text:h text:style-name="P23" text:outline-level="3">Major Categories</text:h>
      <text:list text:style-name="L350">
        <text:list-item>
          <text:p text:style-name="P753">Technology </text:p>
        </text:list-item>
        <text:list-item>
          <text:p text:style-name="P753">Furniture </text:p>
        </text:list-item>
        <text:list-item>
          <text:p text:style-name="P754">Office Supplies </text:p>
        </text:list-item>
      </text:list>
      <text:h text:style-name="P23" text:outline-level="3">Insights</text:h>
      <text:list text:style-name="L351">
        <text:list-item>
          <text:p text:style-name="P755">Technology category generated highest revenue. </text:p>
        </text:list-item>
        <text:list-item>
          <text:p text:style-name="P755">Office Supplies maintained consistent sales. </text:p>
        </text:list-item>
        <text:list-item>
          <text:p text:style-name="P756">Furniture sales were affected by discount strategies. </text:p>
        </text:list-item>
      </text:list>
      <text:h text:style-name="P23" text:outline-level="3">Business Benefits</text:h>
      <text:list text:style-name="L352">
        <text:list-item>
          <text:p text:style-name="P757">Improves product investment decisions </text:p>
        </text:list-item>
        <text:list-item>
          <text:p text:style-name="P757">Supports category management </text:p>
        </text:list-item>
        <text:list-item>
          <text:p text:style-name="P758">Helps identify profitable products </text:p>
        </text:list-item>
      </text:list>
      <text:h text:style-name="P141" text:outline-level="2">13.2.4 Regional Sales Analysis</text:h>
      <text:p text:style-name="P66">Regional analysis evaluates geographic sales distribution.</text:p>
      <text:h text:style-name="P23" text:outline-level="3">Regions Analyzed</text:h>
      <text:list text:style-name="L353">
        <text:list-item>
          <text:p text:style-name="P759">East </text:p>
        </text:list-item>
        <text:list-item>
          <text:p text:style-name="P759">West </text:p>
        </text:list-item>
        <text:list-item>
          <text:p text:style-name="P759">Central </text:p>
        </text:list-item>
        <text:list-item>
          <text:p text:style-name="P760">South </text:p>
        </text:list-item>
      </text:list>
      <text:h text:style-name="P23" text:outline-level="3">Insights</text:h>
      <text:list text:style-name="L354">
        <text:list-item>
          <text:p text:style-name="P761">Western region generated higher sales. </text:p>
        </text:list-item>
        <text:list-item>
          <text:p text:style-name="P761">Some regions showed lower customer engagement. </text:p>
        </text:list-item>
        <text:list-item>
          <text:p text:style-name="P762">Regional demand patterns varied significantly. </text:p>
        </text:list-item>
      </text:list>
      <text:h text:style-name="P23" text:outline-level="3">Business Importance</text:h>
      <text:list text:style-name="L355">
        <text:list-item>
          <text:p text:style-name="P763">Supports regional marketing </text:p>
        </text:list-item>
        <text:list-item>
          <text:p text:style-name="P763">Improves supply chain planning </text:p>
        </text:list-item>
        <text:list-item>
          <text:p text:style-name="P764">Helps identify growth opportunities </text:p>
        </text:list-item>
      </text:list>
      <text:h text:style-name="P165" text:outline-level="1"><text:soft-page-break/>13.3 Customer Purchase Behavior</text:h>
      <text:p text:style-name="P66">Customer behavior analysis helps organizations understand how customers interact with products and services.</text:p>
      <text:p text:style-name="P66">The project analyzes:</text:p>
      <text:list text:style-name="L356">
        <text:list-item>
          <text:p text:style-name="P765">Purchase frequency </text:p>
        </text:list-item>
        <text:list-item>
          <text:p text:style-name="P765">Spending patterns </text:p>
        </text:list-item>
        <text:list-item>
          <text:p text:style-name="P765">Buying trends </text:p>
        </text:list-item>
        <text:list-item>
          <text:p text:style-name="P765">Repeat purchases </text:p>
        </text:list-item>
        <text:list-item>
          <text:p text:style-name="P766">Customer engagement </text:p>
        </text:list-item>
      </text:list>
      <text:h text:style-name="P141" text:outline-level="2">13.3.1 Frequency Analysis</text:h>
      <text:p text:style-name="P66">Frequency measures how often customers place orders.</text:p>
      <text:p text:style-name="P66">Formula:</text:p>
      <text:h text:style-name="P23" text:outline-level="3">Insights</text:h>
      <text:list text:style-name="L357">
        <text:list-item>
          <text:p text:style-name="P767">Loyal customers purchased frequently. </text:p>
        </text:list-item>
        <text:list-item>
          <text:p text:style-name="P767">Repeat customers generated stable revenue. </text:p>
        </text:list-item>
        <text:list-item>
          <text:p text:style-name="P767">Frequent buyers improved business consistency. </text:p>
        </text:list-item>
        <text:list-item>
          <text:p text:style-name="P768">High frequency customers showed strong engagement. </text:p>
        </text:list-item>
      </text:list>
      <text:h text:style-name="P23" text:outline-level="3">Business Benefits</text:h>
      <text:list text:style-name="L358">
        <text:list-item>
          <text:p text:style-name="P769">Supports loyalty programs </text:p>
        </text:list-item>
        <text:list-item>
          <text:p text:style-name="P769">Improves retention strategies </text:p>
        </text:list-item>
        <text:list-item>
          <text:p text:style-name="P770">Helps identify loyal customers </text:p>
        </text:list-item>
      </text:list>
      <text:h text:style-name="P141" text:outline-level="2">13.3.2 Customer Spending Behavior</text:h>
      <text:p text:style-name="P66">Spending analysis measures customer monetary contribution.</text:p>
      <text:p text:style-name="P66">Formula:</text:p>
      <text:h text:style-name="P23" text:outline-level="3">Insights</text:h>
      <text:list text:style-name="L359">
        <text:list-item>
          <text:p text:style-name="P771">Small groups of customers generated major revenue. </text:p>
        </text:list-item>
        <text:list-item>
          <text:p text:style-name="P771">Premium customers spent significantly more money. </text:p>
        </text:list-item>
        <text:list-item>
          <text:p text:style-name="P772">High spending customers improved profitability. </text:p>
        </text:list-item>
      </text:list>
      <text:h text:style-name="P23" text:outline-level="3">Business Benefits</text:h>
      <text:list text:style-name="L360">
        <text:list-item>
          <text:p text:style-name="P773">Supports premium customer targeting </text:p>
        </text:list-item>
        <text:list-item>
          <text:p text:style-name="P773">Improves personalized marketing </text:p>
        </text:list-item>
        <text:list-item>
          <text:p text:style-name="P774">Increases revenue optimization </text:p>
        </text:list-item>
      </text:list>
      <text:h text:style-name="P141" text:outline-level="2">13.3.3 Customer Activity Analysis</text:h>
      <text:p text:style-name="P66">Customer activity is measured using Recency values.</text:p>
      <text:p text:style-name="P66">Formula:</text:p>
      <text:h text:style-name="P23" text:outline-level="3"><text:soft-page-break/>Insights</text:h>
      <text:list text:style-name="L361">
        <text:list-item>
          <text:p text:style-name="P775">Recently active customers were more likely to purchase again. </text:p>
        </text:list-item>
        <text:list-item>
          <text:p text:style-name="P775">Inactive customers required re engagement strategies. </text:p>
        </text:list-item>
        <text:list-item>
          <text:p text:style-name="P776">Recency helped identify customer retention issues. </text:p>
        </text:list-item>
      </text:list>
      <text:h text:style-name="P23" text:outline-level="3">Business Benefits</text:h>
      <text:list text:style-name="L362">
        <text:list-item>
          <text:p text:style-name="P777">Supports retention campaigns </text:p>
        </text:list-item>
        <text:list-item>
          <text:p text:style-name="P777">Helps identify inactive customers </text:p>
        </text:list-item>
        <text:list-item>
          <text:p text:style-name="P778">Improves customer engagement </text:p>
        </text:list-item>
      </text:list>
      <text:h text:style-name="P165" text:outline-level="1">13.4 High Value Customers</text:h>
      <text:p text:style-name="P66">High value customers are customers who contribute significantly to business revenue and profitability.</text:p>
      <text:p text:style-name="P66">These customers generally have:</text:p>
      <text:list text:style-name="L363">
        <text:list-item>
          <text:p text:style-name="P779">High Frequency </text:p>
        </text:list-item>
        <text:list-item>
          <text:p text:style-name="P779">High Monetary Value </text:p>
        </text:list-item>
        <text:list-item>
          <text:p text:style-name="P780">Low Recency </text:p>
        </text:list-item>
      </text:list>
      <text:h text:style-name="P141" text:outline-level="2">13.4.1 Characteristics of High Value Customers</text:h>
      <text:list text:style-name="L364">
        <text:list-item>
          <text:p text:style-name="P781">Purchase frequently </text:p>
        </text:list-item>
        <text:list-item>
          <text:p text:style-name="P781">Spend more money </text:p>
        </text:list-item>
        <text:list-item>
          <text:p text:style-name="P781">Show strong brand loyalty </text:p>
        </text:list-item>
        <text:list-item>
          <text:p text:style-name="P782">Generate repeat business </text:p>
        </text:list-item>
      </text:list>
      <text:h text:style-name="P141" text:outline-level="2">13.4.2 Insights About High Value Customers</text:h>
      <text:list text:style-name="L365">
        <text:list-item>
          <text:p text:style-name="P783">Premium customers generated major revenue contribution. </text:p>
        </text:list-item>
        <text:list-item>
          <text:p text:style-name="P783">Loyal customers improved business stability. </text:p>
        </text:list-item>
        <text:list-item>
          <text:p text:style-name="P783">High value customers purchased technology products frequently. </text:p>
        </text:list-item>
        <text:list-item>
          <text:p text:style-name="P784">Repeat purchases increased customer lifetime value. </text:p>
        </text:list-item>
      </text:list>
      <text:h text:style-name="P141" text:outline-level="2">13.4.3 Business Strategies for High Value Customers</text:h>
      <text:list text:style-name="L366">
        <text:list-item>
          <text:p text:style-name="P785">Personalized offers </text:p>
        </text:list-item>
        <text:list-item>
          <text:p text:style-name="P785">VIP memberships </text:p>
        </text:list-item>
        <text:list-item>
          <text:p text:style-name="P785">Loyalty rewards </text:p>
        </text:list-item>
        <text:list-item>
          <text:p text:style-name="P785">Exclusive discounts </text:p>
        </text:list-item>
        <text:list-item>
          <text:p text:style-name="P786">Premium customer support </text:p>
        </text:list-item>
      </text:list>
      <text:h text:style-name="P165" text:outline-level="1">13.5 Low Value Customers</text:h>
      <text:p text:style-name="P66">Low value customers contribute less revenue and show lower engagement.</text:p>
      <text:p text:style-name="P66">These customers generally have:</text:p>
      <text:list text:style-name="L367">
        <text:list-item>
          <text:p text:style-name="P787">Low Frequency </text:p>
        </text:list-item>
        <text:list-item>
          <text:p text:style-name="P787">Low Monetary Value </text:p>
        </text:list-item>
        <text:list-item>
          <text:p text:style-name="P788">High Recency </text:p>
        </text:list-item>
      </text:list>
      <text:h text:style-name="P141" text:outline-level="2"><text:soft-page-break/>13.5.1 Characteristics of Low Value Customers</text:h>
      <text:list text:style-name="L368">
        <text:list-item>
          <text:p text:style-name="P789">Infrequent purchases </text:p>
        </text:list-item>
        <text:list-item>
          <text:p text:style-name="P789">Low spending </text:p>
        </text:list-item>
        <text:list-item>
          <text:p text:style-name="P789">Reduced engagement </text:p>
        </text:list-item>
        <text:list-item>
          <text:p text:style-name="P790">Irregular transactions </text:p>
        </text:list-item>
      </text:list>
      <text:h text:style-name="P141" text:outline-level="2">13.5.2 Insights About Low Value Customers</text:h>
      <text:list text:style-name="L369">
        <text:list-item>
          <text:p text:style-name="P791">Some customers purchased only once. </text:p>
        </text:list-item>
        <text:list-item>
          <text:p text:style-name="P791">Inactive customers reduced retention rates. </text:p>
        </text:list-item>
        <text:list-item>
          <text:p text:style-name="P792">Low engagement customers required marketing attention. </text:p>
        </text:list-item>
      </text:list>
      <text:h text:style-name="P141" text:outline-level="2">13.5.3 Business Strategies for Low Value Customers</text:h>
      <text:list text:style-name="L370">
        <text:list-item>
          <text:p text:style-name="P793">Promotional campaigns </text:p>
        </text:list-item>
        <text:list-item>
          <text:p text:style-name="P793">Discount offers </text:p>
        </text:list-item>
        <text:list-item>
          <text:p text:style-name="P793">Product recommendations </text:p>
        </text:list-item>
        <text:list-item>
          <text:p text:style-name="P793">Email marketing </text:p>
        </text:list-item>
        <text:list-item>
          <text:p text:style-name="P794">Re engagement programs </text:p>
        </text:list-item>
      </text:list>
      <text:h text:style-name="P165" text:outline-level="1">13.6 Product Category Analysis</text:h>
      <text:p text:style-name="P66">Product category analysis evaluates product performance and profitability.</text:p>
      <text:h text:style-name="P141" text:outline-level="2">13.6.1 Technology Category Analysis</text:h>
      <text:h text:style-name="P23" text:outline-level="3">Insights</text:h>
      <text:list text:style-name="L371">
        <text:list-item>
          <text:p text:style-name="P795">Technology products generated highest sales. </text:p>
        </text:list-item>
        <text:list-item>
          <text:p text:style-name="P795">Technology category produced strong profit margins. </text:p>
        </text:list-item>
        <text:list-item>
          <text:p text:style-name="P796">Customers preferred electronic products frequently. </text:p>
        </text:list-item>
      </text:list>
      <text:h text:style-name="P23" text:outline-level="3">Business Importance</text:h>
      <text:list text:style-name="L372">
        <text:list-item>
          <text:p text:style-name="P797">Supports investment decisions </text:p>
        </text:list-item>
        <text:list-item>
          <text:p text:style-name="P797">Improves product strategy </text:p>
        </text:list-item>
        <text:list-item>
          <text:p text:style-name="P798">Supports inventory management </text:p>
        </text:list-item>
      </text:list>
      <text:h text:style-name="P141" text:outline-level="2">13.6.2 Furniture Category Analysis</text:h>
      <text:h text:style-name="P23" text:outline-level="3">Insights</text:h>
      <text:list text:style-name="L373">
        <text:list-item>
          <text:p text:style-name="P799">Furniture products generated moderate sales. </text:p>
        </text:list-item>
        <text:list-item>
          <text:p text:style-name="P799">Discounts reduced profitability. </text:p>
        </text:list-item>
        <text:list-item>
          <text:p text:style-name="P800">Shipping costs affected margins. </text:p>
        </text:list-item>
      </text:list>
      <text:h text:style-name="P23" text:outline-level="3">Business Importance</text:h>
      <text:list text:style-name="L374">
        <text:list-item>
          <text:p text:style-name="P801">Helps optimize pricing </text:p>
        </text:list-item>
        <text:list-item>
          <text:p text:style-name="P801">Improves discount strategy </text:p>
        </text:list-item>
        <text:list-item>
          <text:p text:style-name="P802">Supports logistics planning </text:p>
        </text:list-item>
      </text:list>
      <text:h text:style-name="P61" text:outline-level="2"><text:soft-page-break/>13.6.3 Office Supplies Analysis</text:h>
      <text:h text:style-name="P23" text:outline-level="3">Insights</text:h>
      <text:list text:style-name="L375">
        <text:list-item>
          <text:p text:style-name="P803">Office Supplies generated stable demand. </text:p>
        </text:list-item>
        <text:list-item>
          <text:p text:style-name="P803">Repeat purchases improved category performance. </text:p>
        </text:list-item>
        <text:list-item>
          <text:p text:style-name="P804">Business customers contributed strongly. </text:p>
        </text:list-item>
      </text:list>
      <text:h text:style-name="P23" text:outline-level="3">Business Importance</text:h>
      <text:list text:style-name="L376">
        <text:list-item>
          <text:p text:style-name="P805">Supports recurring revenue </text:p>
        </text:list-item>
        <text:list-item>
          <text:p text:style-name="P806">Helps maintain stable sales </text:p>
        </text:list-item>
      </text:list>
      <text:h text:style-name="P165" text:outline-level="1">13.7 Revenue Contribution Analysis</text:h>
      <text:p text:style-name="P66">Revenue contribution analysis identifies which customers, products, and regions contribute most to revenue.</text:p>
      <text:h text:style-name="P141" text:outline-level="2">13.7.1 Customer Revenue Contribution</text:h>
      <text:h text:style-name="P23" text:outline-level="3">Insights</text:h>
      <text:list text:style-name="L377">
        <text:list-item>
          <text:p text:style-name="P807">Premium customers generated large sales percentages. </text:p>
        </text:list-item>
        <text:list-item>
          <text:p text:style-name="P807">Loyal customers improved recurring revenue. </text:p>
        </text:list-item>
        <text:list-item>
          <text:p text:style-name="P808">Small customer groups contributed major business revenue. </text:p>
        </text:list-item>
      </text:list>
      <text:h text:style-name="P23" text:outline-level="3">Business Benefits</text:h>
      <text:list text:style-name="L378">
        <text:list-item>
          <text:p text:style-name="P809">Supports customer prioritisation </text:p>
        </text:list-item>
        <text:list-item>
          <text:p text:style-name="P809">Improves customer relationship management </text:p>
        </text:list-item>
        <text:list-item>
          <text:p text:style-name="P810">Helps optimize marketing budgets </text:p>
        </text:list-item>
      </text:list>
      <text:h text:style-name="P141" text:outline-level="2">1<text:span text:style-name="T14">3.7.2 Product Revenue Contributio</text:span><text:span text:style-name="T24">n</text:span></text:h>
      <text:h text:style-name="P23" text:outline-level="3">Insights</text:h>
      <text:list text:style-name="L379">
        <text:list-item>
          <text:p text:style-name="P811">Technology products contributed highest revenue. </text:p>
        </text:list-item>
        <text:list-item>
          <text:p text:style-name="P811">Some products generated high sales but low profit. </text:p>
        </text:list-item>
        <text:list-item>
          <text:p text:style-name="P812">Product demand varied by category. </text:p>
        </text:list-item>
      </text:list>
      <text:h text:style-name="P141" text:outline-level="2">13.7.3 Regional Revenue Contribution</text:h>
      <text:h text:style-name="P23" text:outline-level="3">Insights</text:h>
      <text:list text:style-name="L380">
        <text:list-item>
          <text:p text:style-name="P813">Western region generated highest revenue. </text:p>
        </text:list-item>
        <text:list-item>
          <text:p text:style-name="P813">Regional performance differences affected profitability. </text:p>
        </text:list-item>
        <text:list-item>
          <text:p text:style-name="P814">Certain regions showed high growth potential. </text:p>
        </text:list-item>
      </text:list>
      <text:h text:style-name="P165" text:outline-level="1">13.8 Customer Retention Insights</text:h>
      <text:p text:style-name="P66">Customer retention is one of the most important business objectives.</text:p>
      <text:p text:style-name="P66">Retaining existing customers is more profitable than acquiring new customers.</text:p>
      <text:h text:style-name="P141" text:outline-level="2"><text:soft-page-break/>13.8.1 Loyal Customer Retention</text:h>
      <text:h text:style-name="P23" text:outline-level="3">Insights</text:h>
      <text:list text:style-name="L381">
        <text:list-item>
          <text:p text:style-name="P815">Frequent customers improved business stability. </text:p>
        </text:list-item>
        <text:list-item>
          <text:p text:style-name="P815">Loyalty programs increased engagement. </text:p>
        </text:list-item>
        <text:list-item>
          <text:p text:style-name="P816">Repeat buyers contributed long term revenue. </text:p>
        </text:list-item>
      </text:list>
      <text:h text:style-name="P158" text:outline-level="3">Strategies</text:h>
      <text:list text:style-name="L382">
        <text:list-item>
          <text:p text:style-name="P817">Reward programs </text:p>
        </text:list-item>
        <text:list-item>
          <text:p text:style-name="P817">Personalized communication </text:p>
        </text:list-item>
        <text:list-item>
          <text:p text:style-name="P818">Customer appreciation campaigns </text:p>
        </text:list-item>
      </text:list>
      <text:h text:style-name="P15" text:outline-level="2">13.8.2 At Risk Customer Insights</text:h>
      <text:h text:style-name="P23" text:outline-level="3">Insights</text:h>
      <text:list text:style-name="L383">
        <text:list-item>
          <text:p text:style-name="P819">Some customers showed declining activity. </text:p>
        </text:list-item>
        <text:list-item>
          <text:p text:style-name="P819">Long inactivity periods reduced retention. </text:p>
        </text:list-item>
        <text:list-item>
          <text:p text:style-name="P820">Customers required reactivation strategies. </text:p>
        </text:list-item>
      </text:list>
      <text:h text:style-name="P23" text:outline-level="3">Strategies</text:h>
      <text:list text:style-name="L384">
        <text:list-item>
          <text:p text:style-name="P821">Reminder emails </text:p>
        </text:list-item>
        <text:list-item>
          <text:p text:style-name="P821">Discount offers </text:p>
        </text:list-item>
        <text:list-item>
          <text:p text:style-name="P822">Win back campaigns </text:p>
        </text:list-item>
      </text:list>
      <text:h text:style-name="P61" text:outline-level="2">13.8.3 Lost Customer Analysis</text:h>
      <text:h text:style-name="P23" text:outline-level="3">Insights</text:h>
      <text:list text:style-name="L385">
        <text:list-item>
          <text:p text:style-name="P823">Lost customers reduced long term business growth. </text:p>
        </text:list-item>
        <text:list-item>
          <text:p text:style-name="P823">High Recency values indicated inactivity. </text:p>
        </text:list-item>
        <text:list-item>
          <text:p text:style-name="P824">Customer engagement programs were necessary. </text:p>
        </text:list-item>
      </text:list>
      <text:h text:style-name="P23" text:outline-level="3">Strategies</text:h>
      <text:list text:style-name="L386">
        <text:list-item>
          <text:p text:style-name="P825">Re engagement campaigns </text:p>
        </text:list-item>
        <text:list-item>
          <text:p text:style-name="P825">Personalized recommendations </text:p>
        </text:list-item>
        <text:list-item>
          <text:p text:style-name="P826">Seasonal offers </text:p>
        </text:list-item>
      </text:list>
      <text:h text:style-name="P60" text:outline-level="1">13.9 Profitability Insights</text:h>
      <text:p text:style-name="P66">Profit analysis helps identify business performance and operational efficiency.</text:p>
      <text:h text:style-name="P141" text:outline-level="2">13.9.1 High Profit Products</text:h>
      <text:h text:style-name="P23" text:outline-level="3">Insights</text:h>
      <text:list text:style-name="L387">
        <text:list-item>
          <text:p text:style-name="P827">Technology products generated strong profits. </text:p>
        </text:list-item>
        <text:list-item>
          <text:p text:style-name="P827">Premium products improved margins. </text:p>
        </text:list-item>
        <text:list-item>
          <text:p text:style-name="P828">Repeat customers contributed high profitability. </text:p>
        </text:list-item>
      </text:list>
      <text:h text:style-name="P61" text:outline-level="2"><text:soft-page-break/>13.9.2 Low Profit Products</text:h>
      <text:h text:style-name="P69" text:outline-level="3">Insights</text:h>
      <text:list text:style-name="L388">
        <text:list-item>
          <text:p text:style-name="P829">Heavy discounts reduced profit margins. </text:p>
        </text:list-item>
        <text:list-item>
          <text:p text:style-name="P829">Some products generated sales but low profit. </text:p>
        </text:list-item>
        <text:list-item>
          <text:p text:style-name="P830">Shipping costs affected profitability. </text:p>
        </text:list-item>
      </text:list>
      <text:h text:style-name="P141" text:outline-level="2">13.9.<text:span text:style-name="T12">3 Profit Margin Analysis</text:span></text:h>
      <text:p text:style-name="P66">Formula:</text:p>
      <text:h text:style-name="P23" text:outline-level="3">Insights</text:h>
      <text:list text:style-name="L389">
        <text:list-item>
          <text:p text:style-name="P831">High sales do not always produce high profit. </text:p>
        </text:list-item>
        <text:list-item>
          <text:p text:style-name="P831">Pricing strategies affect profitability. </text:p>
        </text:list-item>
        <text:list-item>
          <text:p text:style-name="P832">Profit margins vary across categories. </text:p>
        </text:list-item>
      </text:list>
      <text:h text:style-name="P165" text:outline-level="1"><text:span text:style-name="T13">13.10 Dashboard Based Insight</text:span>s</text:h>
      <text:p text:style-name="P66">Power BI dashboards generated visual business insights.</text:p>
      <text:h text:style-name="P15" text:outline-level="2">13.10.1 KPI Insights</text:h>
      <text:p text:style-name="P66"><text:span text:style-name="T12">Important KPIs analyzed</text:span>:</text:p>
      <text:list text:style-name="L390">
        <text:list-item>
          <text:p text:style-name="P833">Total Sales </text:p>
        </text:list-item>
        <text:list-item>
          <text:p text:style-name="P833">Total Profit </text:p>
        </text:list-item>
        <text:list-item>
          <text:p text:style-name="P833">Customer Count </text:p>
        </text:list-item>
        <text:list-item>
          <text:p text:style-name="P833">Average Sales </text:p>
        </text:list-item>
        <text:list-item>
          <text:p text:style-name="P833">Frequency Score </text:p>
        </text:list-item>
        <text:list-item>
          <text:p text:style-name="P834">Monetary Value </text:p>
        </text:list-item>
      </text:list>
      <text:h text:style-name="P61" text:outline-level="2">13.10.2 Visualization Insights</text:h>
      <text:h text:style-name="P23" text:outline-level="3">Bar Charts</text:h>
      <text:p text:style-name="P66">Used for category comparison.</text:p>
      <text:h text:style-name="P23" text:outline-level="3">Line Charts</text:h>
      <text:p text:style-name="P66">Used for sales trend analysis.</text:p>
      <text:h text:style-name="P23" text:outline-level="3">Scatter Charts</text:h>
      <text:p text:style-name="P66">Used for RFM segmentation analysis.</text:p>
      <text:h text:style-name="P23" text:outline-level="3">Pie Charts</text:h>
      <text:p text:style-name="P66">Used for regional contribution analysis.</text:p>
      <text:h text:style-name="P60" text:outline-level="1">13.11 Business Recommendations</text:h>
      <text:p text:style-name="P66"><text:span text:style-name="T13">Based on analysis, several busines</text:span>s recommendations are proposed.</text:p>
      <text:h text:style-name="P141" text:outline-level="2"><text:soft-page-break/>Customer Recommendations</text:h>
      <text:list text:style-name="L391">
        <text:list-item>
          <text:p text:style-name="P835">Focus on premium customers </text:p>
        </text:list-item>
        <text:list-item>
          <text:p text:style-name="P835">Improve loyalty programs </text:p>
        </text:list-item>
        <text:list-item>
          <text:p text:style-name="P835">Re engage inactive customers </text:p>
        </text:list-item>
        <text:list-item>
          <text:p text:style-name="P836">Personalise marketing campaigns </text:p>
        </text:list-item>
      </text:list>
      <text:h text:style-name="P141" text:outline-level="2">Product Recommendations</text:h>
      <text:list text:style-name="L392">
        <text:list-item>
          <text:p text:style-name="P837">Increase focus on profitable products </text:p>
        </text:list-item>
        <text:list-item>
          <text:p text:style-name="P837">Reduce excessive discounts </text:p>
        </text:list-item>
        <text:list-item>
          <text:p text:style-name="P838">Improve inventory planning </text:p>
        </text:list-item>
      </text:list>
      <text:h text:style-name="P141" text:outline-level="2">Marketing Recommendations</text:h>
      <text:list text:style-name="L393">
        <text:list-item>
          <text:p text:style-name="P839">Use targeted marketing campaigns </text:p>
        </text:list-item>
        <text:list-item>
          <text:p text:style-name="P839">Focus on high value customers </text:p>
        </text:list-item>
        <text:list-item>
          <text:p text:style-name="P840">Improve seasonal promotions </text:p>
        </text:list-item>
      </text:list>
      <text:h text:style-name="P141" text:outline-level="2">Operational Recommendations</text:h>
      <text:list text:style-name="L394">
        <text:list-item>
          <text:p text:style-name="P841">Improve shipping efficiency </text:p>
        </text:list-item>
        <text:list-item>
          <text:p text:style-name="P841">Optimize regional operations </text:p>
        </text:list-item>
        <text:list-item>
          <text:p text:style-name="P842">Improve reporting systems </text:p>
        </text:list-item>
      </text:list>
      <text:h text:style-name="P60" text:outline-level="1">13.12 Advantages of Business Insights</text:h>
      <text:list text:style-name="L395">
        <text:list-item>
          <text:p text:style-name="P843">Better customer understanding </text:p>
        </text:list-item>
        <text:list-item>
          <text:p text:style-name="P844">Improved profitability </text:p>
        </text:list-item>
        <text:list-item>
          <text:p text:style-name="P844">Better decision making </text:p>
        </text:list-item>
        <text:list-item>
          <text:p text:style-name="P844">Improved customer retention </text:p>
        </text:list-item>
        <text:list-item>
          <text:p text:style-name="P844">Increased sales performance </text:p>
        </text:list-item>
        <text:list-item>
          <text:p text:style-name="P844">Better marketing effectiveness </text:p>
        </text:list-item>
        <text:list-item>
          <text:p text:style-name="P845">Improved operational efficiency </text:p>
        </text:list-item>
      </text:list>
      <text:h text:style-name="P60" text:outline-level="1">13.13 Challenges During Analysis</text:h>
      <text:p text:style-name="P66"><text:span text:style-name="T12">Several analytical challenges occu</text:span>rred during the project.</text:p>
      <text:list text:style-name="L396">
        <text:list-item>
          <text:p text:style-name="P846">Missing values </text:p>
        </text:list-item>
        <text:list-item>
          <text:p text:style-name="P846">Duplicate records </text:p>
        </text:list-item>
        <text:list-item>
          <text:p text:style-name="P846">Inconsistent customer data </text:p>
        </text:list-item>
        <text:list-item>
          <text:p text:style-name="P846">Complex segmentation logic </text:p>
        </text:list-item>
        <text:list-item>
          <text:p text:style-name="P847">Profitability variations </text:p>
        </text:list-item>
      </text:list>
      <text:p text:style-name="P66">These challenges were solved using preprocessing and transformation techniques.</text:p>
      <text:h text:style-name="P60" text:outline-level="1">13.14 Conclusion</text:h>
      <text:p text:style-name="P66"><text:span text:style-name="T12">This chapter explained t</text:span>he detailed data analysis and business insights generated from the Customer Segmentation using RFM Analysis project.</text:p>
      <text:p text:style-name="P66"><text:soft-page-break/>The chapter discussed sales analysis, customer behavior, high value customers, low value customers, product category analysis, revenue contribution analysis, profitability insights, customer retention insights, dashboard findings, and business recommendations.</text:p>
      <text:p text:style-name="P66">The analysis demonstrated how SQL, Python, and Power BI can transform raw customer transaction data into meaningful business intelligence that supports customer retention, profitability improvement, marketing optimization, and strategic decision making.</text:p>
      <text:p text:style-name="P66">The next chapter explains the final conclusion and future scope of the project including project achievements, limitations, business impact, and future enhancements.</text:p>
      <text:h text:style-name="P9" text:outline-level="1"><text:span text:style-name="Strong_20_Emphasis"><text:span text:style-name="T8">CHAPTER 14</text:span></text:span></text:h>
      <text:h text:style-name="P59" text:outline-level="1">CONCLUSION</text:h>
      <text:h text:style-name="P515" text:outline-level="2">14.1 Summary of the Project</text:h>
      <text:p text:style-name="P66">The project titled “Customer Segmentation using RFM Analysis on Online Super Store Dataset” was developed to analyze customer purchasing behavior and generate meaningful business insights using SQL, Python, and Power BI.</text:p>
      <text:p text:style-name="P66">The project focused on transforming raw transactional data into analytical information that supports business intelligence and customer relationship management. The Online Super Store dataset was cleaned, transformed, and modeled using star schema architecture to improve reporting efficiency and analytical performance.</text:p>
      <text:p text:style-name="P66">The project workflow included:</text:p>
      <text:list text:style-name="L397">
        <text:list-item>
          <text:p text:style-name="P848">Dataset collection </text:p>
        </text:list-item>
        <text:list-item>
          <text:p text:style-name="P848">Data cleaning and preprocessing </text:p>
        </text:list-item>
        <text:list-item>
          <text:p text:style-name="P848">Data transformation </text:p>
        </text:list-item>
        <text:list-item>
          <text:p text:style-name="P848">Star schema modelling </text:p>
        </text:list-item>
        <text:list-item>
          <text:p text:style-name="P848">SQL implementation </text:p>
        </text:list-item>
        <text:list-item>
          <text:p text:style-name="P848">Python based analysis </text:p>
        </text:list-item>
        <text:list-item>
          <text:p text:style-name="P848">Power BI dashboard development </text:p>
        </text:list-item>
        <text:list-item>
          <text:p text:style-name="P848">RFM customer segmentation </text:p>
        </text:list-item>
        <text:list-item>
          <text:p text:style-name="P849">Business insights generation </text:p>
        </text:list-item>
      </text:list>
      <text:p text:style-name="P66">RFM Analysis was used to classify customers based on:</text:p>
      <text:list text:style-name="L398">
        <text:list-item>
          <text:p text:style-name="P850">Recency </text:p>
        </text:list-item>
        <text:list-item>
          <text:p text:style-name="P850">Frequency </text:p>
        </text:list-item>
        <text:list-item>
          <text:p text:style-name="P851">Monetary Value </text:p>
        </text:list-item>
      </text:list>
      <text:p text:style-name="P66">Using these metrics, customers were segmented into:</text:p>
      <text:list text:style-name="L399">
        <text:list-item>
          <text:p text:style-name="P852">Premium Customers </text:p>
        </text:list-item>
        <text:list-item>
          <text:p text:style-name="P852">Loyal Customers </text:p>
        </text:list-item>
        <text:list-item>
          <text:p text:style-name="P852">Potential Customers </text:p>
        </text:list-item>
        <text:list-item>
          <text:p text:style-name="P852">At Risk Customers </text:p>
        </text:list-item>
        <text:list-item>
          <text:p text:style-name="P853">Lost Customers </text:p>
        </text:list-item>
      </text:list>
      <text:p text:style-name="P66"><text:soft-page-break/>The project successfully demonstrated how customer transaction data can be transformed into meaningful business intelligence for decision making.</text:p>
      <text:h text:style-name="P165" text:outline-level="1">14.2 Key Findings</text:h>
      <text:p text:style-name="P66">Several important findings were generated during the project analysis.</text:p>
      <text:h text:style-name="P141" text:outline-level="2">14.2.1 Customer Insights</text:h>
      <text:list text:style-name="L400">
        <text:list-item>
          <text:p text:style-name="P854">Premium customers generated major revenue contribution. </text:p>
        </text:list-item>
        <text:list-item>
          <text:p text:style-name="P854">Loyal customers improved repeat business. </text:p>
        </text:list-item>
        <text:list-item>
          <text:p text:style-name="P854">Recently active customers showed higher engagement. </text:p>
        </text:list-item>
        <text:list-item>
          <text:p text:style-name="P854">Inactive customers required re engagement strategies. </text:p>
        </text:list-item>
        <text:list-item>
          <text:p text:style-name="P855">Small customer groups contributed significant sales revenue. </text:p>
        </text:list-item>
      </text:list>
      <text:h text:style-name="P141" text:outline-level="2">14.2.2 Sales Insights</text:h>
      <text:list text:style-name="L401">
        <text:list-item>
          <text:p text:style-name="P856">Technology products generated highest sales. </text:p>
        </text:list-item>
        <text:list-item>
          <text:p text:style-name="P856">Office Supplies maintained consistent demand. </text:p>
        </text:list-item>
        <text:list-item>
          <text:p text:style-name="P856">Seasonal trends affected monthly sales performance. </text:p>
        </text:list-item>
        <text:list-item>
          <text:p text:style-name="P857">Regional sales performance varied significantly. </text:p>
        </text:list-item>
      </text:list>
      <text:h text:style-name="P141" text:outline-level="2">14.2.3 Profit Insights</text:h>
      <text:list text:style-name="L402">
        <text:list-item>
          <text:p text:style-name="P858">High sales did not always produce high profit. </text:p>
        </text:list-item>
        <text:list-item>
          <text:p text:style-name="P858">Excessive discounts reduced profitability. </text:p>
        </text:list-item>
        <text:list-item>
          <text:p text:style-name="P858">Technology category generated better profit margins. </text:p>
        </text:list-item>
        <text:list-item>
          <text:p text:style-name="P859">Some products generated strong revenue but low profit. </text:p>
        </text:list-item>
      </text:list>
      <text:h text:style-name="P141" text:outline-level="2">14.2.4 Dashboard Insights</text:h>
      <text:list text:style-name="L403">
        <text:list-item>
          <text:p text:style-name="P860">KPI dashboards improved business reporting. </text:p>
        </text:list-item>
        <text:list-item>
          <text:p text:style-name="P860">Interactive visualizations simplified analytical interpretation. </text:p>
        </text:list-item>
        <text:list-item>
          <text:p text:style-name="P860">Power BI dashboards improved decision making efficiency. </text:p>
        </text:list-item>
        <text:list-item>
          <text:p text:style-name="P861">Customer segmentation dashboards improved marketing analysis. </text:p>
        </text:list-item>
      </text:list>
      <text:h text:style-name="P165" text:outline-level="1">14.3 Business Impact</text:h>
      <text:p text:style-name="P66">The project provides several important business benefits and practical applications.</text:p>
      <text:h text:style-name="P141" text:outline-level="2">Improved Customer Retention</text:h>
      <text:p text:style-name="P66">RFM Analysis helps organizations identify loyal customers and inactive customers.</text:p>
      <text:p text:style-name="P66">Benefits include:</text:p>
      <text:list text:style-name="L404">
        <text:list-item>
          <text:p text:style-name="P862">Better customer engagement </text:p>
        </text:list-item>
        <text:list-item>
          <text:p text:style-name="P862">Improved retention campaigns </text:p>
        </text:list-item>
        <text:list-item>
          <text:p text:style-name="P862">Reduced customer loss </text:p>
        </text:list-item>
        <text:list-item>
          <text:p text:style-name="P863">Increased repeat purchases </text:p>
        </text:list-item>
      </text:list>
      <text:h text:style-name="P141" text:outline-level="2">Better Marketing Strategies</text:h>
      <text:p text:style-name="P66">Customer segmentation improves targeted marketing.</text:p>
      <text:p text:style-name="P66">Benefits include:</text:p>
      <text:list text:style-name="L405">
        <text:list-item>
          <text:p text:style-name="P864"><text:soft-page-break/>Personalized campaigns </text:p>
        </text:list-item>
        <text:list-item>
          <text:p text:style-name="P864">Better promotional strategies </text:p>
        </text:list-item>
        <text:list-item>
          <text:p text:style-name="P864">Improved marketing efficiency </text:p>
        </text:list-item>
        <text:list-item>
          <text:p text:style-name="P865">Better customer targeting </text:p>
        </text:list-item>
      </text:list>
      <text:h text:style-name="P141" text:outline-level="2">Increased Profitability</text:h>
      <text:p text:style-name="P66">The project helps businesses identify profitable products and high value customers.</text:p>
      <text:p text:style-name="P66">Benefits include:</text:p>
      <text:list text:style-name="L406">
        <text:list-item>
          <text:p text:style-name="P866">Better pricing strategies </text:p>
        </text:list-item>
        <text:list-item>
          <text:p text:style-name="P866">Improved revenue optimization </text:p>
        </text:list-item>
        <text:list-item>
          <text:p text:style-name="P866">Increased profit margins </text:p>
        </text:list-item>
        <text:list-item>
          <text:p text:style-name="P867">Better product investment decisions </text:p>
        </text:list-item>
      </text:list>
      <text:h text:style-name="P141" text:outline-level="2">Improved Business Intelligence</text:h>
      <text:p text:style-name="P66">Power BI dashboards provide interactive business reporting.</text:p>
      <text:p text:style-name="P66">Benefits include:</text:p>
      <text:list text:style-name="L407">
        <text:list-item>
          <text:p text:style-name="P868">Faster reporting </text:p>
        </text:list-item>
        <text:list-item>
          <text:p text:style-name="P868">Real time analytical understanding </text:p>
        </text:list-item>
        <text:list-item>
          <text:p text:style-name="P868">Better visualization </text:p>
        </text:list-item>
        <text:list-item>
          <text:p text:style-name="P869">Improved management decisions </text:p>
        </text:list-item>
      </text:list>
      <text:h text:style-name="P141" text:outline-level="2">Improved Operational Efficiency</text:h>
      <text:p text:style-name="P66">The project supports operational improvement through analytics.</text:p>
      <text:p text:style-name="P66">Benefits include:</text:p>
      <text:list text:style-name="L408">
        <text:list-item>
          <text:p text:style-name="P870">Better inventory planning </text:p>
        </text:list-item>
        <text:list-item>
          <text:p text:style-name="P870">Improved regional operations </text:p>
        </text:list-item>
        <text:list-item>
          <text:p text:style-name="P870">Better sales forecasting </text:p>
        </text:list-item>
        <text:list-item>
          <text:p text:style-name="P871">Improved customer management </text:p>
        </text:list-item>
      </text:list>
      <text:h text:style-name="P165" text:outline-level="1">14.4 Learning Outcomes</text:h>
      <text:p text:style-name="P66">The project provided practical learning experience in multiple analytical and technical domains.</text:p>
      <text:h text:style-name="P141" text:outline-level="2">SQL Learning Outcomes</text:h>
      <text:p text:style-name="P66">The project improved practical SQL knowledge including:</text:p>
      <text:list text:style-name="L409">
        <text:list-item>
          <text:p text:style-name="P872">Database creation </text:p>
        </text:list-item>
        <text:list-item>
          <text:p text:style-name="P872">Table creation </text:p>
        </text:list-item>
        <text:list-item>
          <text:p text:style-name="P872">Data querying </text:p>
        </text:list-item>
        <text:list-item>
          <text:p text:style-name="P872">Aggregation functions </text:p>
        </text:list-item>
        <text:list-item>
          <text:p text:style-name="P872">JOIN operations </text:p>
        </text:list-item>
        <text:list-item>
          <text:p text:style-name="P872">Window functions </text:p>
        </text:list-item>
        <text:list-item>
          <text:p text:style-name="P873">Analytical reporting </text:p>
        </text:list-item>
      </text:list>
      <text:h text:style-name="P141" text:outline-level="2"><text:soft-page-break/>Python Learning Outcomes</text:h>
      <text:p text:style-name="P66">The project improved Python analytical skills including:</text:p>
      <text:list text:style-name="L410">
        <text:list-item>
          <text:p text:style-name="P874">Data preprocessing </text:p>
        </text:list-item>
        <text:list-item>
          <text:p text:style-name="P874">Data cleaning </text:p>
        </text:list-item>
        <text:list-item>
          <text:p text:style-name="P874">Exploratory Data Analysis </text:p>
        </text:list-item>
        <text:list-item>
          <text:p text:style-name="P874">Data visualization </text:p>
        </text:list-item>
        <text:list-item>
          <text:p text:style-name="P874">RFM calculations </text:p>
        </text:list-item>
        <text:list-item>
          <text:p text:style-name="P874">Customer segmentation </text:p>
        </text:list-item>
        <text:list-item>
          <text:p text:style-name="P875">Dataset exporting </text:p>
        </text:list-item>
      </text:list>
      <text:h text:style-name="P141" text:outline-level="2">Power BI Learning Outcomes</text:h>
      <text:p text:style-name="P66">The project improved Power BI skills including:</text:p>
      <text:list text:style-name="L411">
        <text:list-item>
          <text:p text:style-name="P876">Data modeling </text:p>
        </text:list-item>
        <text:list-item>
          <text:p text:style-name="P876">DAX calculations </text:p>
        </text:list-item>
        <text:list-item>
          <text:p text:style-name="P876">KPI development </text:p>
        </text:list-item>
        <text:list-item>
          <text:p text:style-name="P876">Dashboard design </text:p>
        </text:list-item>
        <text:list-item>
          <text:p text:style-name="P876">Interactive visualization </text:p>
        </text:list-item>
        <text:list-item>
          <text:p text:style-name="P877">Business intelligence reporting </text:p>
        </text:list-item>
      </text:list>
      <text:h text:style-name="P141" text:outline-level="2">Business Analytics Learning Outcomes</text:h>
      <text:p text:style-name="P66">The project improved understanding of:</text:p>
      <text:list text:style-name="L412">
        <text:list-item>
          <text:p text:style-name="P878">Customer behavior analysis </text:p>
        </text:list-item>
        <text:list-item>
          <text:p text:style-name="P878">Sales analysis </text:p>
        </text:list-item>
        <text:list-item>
          <text:p text:style-name="P878">Profitability analysis </text:p>
        </text:list-item>
        <text:list-item>
          <text:p text:style-name="P878">Business intelligence systems </text:p>
        </text:list-item>
        <text:list-item>
          <text:p text:style-name="P878">Customer segmentation techniques </text:p>
        </text:list-item>
        <text:list-item>
          <text:p text:style-name="P879">Data driven decision making </text:p>
        </text:list-item>
      </text:list>
      <text:h text:style-name="P141" text:outline-level="2">Professional Learning Outcomes</text:h>
      <text:p text:style-name="P66">The project also improved:</text:p>
      <text:list text:style-name="L413">
        <text:list-item>
          <text:p text:style-name="P880">Problem solving skills </text:p>
        </text:list-item>
        <text:list-item>
          <text:p text:style-name="P880">Analytical thinking </text:p>
        </text:list-item>
        <text:list-item>
          <text:p text:style-name="P880">Data interpretation skills </text:p>
        </text:list-item>
        <text:list-item>
          <text:p text:style-name="P880">Dashboard presentation skills </text:p>
        </text:list-item>
        <text:list-item>
          <text:p text:style-name="P880">Technical documentation skills </text:p>
        </text:list-item>
        <text:list-item>
          <text:p text:style-name="P881">Business reporting capabilities </text:p>
        </text:list-item>
      </text:list>
      <text:h text:style-name="P60" text:outline-level="1">14.5 Overall Conclusion</text:h>
      <text:p text:style-name="P66">The “Customer Segmentation using RFM Analysis on Online Super Store Dataset” project successfully demonstrated the practical implementation of business analytics using SQL, Python, and Power BI.</text:p>
      <text:p text:style-name="P66"><text:soft-page-break/>The project transformed raw customer transaction data into meaningful analytical insights using data cleaning, transformation, star schema modeling, RFM Analysis, and dashboard visualization techniques.</text:p>
      <text:p text:style-name="P66">The implementation of RFM Analysis helped identify valuable customers, customer purchasing behavior, customer retention patterns, and business growth opportunities.</text:p>
      <text:p text:style-name="P66">Power BI dashboards improved reporting quality through interactive visualizations and KPI monitoring. SQL and Python supported data preprocessing, analytical calculations, and customer segmentation processes.</text:p>
      <text:p text:style-name="P66">The project demonstrated how business intelligence systems can improve customer relationship management, profitability, sales optimization, and strategic business decision making.</text:p>
      <text:p text:style-name="P66">This project also provides a strong foundation for future analytical systems involving:</text:p>
      <text:list text:style-name="L414">
        <text:list-item>
          <text:p text:style-name="P882">Machine Learning </text:p>
        </text:list-item>
        <text:list-item>
          <text:p text:style-name="P882">Artificial Intelligence </text:p>
        </text:list-item>
        <text:list-item>
          <text:p text:style-name="P882">Predictive Analytics </text:p>
        </text:list-item>
        <text:list-item>
          <text:p text:style-name="P882">Real Time Dashboards </text:p>
        </text:list-item>
        <text:list-item>
          <text:p text:style-name="P882">Cloud Based Analytics </text:p>
        </text:list-item>
        <text:list-item>
          <text:p text:style-name="P883">Automated Recommendation Systems </text:p>
        </text:list-item>
      </text:list>
      <text:p text:style-name="P66">The project successfully achieved its objectives and provided practical exposure to modern data analytics and business intelligence technologies.</text:p>
      <text:p text:style-name="P66"/>
      <text:h text:style-name="P60" text:outline-level="1">CHAPTER 15</text:h>
      <text:h text:style-name="P60" text:outline-level="1">FUTURE SCOPE</text:h>
      <text:h text:style-name="P61" text:outline-level="2">15.1 Introduction</text:h>
      <text:p text:style-name="P66">The field of data analytics and business intelligence is continuously evolving with the advancement of Artificial Intelligence, Machine Learning, Cloud Computing, and Real Time Analytics systems. Modern organizations increasingly depend on intelligent analytical systems to improve customer engagement, operational efficiency, profitability, and strategic decision making.</text:p>
      <text:p text:style-name="P66">The current project successfully implemented Customer Segmentation using RFM Analysis with SQL, Python, and Power BI. However, the project can be further enhanced using advanced analytical technologies and intelligent business systems.</text:p>
      <text:p text:style-name="P66">This chapter explains the future scope and advanced improvements that can be integrated into the project for improving customer analytics and business intelligence capabilities.</text:p>
      <text:h text:style-name="P165" text:outline-level="1">15.2 AI Based Customer Prediction</text:h>
      <text:p text:style-name="P66">Artificial Intelligence plays an important role in modern business analytics systems. AI based customer prediction systems help organizations understand customer behavior and forecast future purchasing activities.</text:p>
      <text:p text:style-name="P66">AI systems analyze customer transaction history, behavioral patterns, preferences, and engagement levels to generate intelligent predictions.</text:p>
      <text:h text:style-name="P141" text:outline-level="2"><text:soft-page-break/>15.2.1 Importance of AI in Customer Analytics</text:h>
      <text:p text:style-name="P66">AI improves customer analytics through:</text:p>
      <text:list text:style-name="L415">
        <text:list-item>
          <text:p text:style-name="P884">Intelligent decision making </text:p>
        </text:list-item>
        <text:list-item>
          <text:p text:style-name="P884">Automated predictions </text:p>
        </text:list-item>
        <text:list-item>
          <text:p text:style-name="P884">Personalized recommendations </text:p>
        </text:list-item>
        <text:list-item>
          <text:p text:style-name="P884">Customer behavior analysis </text:p>
        </text:list-item>
        <text:list-item>
          <text:p text:style-name="P885">Automated customer engagement </text:p>
        </text:list-item>
      </text:list>
      <text:p text:style-name="P66">AI systems improve analytical accuracy and business efficiency.</text:p>
      <text:h text:style-name="P141" text:outline-level="2">15.2.2 AI Based Customer Prediction Features</text:h>
      <text:p text:style-name="P66">Future systems can include:</text:p>
      <text:list text:style-name="L416">
        <text:list-item>
          <text:p text:style-name="P886">Customer purchase prediction </text:p>
        </text:list-item>
        <text:list-item>
          <text:p text:style-name="P886">Customer churn prediction </text:p>
        </text:list-item>
        <text:list-item>
          <text:p text:style-name="P886">Product recommendation systems </text:p>
        </text:list-item>
        <text:list-item>
          <text:p text:style-name="P886">Personalized marketing suggestions </text:p>
        </text:list-item>
        <text:list-item>
          <text:p text:style-name="P887">Customer engagement prediction </text:p>
        </text:list-item>
      </text:list>
      <text:p text:style-name="P66">These systems improve customer retention and revenue generation.</text:p>
      <text:h text:style-name="P141" text:outline-level="2">15.2.3 Benefits of AI Based Prediction</text:h>
      <text:list text:style-name="L417">
        <text:list-item>
          <text:p text:style-name="P888">Better customer understanding </text:p>
        </text:list-item>
        <text:list-item>
          <text:p text:style-name="P888">Improved retention strategies </text:p>
        </text:list-item>
        <text:list-item>
          <text:p text:style-name="P888">Faster business decisions </text:p>
        </text:list-item>
        <text:list-item>
          <text:p text:style-name="P888">Personalized customer experience </text:p>
        </text:list-item>
        <text:list-item>
          <text:p text:style-name="P888">Improved marketing performance </text:p>
        </text:list-item>
        <text:list-item>
          <text:p text:style-name="P889">Increased profitability </text:p>
        </text:list-item>
      </text:list>
      <text:h text:style-name="P141" text:outline-level="2">15.2.4 Example Applications</text:h>
      <text:p text:style-name="P66">AI based systems are widely used in:</text:p>
      <text:list text:style-name="L418">
        <text:list-item>
          <text:p text:style-name="P890">E Commerce platforms </text:p>
        </text:list-item>
        <text:list-item>
          <text:p text:style-name="P890">Banking systems </text:p>
        </text:list-item>
        <text:list-item>
          <text:p text:style-name="P890">Retail businesses </text:p>
        </text:list-item>
        <text:list-item>
          <text:p text:style-name="P890">Streaming platforms </text:p>
        </text:list-item>
        <text:list-item>
          <text:p text:style-name="P891">Online recommendation systems </text:p>
        </text:list-item>
      </text:list>
      <text:p text:style-name="P66">Examples include:</text:p>
      <text:list text:style-name="L419">
        <text:list-item>
          <text:p text:style-name="P892">Product recommendation engines </text:p>
        </text:list-item>
        <text:list-item>
          <text:p text:style-name="P892">Smart shopping assistants </text:p>
        </text:list-item>
        <text:list-item>
          <text:p text:style-name="P893">Automated customer support systems </text:p>
        </text:list-item>
      </text:list>
      <text:h text:style-name="P165" text:outline-level="1">15.3 Machine Learning Integration</text:h>
      <text:p text:style-name="P66">Machine Learning is one of the most important future enhancements for customer segmentation systems.</text:p>
      <text:p text:style-name="P66"><text:soft-page-break/>Machine Learning models can automatically identify patterns, trends, and customer behavior from large datasets.</text:p>
      <text:h text:style-name="P141" text:outline-level="2">15.3.1 Importance of Machine Learning</text:h>
      <text:p text:style-name="P66">Machine Learning improves business intelligence systems through:</text:p>
      <text:list text:style-name="L420">
        <text:list-item>
          <text:p text:style-name="P894">Predictive analytics </text:p>
        </text:list-item>
        <text:list-item>
          <text:p text:style-name="P894">Automated learning </text:p>
        </text:list-item>
        <text:list-item>
          <text:p text:style-name="P894">Intelligent forecasting </text:p>
        </text:list-item>
        <text:list-item>
          <text:p text:style-name="P894">Pattern recognition </text:p>
        </text:list-item>
        <text:list-item>
          <text:p text:style-name="P895">Customer classification </text:p>
        </text:list-item>
      </text:list>
      <text:p text:style-name="P66">Machine Learning improves analytical automation and prediction accuracy.</text:p>
      <text:h text:style-name="P141" text:outline-level="2">15.3.2 Machine Learning Models for Future Integration</text:h>
      <text:p text:style-name="P66">Several Machine Learning algorithms can be integrated into the project.</text:p>
      <text:h text:style-name="P23" text:outline-level="3">Classification Models</text:h>
      <text:p text:style-name="P66">Used for:</text:p>
      <text:list text:style-name="L421">
        <text:list-item>
          <text:p text:style-name="P896">Customer churn prediction </text:p>
        </text:list-item>
        <text:list-item>
          <text:p text:style-name="P896">Customer classification </text:p>
        </text:list-item>
        <text:list-item>
          <text:p text:style-name="P897">Customer risk analysis </text:p>
        </text:list-item>
      </text:list>
      <text:p text:style-name="P66">Examples:</text:p>
      <text:list text:style-name="L422">
        <text:list-item>
          <text:p text:style-name="P898">Decision Trees </text:p>
        </text:list-item>
        <text:list-item>
          <text:p text:style-name="P898">Random Forest </text:p>
        </text:list-item>
        <text:list-item>
          <text:p text:style-name="P899">Logistic Regression </text:p>
        </text:list-item>
      </text:list>
      <text:h text:style-name="P23" text:outline-level="3">Clustering Models</text:h>
      <text:p text:style-name="P66">Used for advanced customer segmentation.</text:p>
      <text:p text:style-name="P66">Examples:</text:p>
      <text:list text:style-name="L423">
        <text:list-item>
          <text:p text:style-name="P900">K Means Clustering </text:p>
        </text:list-item>
        <text:list-item>
          <text:p text:style-name="P900">Hierarchical Clustering </text:p>
        </text:list-item>
        <text:list-item>
          <text:p text:style-name="P901">DBSCAN </text:p>
        </text:list-item>
      </text:list>
      <text:p text:style-name="P66">These models improve segmentation accuracy.</text:p>
      <text:h text:style-name="P23" text:outline-level="3">Regression Models</text:h>
      <text:p text:style-name="P66">Used for forecasting and prediction.</text:p>
      <text:p text:style-name="P66">Applications include:</text:p>
      <text:list text:style-name="L424">
        <text:list-item>
          <text:p text:style-name="P902">Sales forecasting </text:p>
        </text:list-item>
        <text:list-item>
          <text:p text:style-name="P902">Revenue prediction </text:p>
        </text:list-item>
        <text:list-item>
          <text:p text:style-name="P903">Demand forecasting </text:p>
        </text:list-item>
      </text:list>
      <text:p text:style-name="P66">Examples:</text:p>
      <text:list text:style-name="L425">
        <text:list-item>
          <text:p text:style-name="P904">Linear Regression </text:p>
        </text:list-item>
        <text:list-item>
          <text:p text:style-name="P905"><text:soft-page-break/>Polynomial Regression </text:p>
        </text:list-item>
      </text:list>
      <text:h text:style-name="P141" text:outline-level="2">15.3.3 Customer Churn Prediction</text:h>
      <text:p text:style-name="P66">Customer churn prediction identifies customers likely to stop purchasing.</text:p>
      <text:p text:style-name="P66">Benefits include:</text:p>
      <text:list text:style-name="L426">
        <text:list-item>
          <text:p text:style-name="P906">Early customer risk detection </text:p>
        </text:list-item>
        <text:list-item>
          <text:p text:style-name="P906">Improved retention campaigns </text:p>
        </text:list-item>
        <text:list-item>
          <text:p text:style-name="P906">Better customer engagement </text:p>
        </text:list-item>
        <text:list-item>
          <text:p text:style-name="P907">Reduced customer loss </text:p>
        </text:list-item>
      </text:list>
      <text:h text:style-name="P141" text:outline-level="2">15.3.4 Recommendation Systems</text:h>
      <text:p text:style-name="P66">Recommendation systems suggest products based on customer behavior.</text:p>
      <text:p text:style-name="P66">Benefits include:</text:p>
      <text:list text:style-name="L427">
        <text:list-item>
          <text:p text:style-name="P908">Personalized shopping experience </text:p>
        </text:list-item>
        <text:list-item>
          <text:p text:style-name="P908">Increased product sales </text:p>
        </text:list-item>
        <text:list-item>
          <text:p text:style-name="P908">Improved customer satisfaction </text:p>
        </text:list-item>
        <text:list-item>
          <text:p text:style-name="P909">Better engagement </text:p>
        </text:list-item>
      </text:list>
      <text:p text:style-name="P66">Examples:</text:p>
      <text:list text:style-name="L428">
        <text:list-item>
          <text:p text:style-name="P910">Amazon product recommendations </text:p>
        </text:list-item>
        <text:list-item>
          <text:p text:style-name="P911">Netflix movie recommendations </text:p>
        </text:list-item>
      </text:list>
      <text:h text:style-name="P141" text:outline-level="2">15.3.5 Benefits of Machine Learning Integration</text:h>
      <text:list text:style-name="L429">
        <text:list-item>
          <text:p text:style-name="P912">Improved prediction accuracy </text:p>
        </text:list-item>
        <text:list-item>
          <text:p text:style-name="P912">Better customer targeting </text:p>
        </text:list-item>
        <text:list-item>
          <text:p text:style-name="P912">Intelligent automation </text:p>
        </text:list-item>
        <text:list-item>
          <text:p text:style-name="P912">Faster analysis </text:p>
        </text:list-item>
        <text:list-item>
          <text:p text:style-name="P912">Improved decision making </text:p>
        </text:list-item>
        <text:list-item>
          <text:p text:style-name="P913">Better forecasting capabilities </text:p>
        </text:list-item>
      </text:list>
      <text:h text:style-name="P165" text:outline-level="1">15.4 Real Time Dashboard Development</text:h>
      <text:p text:style-name="P66">The current project mainly uses historical data analysis. Future systems can support real time business intelligence dashboards.</text:p>
      <text:p text:style-name="P66">Real time dashboards display continuously updated business information.</text:p>
      <text:h text:style-name="P141" text:outline-level="2">15.4.1 Importance of Real Time Analytics</text:h>
      <text:p text:style-name="P66">Real time analytics provides:</text:p>
      <text:list text:style-name="L430">
        <text:list-item>
          <text:p text:style-name="P914">Instant business insights </text:p>
        </text:list-item>
        <text:list-item>
          <text:p text:style-name="P914">Live KPI monitoring </text:p>
        </text:list-item>
        <text:list-item>
          <text:p text:style-name="P914">Faster decision making </text:p>
        </text:list-item>
        <text:list-item>
          <text:p text:style-name="P914">Immediate problem detection </text:p>
        </text:list-item>
        <text:list-item>
          <text:p text:style-name="P915">Improved operational efficiency </text:p>
        </text:list-item>
      </text:list>
      <text:h text:style-name="P141" text:outline-level="2"><text:soft-page-break/>15.4.2 Features of Real Time Dashboards</text:h>
      <text:p text:style-name="P66">Future dashboards can include:</text:p>
      <text:list text:style-name="L431">
        <text:list-item>
          <text:p text:style-name="P916">Live sales monitoring </text:p>
        </text:list-item>
        <text:list-item>
          <text:p text:style-name="P916">Real time customer tracking </text:p>
        </text:list-item>
        <text:list-item>
          <text:p text:style-name="P916">Instant KPI updates </text:p>
        </text:list-item>
        <text:list-item>
          <text:p text:style-name="P916">Automated alerts </text:p>
        </text:list-item>
        <text:list-item>
          <text:p text:style-name="P916">Live inventory monitoring </text:p>
        </text:list-item>
        <text:list-item>
          <text:p text:style-name="P917">Real time revenue analysis </text:p>
        </text:list-item>
      </text:list>
      <text:h text:style-name="P141" text:outline-level="2">15.4.3 Technologies for Real Time Dashboards</text:h>
      <text:p text:style-name="P66">Future implementations may use:</text:p>
      <text:list text:style-name="L432">
        <text:list-item>
          <text:p text:style-name="P918">Power BI Service </text:p>
        </text:list-item>
        <text:list-item>
          <text:p text:style-name="P918">Streaming datasets </text:p>
        </text:list-item>
        <text:list-item>
          <text:p text:style-name="P918">Azure services </text:p>
        </text:list-item>
        <text:list-item>
          <text:p text:style-name="P918">Cloud APIs </text:p>
        </text:list-item>
        <text:list-item>
          <text:p text:style-name="P919">Real time databases </text:p>
        </text:list-item>
      </text:list>
      <text:h text:style-name="P141" text:outline-level="2">15.4.4 Benefits of Real Time Dashboards</text:h>
      <text:list text:style-name="L433">
        <text:list-item>
          <text:p text:style-name="P920">Faster business response </text:p>
        </text:list-item>
        <text:list-item>
          <text:p text:style-name="P920">Improved monitoring </text:p>
        </text:list-item>
        <text:list-item>
          <text:p text:style-name="P920">Better operational control </text:p>
        </text:list-item>
        <text:list-item>
          <text:p text:style-name="P920">Immediate issue identification </text:p>
        </text:list-item>
        <text:list-item>
          <text:p text:style-name="P921">Improved strategic planning </text:p>
        </text:list-item>
      </text:list>
      <text:h text:style-name="P141" text:outline-level="2">15.4.5 Business Applications</text:h>
      <text:p text:style-name="P66">Real time dashboards are widely used in:</text:p>
      <text:list text:style-name="L434">
        <text:list-item>
          <text:p text:style-name="P922">Retail analytics </text:p>
        </text:list-item>
        <text:list-item>
          <text:p text:style-name="P922">Banking systems </text:p>
        </text:list-item>
        <text:list-item>
          <text:p text:style-name="P922">Logistics monitoring </text:p>
        </text:list-item>
        <text:list-item>
          <text:p text:style-name="P922">E Commerce platforms </text:p>
        </text:list-item>
        <text:list-item>
          <text:p text:style-name="P923">Manufacturing systems </text:p>
        </text:list-item>
      </text:list>
      <text:h text:style-name="P924" text:outline-level="1">15.5 Cloud Database Integration</text:h>
      <text:p text:style-name="P66">Cloud computing is becoming essential in modern business intelligence systems.</text:p>
      <text:p text:style-name="P66">Future versions of the project can integrate cloud databases and cloud analytical services.</text:p>
      <text:h text:style-name="P141" text:outline-level="2">15.5.1 Importance of Cloud Integration</text:h>
      <text:p text:style-name="P66">Cloud integration provides:</text:p>
      <text:list text:style-name="L435">
        <text:list-item>
          <text:p text:style-name="P925">Scalable data storage </text:p>
        </text:list-item>
        <text:list-item>
          <text:p text:style-name="P925">Online dashboard access </text:p>
        </text:list-item>
        <text:list-item>
          <text:p text:style-name="P925">Better collaboration </text:p>
        </text:list-item>
        <text:list-item>
          <text:p text:style-name="P925">Improved security </text:p>
        </text:list-item>
        <text:list-item>
          <text:p text:style-name="P926">Remote accessibility </text:p>
        </text:list-item>
      </text:list>
      <text:h text:style-name="P61" text:outline-level="2"><text:soft-page-break/>15.5.2 Cloud Platforms for Future Integration</text:h>
      <text:p text:style-name="P66">Future systems may use:</text:p>
      <text:list text:style-name="L436">
        <text:list-item>
          <text:p text:style-name="P927">Microsoft Azure </text:p>
        </text:list-item>
        <text:list-item>
          <text:p text:style-name="P927">Amazon Web Services (AWS) </text:p>
        </text:list-item>
        <text:list-item>
          <text:p text:style-name="P928">Google Cloud Platform </text:p>
        </text:list-item>
      </text:list>
      <text:p text:style-name="P66">These platforms support enterprise level analytics.</text:p>
      <text:h text:style-name="P141" text:outline-level="2">15.5.3 Cloud Database Technologies</text:h>
      <text:p text:style-name="P66">Examples include:</text:p>
      <text:list text:style-name="L437">
        <text:list-item>
          <text:p text:style-name="P929">Azure SQL Database </text:p>
        </text:list-item>
        <text:list-item>
          <text:p text:style-name="P929">Amazon RDS </text:p>
        </text:list-item>
        <text:list-item>
          <text:p text:style-name="P929">Google Big Query </text:p>
        </text:list-item>
        <text:list-item>
          <text:p text:style-name="P929">Snowflake </text:p>
        </text:list-item>
        <text:list-item>
          <text:p text:style-name="P930">MongoDB Atlas </text:p>
        </text:list-item>
      </text:list>
      <text:h text:style-name="P15" text:outline-level="2">15.5.4 Benefits of Cloud Analytics</text:h>
      <text:list text:style-name="L438">
        <text:list-item>
          <text:p text:style-name="P931">Improved scalability </text:p>
        </text:list-item>
        <text:list-item>
          <text:p text:style-name="P931">Better performance </text:p>
        </text:list-item>
        <text:list-item>
          <text:p text:style-name="P931">Centralised reporting </text:p>
        </text:list-item>
        <text:list-item>
          <text:p text:style-name="P931">Improved data availability </text:p>
        </text:list-item>
        <text:list-item>
          <text:p text:style-name="P932">Enterprise level analytical support </text:p>
        </text:list-item>
      </text:list>
      <text:h text:style-name="P61" text:outline-level="2">15.5.5 Cloud Based Dashboard Sharing</text:h>
      <text:p text:style-name="P66">Cloud integration enables:</text:p>
      <text:list text:style-name="L439">
        <text:list-item>
          <text:p text:style-name="P933">Online Power BI dashboards </text:p>
        </text:list-item>
        <text:list-item>
          <text:p text:style-name="P933">Mobile reporting </text:p>
        </text:list-item>
        <text:list-item>
          <text:p text:style-name="P933">Shared analytics </text:p>
        </text:list-item>
        <text:list-item>
          <text:p text:style-name="P933">Team collaboration </text:p>
        </text:list-item>
        <text:list-item>
          <text:p text:style-name="P934">Secure remote access </text:p>
        </text:list-item>
      </text:list>
      <text:h text:style-name="P119" text:outline-level="1">15.6 Advanced Customer Analytics</text:h>
      <text:h text:style-name="P119" text:outline-level="1"/>
      <text:p text:style-name="P66">Advanced customer analytics provides deeper understanding of customer behavior using intelligent analytical systems.</text:p>
      <text:p text:style-name="P66">The current project uses RFM segmentation. Future systems can integrate more advanced analytical techniques.</text:p>
      <text:h text:style-name="P141" text:outline-level="2">15.6.1 Behavioural Analytics</text:h>
      <text:p text:style-name="P66">Behavioural analytics studies customer interactions and purchasing patterns.</text:p>
      <text:p text:style-name="P66">Examples include:</text:p>
      <text:list text:style-name="L440">
        <text:list-item>
          <text:p text:style-name="P935">Browsing behavior </text:p>
        </text:list-item>
        <text:list-item>
          <text:p text:style-name="P935"><text:soft-page-break/>Purchase frequency </text:p>
        </text:list-item>
        <text:list-item>
          <text:p text:style-name="P935">Product preferences </text:p>
        </text:list-item>
        <text:list-item>
          <text:p text:style-name="P936">Customer engagement patterns </text:p>
        </text:list-item>
      </text:list>
      <text:h text:style-name="P61" text:outline-level="2">15.6.2 Predictive Customer Analytics</text:h>
      <text:p text:style-name="P66">Predictive analytics forecasts future customer actions.</text:p>
      <text:p text:style-name="P66">Applications include:</text:p>
      <text:list text:style-name="L441">
        <text:list-item>
          <text:p text:style-name="P937">Purchase prediction </text:p>
        </text:list-item>
        <text:list-item>
          <text:p text:style-name="P937">Churn prediction </text:p>
        </text:list-item>
        <text:list-item>
          <text:p text:style-name="P937">Customer lifetime value prediction </text:p>
        </text:list-item>
        <text:list-item>
          <text:p text:style-name="P938">Demand forecasting </text:p>
        </text:list-item>
      </text:list>
      <text:h text:style-name="P15" text:outline-level="2">15.6.3 Sentiment Analysis</text:h>
      <text:p text:style-name="P66">Sentiment analysis evaluates customer opinions and feedback.</text:p>
      <text:p text:style-name="P66">Applications include:</text:p>
      <text:list text:style-name="L442">
        <text:list-item>
          <text:p text:style-name="P939">Social media analysis </text:p>
        </text:list-item>
        <text:list-item>
          <text:p text:style-name="P939">Customer review analysis </text:p>
        </text:list-item>
        <text:list-item>
          <text:p text:style-name="P940">Product feedback analysis </text:p>
        </text:list-item>
      </text:list>
      <text:p text:style-name="P66">Natural Language Processing techniques can improve customer understanding.</text:p>
      <text:h text:style-name="P141" text:outline-level="2">15.6.4 Customer Lifetime Value Analysis</text:h>
      <text:p text:style-name="P66">Customer Lifetime Value measures total expected revenue from customers.</text:p>
      <text:p text:style-name="P66">Formula:</text:p>
      <text:p text:style-name="P66">CLV=Average Purchase Value×Purchase Frequency×Customer LifespanCLV = Average\ Purchase\ Value \times Purchase\ Frequency \times Customer\ LifespanCLV=Average Purchase Value×Purchase Frequency×Customer Lifespan</text:p>
      <text:p text:style-name="P66">Benefits include:</text:p>
      <text:list text:style-name="L443">
        <text:list-item>
          <text:p text:style-name="P941">Better customer targeting </text:p>
        </text:list-item>
        <text:list-item>
          <text:p text:style-name="P941">Improved retention strategies </text:p>
        </text:list-item>
        <text:list-item>
          <text:p text:style-name="P942">Revenue optimization </text:p>
        </text:list-item>
      </text:list>
      <text:h text:style-name="P141" text:outline-level="2">15.6.5 Personalized Marketing Systems</text:h>
      <text:p text:style-name="P66">Advanced analytics can improve personalized marketing.</text:p>
      <text:p text:style-name="P66">Examples include:</text:p>
      <text:list text:style-name="L444">
        <text:list-item>
          <text:p text:style-name="P943">Product recommendations </text:p>
        </text:list-item>
        <text:list-item>
          <text:p text:style-name="P943">Personalized discounts </text:p>
        </text:list-item>
        <text:list-item>
          <text:p text:style-name="P943">Smart email campaigns </text:p>
        </text:list-item>
        <text:list-item>
          <text:p text:style-name="P944">Customer specific promotions </text:p>
        </text:list-item>
      </text:list>
      <text:h text:style-name="P141" text:outline-level="2">15.6.6 Benefits of Advanced Customer Analytics</text:h>
      <text:list text:style-name="L445">
        <text:list-item>
          <text:p text:style-name="P945">Better customer understanding </text:p>
        </text:list-item>
        <text:list-item>
          <text:p text:style-name="P945"><text:soft-page-break/>Improved personalization </text:p>
        </text:list-item>
        <text:list-item>
          <text:p text:style-name="P945">Increased customer satisfaction </text:p>
        </text:list-item>
        <text:list-item>
          <text:p text:style-name="P945">Better retention strategies </text:p>
        </text:list-item>
        <text:list-item>
          <text:p text:style-name="P945">Improved profitability </text:p>
        </text:list-item>
        <text:list-item>
          <text:p text:style-name="P946">Enhanced marketing performance </text:p>
        </text:list-item>
      </text:list>
      <text:h text:style-name="P165" text:outline-level="1">15.7 Challenges in Future Implementation</text:h>
      <text:p text:style-name="P66">Future systems may face several challenges.</text:p>
      <text:h text:style-name="P141" text:outline-level="2">Data Privacy and Security</text:h>
      <text:p text:style-name="P66">Large customer datasets require secure data management.</text:p>
      <text:h text:style-name="P141" text:outline-level="2">Large Scale Data Processing</text:h>
      <text:p text:style-name="P66">Enterprise systems generate huge datasets requiring optimized infrastructure.</text:p>
      <text:h text:style-name="P141" text:outline-level="2">Real Time Processing Complexity</text:h>
      <text:p text:style-name="P66">Real time systems require high speed data pipelines.</text:p>
      <text:h text:style-name="P141" text:outline-level="2">AI Model Accuracy</text:h>
      <text:p text:style-name="P66">Machine Learning models require accurate training datasets.</text:p>
      <text:h text:style-name="P141" text:outline-level="2">Cloud Security Challenges</text:h>
      <text:p text:style-name="P66">Cloud systems require strong authentication and access control.</text:p>
      <text:h text:style-name="P60" text:outline-level="1">15.8 Conclusion</text:h>
      <text:p text:style-name="P66">This chapter explained the future scope and advanced enhancements for the Customer Segmentation using RFM Analysis project.</text:p>
      <text:p text:style-name="P66">The chapter discussed Artificial Intelligence based customer prediction, Machine Learning integration, Real Time dashboard development, Cloud database integration, and Advanced customer analytics.</text:p>
      <text:p text:style-name="P66">These future technologies can significantly improve customer segmentation, business intelligence, predictive analytics, operational efficiency, and strategic decision making.</text:p>
      <text:p text:style-name="P66">The integration of AI, Machine Learning, Real Time Analytics, and Cloud technologies will help organizations build intelligent, scalable, and automated business analytics systems for future business environments.</text:p>
      <text:p text:style-name="P66">16\. References --------------- 16.1 Research Papers 16.2 Online Articles 16.3 Documentation References 16.4 Books and Journals 16.5 Dataset Referen</text:p>
      <text:h text:style-name="P59" text:outline-level="1"><text:soft-page-break/>CHAPTER 16</text:h>
      <text:h text:style-name="P59" text:outline-level="1">REFERENCES</text:h>
      <text:h text:style-name="P515" text:outline-level="2">16.1 Introduction</text:h>
      <text:p text:style-name="P66">References are an important part of every academic and analytical project. They provide credibility, acknowledge original authors, and help readers understand the sources used during research and implementation.</text:p>
      <text:p text:style-name="P66">This project used various books, research papers, online resources, software documentation, datasets, and analytical tutorials related to Customer Segmentation, RFM Analysis, SQL, Python, Power BI, Business Intelligence, and Data Analytics.</text:p>
      <text:p text:style-name="P66">The following references were used during the development of the project.</text:p>
      <text:h text:style-name="P14" text:outline-level="1"><text:span text:style-name="T15">16.2 Research Paper</text:span>s</text:h>
      <text:h text:style-name="P141" text:outline-level="2">Research Paper 1</text:h>
      <text:p text:style-name="P66">Arthur Hughes<text:line-break/>Strategic Database Marketing<text:line-break/>McGraw Hill Publications</text:p>
      <text:p text:style-name="P66">This research paper explains customer relationship management and customer segmentation strategies.</text:p>
      <text:h text:style-name="P141" text:outline-level="2">Research Paper 2</text:h>
      <text:p text:style-name="P66">Blattberg, Kim, and Neslin<text:line-break/>Database Marketing: Analyzing and Managing Customers<text:line-break/>Springer Publications</text:p>
      <text:p text:style-name="P66">This paper explains customer analytics and database driven marketing systems.</text:p>
      <text:h text:style-name="P141" text:outline-level="2">Research Paper 3</text:h>
      <text:p text:style-name="P66">Fader, Peter S.<text:line-break/>Customer Centricity: Focus on the Right Customers for Strategic Advantage<text:line-break/>Wharton Digital Press</text:p>
      <text:p text:style-name="P66">This paper discusses customer value analysis and customer profitability.</text:p>
      <text:h text:style-name="P141" text:outline-level="2">Research Paper 4</text:h>
      <text:p text:style-name="P66">Wedel, M. and Kamakura, W.<text:line-break/>Market Segmentation: Conceptual and Methodological Foundations<text:line-break/>Springer Publications</text:p>
      <text:p text:style-name="P66">This paper explains customer segmentation methodologies and analytical techniques.</text:p>
      <text:h text:style-name="P141" text:outline-level="2">Research Paper 5</text:h>
      <text:p text:style-name="P66">Research Articles on RFM Analysis and Customer Segmentation<text:line-break/>Various academic journals and analytics publications were studied to understand Recency, Frequency, and Monetary based customer analysis.</text:p>
      <text:h text:style-name="P60" text:outline-level="1"><text:soft-page-break/>16.3 Online Articles</text:h>
      <text:h text:style-name="P141" text:outline-level="2">Article 1</text:h>
      <text:p text:style-name="P66">Microsoft Power BI Learning Resources</text:p>
      <text:p text:style-name="P66">Used for understanding dashboard creation, DAX calculations, KPI cards, and Power BI visualization techniques.</text:p>
      <text:h text:style-name="P141" text:outline-level="2">Article 2</text:h>
      <text:p text:style-name="P66">Python Data Analytics Tutorials</text:p>
      <text:p text:style-name="P66">Used for learning data preprocessing, Pandas operations, and customer segmentation implementation.</text:p>
      <text:h text:style-name="P141" text:outline-level="2">Article 3</text:h>
      <text:p text:style-name="P66">SQL Tutorial Resources</text:p>
      <text:p text:style-name="P66">Used for learning SQL queries, joins, aggregation functions, window functions, and analytical reporting.</text:p>
      <text:h text:style-name="P141" text:outline-level="2">Article 4</text:h>
      <text:p text:style-name="P66">Business Intelligence and Data Analytics Articles</text:p>
      <text:p text:style-name="P66">Used for understanding business intelligence systems, dashboard reporting, and KPI analysis.</text:p>
      <text:h text:style-name="P141" text:outline-level="2">Article 5</text:h>
      <text:p text:style-name="P66">Customer Segmentation and RFM Blogs</text:p>
      <text:p text:style-name="P66">Used for understanding practical implementation of customer segmentation techniques in retail businesses.</text:p>
      <text:h text:style-name="P165" text:outline-level="1">16.4 Documentation References</text:h>
      <text:h text:style-name="P141" text:outline-level="2">Microsoft Power BI Documentation</text:h>
      <text:p text:style-name="P66">Used for:</text:p>
      <text:list text:style-name="L446">
        <text:list-item>
          <text:p text:style-name="P947">Dashboard development </text:p>
        </text:list-item>
        <text:list-item>
          <text:p text:style-name="P947">DAX formulas </text:p>
        </text:list-item>
        <text:list-item>
          <text:p text:style-name="P947">Data modelling </text:p>
        </text:list-item>
        <text:list-item>
          <text:p text:style-name="P947">Power Query transformations </text:p>
        </text:list-item>
        <text:list-item>
          <text:p text:style-name="P948">KPI implementation </text:p>
        </text:list-item>
      </text:list>
      <text:h text:style-name="P141" text:outline-level="2">Python Official Documentation</text:h>
      <text:p text:style-name="P66">Used for:</text:p>
      <text:list text:style-name="L447">
        <text:list-item>
          <text:p text:style-name="P949">Python syntax </text:p>
        </text:list-item>
        <text:list-item>
          <text:p text:style-name="P949">Data processing </text:p>
        </text:list-item>
        <text:list-item>
          <text:p text:style-name="P949">File handling </text:p>
        </text:list-item>
        <text:list-item>
          <text:p text:style-name="P950">Data analysis functions </text:p>
        </text:list-item>
      </text:list>
      <text:h text:style-name="P141" text:outline-level="2"><text:soft-page-break/>Pandas Documentation</text:h>
      <text:p text:style-name="P66">Used for:</text:p>
      <text:list text:style-name="L448">
        <text:list-item>
          <text:p text:style-name="P951">Data cleaning </text:p>
        </text:list-item>
        <text:list-item>
          <text:p text:style-name="P951">Data transformation </text:p>
        </text:list-item>
        <text:list-item>
          <text:p text:style-name="P951">Aggregation operations </text:p>
        </text:list-item>
        <text:list-item>
          <text:p text:style-name="P952">Data Frame manipulation </text:p>
        </text:list-item>
      </text:list>
      <text:h text:style-name="P141" text:outline-level="2">NumPy Documentation</text:h>
      <text:p text:style-name="P66">Used for:</text:p>
      <text:list text:style-name="L449">
        <text:list-item>
          <text:p text:style-name="P953">Numerical calculations </text:p>
        </text:list-item>
        <text:list-item>
          <text:p text:style-name="P953">Statistical operations </text:p>
        </text:list-item>
        <text:list-item>
          <text:p text:style-name="P954">Mathematical processing </text:p>
        </text:list-item>
      </text:list>
      <text:h text:style-name="P141" text:outline-level="2">Matplotlib Documentation</text:h>
      <text:p text:style-name="P66">Used for:</text:p>
      <text:list text:style-name="L450">
        <text:list-item>
          <text:p text:style-name="P955">Chart creation </text:p>
        </text:list-item>
        <text:list-item>
          <text:p text:style-name="P955">Graph visualization </text:p>
        </text:list-item>
        <text:list-item>
          <text:p text:style-name="P956">Data plotting techniques </text:p>
        </text:list-item>
      </text:list>
      <text:h text:style-name="P141" text:outline-level="2">SQL Documentation</text:h>
      <text:p text:style-name="P66">Used for:</text:p>
      <text:list text:style-name="L451">
        <text:list-item>
          <text:p text:style-name="P957">Query execution </text:p>
        </text:list-item>
        <text:list-item>
          <text:p text:style-name="P957">Database management </text:p>
        </text:list-item>
        <text:list-item>
          <text:p text:style-name="P957">Table creation </text:p>
        </text:list-item>
        <text:list-item>
          <text:p text:style-name="P958">SQL analytical operations </text:p>
        </text:list-item>
      </text:list>
      <text:h text:style-name="P165" text:outline-level="1">16.5 Books and Journals</text:h>
      <text:h text:style-name="P141" text:outline-level="2">Book 1</text:h>
      <text:p text:style-name="P66">Han, J., Kamber, M., and Pei, J.<text:line-break/>Data Mining Concepts and Techniques</text:p>
      <text:p text:style-name="P66">Used for understanding data mining, customer analytics, and analytical methodologies.</text:p>
      <text:h text:style-name="P141" text:outline-level="2">Book 2</text:h>
      <text:p text:style-name="P66">Kimball, Ralph<text:line-break/>The Data Warehouse Toolkit</text:p>
      <text:p text:style-name="P66">Used for understanding star schema modeling and data warehouse concepts.</text:p>
      <text:h text:style-name="P141" text:outline-level="2">Book 3</text:h>
      <text:p text:style-name="P66">McKinney, Wes<text:line-break/>Python for Data Analysis</text:p>
      <text:p text:style-name="P66">Used for learning Pandas, NumPy, and Python based analytical techniques.</text:p>
      <text:h text:style-name="P141" text:outline-level="2"><text:soft-page-break/>Book 4</text:h>
      <text:p text:style-name="P66">Russo, Marco and Ferrari, Alberto<text:line-break/>The Definitive Guide to DAX</text:p>
      <text:p text:style-name="P66">Used for Power BI DAX calculations and KPI measures.</text:p>
      <text:h text:style-name="P141" text:outline-level="2">Book 5</text:h>
      <text:p text:style-name="P66">Few, Stephen<text:line-break/>Information Dashboard Design</text:p>
      <text:p text:style-name="P66">Used for understanding dashboard design principles and business visualization techniques.</text:p>
      <text:h text:style-name="P141" text:outline-level="2">Journal References</text:h>
      <text:p text:style-name="P66">Various journals related to:</text:p>
      <text:list text:style-name="L452">
        <text:list-item>
          <text:p text:style-name="P959">Data Analytics </text:p>
        </text:list-item>
        <text:list-item>
          <text:p text:style-name="P959">Business Intelligence </text:p>
        </text:list-item>
        <text:list-item>
          <text:p text:style-name="P959">Customer Relationship Management </text:p>
        </text:list-item>
        <text:list-item>
          <text:p text:style-name="P959">Data Mining </text:p>
        </text:list-item>
        <text:list-item>
          <text:p text:style-name="P960">Retail Analytics </text:p>
        </text:list-item>
      </text:list>
      <text:p text:style-name="P66">were referred during the project development process.</text:p>
      <text:h text:style-name="P165" text:outline-level="1">16.6 Dataset References</text:h>
      <text:h text:style-name="P141" text:outline-level="2">Online Super Store Dataset</text:h>
      <text:p text:style-name="P66">The project used the Online Super Store retail transaction dataset containing:</text:p>
      <text:list text:style-name="L453">
        <text:list-item>
          <text:p text:style-name="P961">Customer information </text:p>
        </text:list-item>
        <text:list-item>
          <text:p text:style-name="P961">Product details </text:p>
        </text:list-item>
        <text:list-item>
          <text:p text:style-name="P961">Sales records </text:p>
        </text:list-item>
        <text:list-item>
          <text:p text:style-name="P961">Profit values </text:p>
        </text:list-item>
        <text:list-item>
          <text:p text:style-name="P961">Shipping information </text:p>
        </text:list-item>
        <text:list-item>
          <text:p text:style-name="P962">Regional data </text:p>
        </text:list-item>
      </text:list>
      <text:p text:style-name="P66">The dataset was used for:</text:p>
      <text:list text:style-name="L454">
        <text:list-item>
          <text:p text:style-name="P963">Data cleaning </text:p>
        </text:list-item>
        <text:list-item>
          <text:p text:style-name="P963">Data transformation </text:p>
        </text:list-item>
        <text:list-item>
          <text:p text:style-name="P963">SQL analysis </text:p>
        </text:list-item>
        <text:list-item>
          <text:p text:style-name="P963">Python implementation </text:p>
        </text:list-item>
        <text:list-item>
          <text:p text:style-name="P963">Power BI dashboard development </text:p>
        </text:list-item>
        <text:list-item>
          <text:p text:style-name="P964">RFM customer segmentation </text:p>
        </text:list-item>
      </text:list>
      <text:h text:style-name="P141" text:outline-level="2">Public Retail Analytics Datasets</text:h>
      <text:p text:style-name="P66">Additional sample retail datasets and analytical examples were referred for understanding customer segmentation techniques and dashboard development practices.</text:p>
      <text:h text:style-name="P141" text:outline-level="2">Kaggle Dataset References</text:h>
      <text:p text:style-name="P66">Retail analytical datasets available on Kaggle were studied for:</text:p>
      <text:list text:style-name="L455">
        <text:list-item>
          <text:p text:style-name="P965"><text:soft-page-break/>Customer analytics concepts </text:p>
        </text:list-item>
        <text:list-item>
          <text:p text:style-name="P965">Sales analysis techniques </text:p>
        </text:list-item>
        <text:list-item>
          <text:p text:style-name="P965">Business intelligence reporting </text:p>
        </text:list-item>
        <text:list-item>
          <text:p text:style-name="P966">Dashboard visualization methods </text:p>
        </text:list-item>
      </text:list>
      <text:h text:style-name="P165" text:outline-level="1">16.7 Software Tools References</text:h>
      <text:p text:style-name="P66">The following software tools were used during project development.</text:p>
      <table:table table:name="Table2" table:style-name="Table2">
        <table:table-column table:style-name="Table2.A"/>
        <table:table-column table:style-name="Table2.B"/>
        <table:table-header-rows>
          <table:table-row>
            <table:table-cell table:style-name="Table2.A1" office:value-type="string">
              <text:p text:style-name="Table_20_Heading">Software Tool</text:p>
            </table:table-cell>
            <table:table-cell table:style-name="Table2.A1" office:value-type="string">
              <text:p text:style-name="Table_20_Heading">Purpose</text:p>
            </table:table-cell>
          </table:table-row>
        </table:table-header-rows>
        <table:table-row>
          <table:table-cell table:style-name="Table2.A1" office:value-type="string">
            <text:p text:style-name="Table_20_Contents">SQL Server</text:p>
          </table:table-cell>
          <table:table-cell table:style-name="Table2.A1" office:value-type="string">
            <text:p text:style-name="Table_20_Contents">Database management</text:p>
          </table:table-cell>
        </table:table-row>
        <table:table-row>
          <table:table-cell table:style-name="Table2.A1" office:value-type="string">
            <text:p text:style-name="Table_20_Contents">Python</text:p>
          </table:table-cell>
          <table:table-cell table:style-name="Table2.A1" office:value-type="string">
            <text:p text:style-name="Table_20_Contents">Data preprocessing and analytics</text:p>
          </table:table-cell>
        </table:table-row>
        <table:table-row>
          <table:table-cell table:style-name="Table2.A1" office:value-type="string">
            <text:p text:style-name="Table_20_Contents">Power BI</text:p>
          </table:table-cell>
          <table:table-cell table:style-name="Table2.A1" office:value-type="string">
            <text:p text:style-name="Table_20_Contents">Dashboard development</text:p>
          </table:table-cell>
        </table:table-row>
        <table:table-row>
          <table:table-cell table:style-name="Table2.A1" office:value-type="string">
            <text:p text:style-name="Table_20_Contents">Microsoft Excel</text:p>
          </table:table-cell>
          <table:table-cell table:style-name="Table2.A1" office:value-type="string">
            <text:p text:style-name="Table_20_Contents">Initial dataset handling</text:p>
          </table:table-cell>
        </table:table-row>
        <table:table-row>
          <table:table-cell table:style-name="Table2.A1" office:value-type="string">
            <text:p text:style-name="Table_20_Contents">Jupyter Notebook</text:p>
          </table:table-cell>
          <table:table-cell table:style-name="Table2.A1" office:value-type="string">
            <text:p text:style-name="Table_20_Contents">Python coding environment</text:p>
          </table:table-cell>
        </table:table-row>
      </table:table>
      <text:p text:style-name="P217"/>
      <text:h text:style-name="P165" text:outline-level="1">16.8 Websites and Learning Platforms</text:h>
      <text:p text:style-name="P66">The following educational platforms were used for learning and implementation support.</text:p>
      <text:list text:style-name="L456">
        <text:list-item>
          <text:p text:style-name="P967">Microsoft Learn </text:p>
        </text:list-item>
        <text:list-item>
          <text:p text:style-name="P967">Kaggle </text:p>
        </text:list-item>
        <text:list-item>
          <text:p text:style-name="P967">W3Schools </text:p>
        </text:list-item>
        <text:list-item>
          <text:p text:style-name="P967">GeeksforGeeks </text:p>
        </text:list-item>
        <text:list-item>
          <text:p text:style-name="P967">Analytics Vidhya </text:p>
        </text:list-item>
        <text:list-item>
          <text:p text:style-name="P967">Medium Data Analytics Blogs </text:p>
        </text:list-item>
        <text:list-item>
          <text:p text:style-name="P967">Python Official Website </text:p>
        </text:list-item>
        <text:list-item>
          <text:p text:style-name="P968">Power BI Community Forums </text:p>
        </text:list-item>
      </text:list>
      <text:p text:style-name="P66">These platforms provided practical implementation guidance and analytical learning resources.</text:p>
      <text:h text:style-name="P60" text:outline-level="1">16.9 Importance of References in the Project</text:h>
      <text:p text:style-name="P66">References played an important role in the successful completion of the project.</text:p>
      <text:p text:style-name="P66">Benefits include:</text:p>
      <text:list text:style-name="L457">
        <text:list-item>
          <text:p text:style-name="P969">Improved analytical understanding </text:p>
        </text:list-item>
        <text:list-item>
          <text:p text:style-name="P969">Better implementation techniques </text:p>
        </text:list-item>
        <text:list-item>
          <text:p text:style-name="P969">Strong academic credibility </text:p>
        </text:list-item>
        <text:list-item>
          <text:p text:style-name="P969">Improved research quality </text:p>
        </text:list-item>
        <text:list-item>
          <text:p text:style-name="P970">Better technical knowledge </text:p>
        </text:list-item>
      </text:list>
      <text:p text:style-name="P66">References ensured proper understanding of customer segmentation, business intelligence, and analytical methodologies.</text:p>
      <text:h text:style-name="P60" text:outline-level="1">16.10 Conclusion</text:h>
      <text:p text:style-name="P66">This chapter explained the references and learning resources used in the Customer Segmentation using RFM Analysis project.</text:p>
      <text:p text:style-name="P66"><text:soft-page-break/>The project referred to research papers, books, online articles, software documentation, datasets, and analytical learning platforms related to SQL, Python, Power BI, RFM Analysis, customer segmentation, business intelligence, and data analytics.</text:p>
      <text:p text:style-name="P114"><text:span text:style-name="T11">These references helped improve technical implementation, analytical understanding, dashboard development, and project documentation qualit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4T09:16:16.401843500</meta:creation-date>
    <dc:date>2026-05-14T14:09:11.501853600</dc:date>
    <meta:editing-duration>PT44M32S</meta:editing-duration>
    <meta:editing-cycles>5</meta:editing-cycles>
    <meta:generator>LibreOffice/26.2.3.2$Windows_X86_64 LibreOffice_project/70e089b17412e4cb7773e41413306b17a2328c34</meta:generator>
    <meta:document-statistic meta:table-count="2" meta:image-count="0" meta:object-count="0" meta:page-count="146" meta:paragraph-count="4527" meta:word-count="23919" meta:character-count="171785" meta:non-whitespace-character-count="153888"/>
  </office:meta>
</office:document-meta>
</file>